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080000044C81431C35.png" manifest:media-type="image/png"/>
  <manifest:file-entry manifest:full-path="Pictures/10000001000000FA000000FAFD41DA85.png" manifest:media-type="image/png"/>
  <manifest:file-entry manifest:full-path="Pictures/1000000000000708000003E8AB31C0D6.png" manifest:media-type="image/png"/>
  <manifest:file-entry manifest:full-path="Pictures/10000001000000B2000000BAA7368BD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39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5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4cm" fo:min-width="0.36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3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6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52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2cm" fo:min-width="0.39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1.00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9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0.39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29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9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999999" loext:decorative="false"/>
    </style:style>
    <style:style style:name="gr1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42cm" fo:min-width="0.32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draw:textarea-vertical-align="top" draw:auto-grow-height="true" draw:auto-grow-width="true" fo:min-height="0.397cm" fo:min-width="0.39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47cm" fo:min-width="0.34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569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3" style:family="paragraph">
      <loext:graphic-properties draw:fill="none"/>
      <style:text-properties fo:font-size="15.1000003814697pt" style:font-size-asian="15.1000003814697pt" style:font-size-complex="15.1000003814697pt"/>
    </style:style>
    <style:style style:name="P4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5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6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7" style:family="paragraph">
      <loext:graphic-properties draw:fill="none"/>
      <style:paragraph-properties fo:text-align="start"/>
      <style:text-properties fo:font-size="11.3000001907349pt" style:font-size-asian="11.3000001907349pt" style:font-size-complex="11.3000001907349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</style:style>
    <style:style style:name="P11" style:family="paragraph">
      <style:paragraph-properties fo:line-height="150%" fo:text-align="justify" style:writing-mode="lr-tb"/>
      <style:text-properties fo:font-size="12pt"/>
    </style:style>
    <style:style style:name="P12" style:family="paragraph">
      <loext:graphic-properties draw:fill="none"/>
      <style:paragraph-properties fo:line-height="150%" fo:text-align="justify"/>
      <style:text-properties fo:font-size="12pt" style:font-size-asian="11.3000001907349pt" style:font-size-complex="11.3000001907349pt"/>
    </style:style>
    <style:style style:name="P13" style:family="paragraph">
      <style:paragraph-properties fo:line-height="150%" fo:text-align="center" style:writing-mode="lr-tb"/>
    </style:style>
    <style:style style:name="P14" style:family="paragraph">
      <loext:graphic-properties draw:fill="none"/>
      <style:paragraph-properties fo:line-height="150%" fo:text-align="center"/>
      <style:text-properties fo:font-size="11.3000001907349pt" style:font-size-asian="11.3000001907349pt" style:font-size-complex="11.3000001907349pt"/>
    </style:style>
    <style:style style:name="P15" style:family="paragraph">
      <loext:graphic-properties draw:fill="solid" draw:fill-color="#999999"/>
    </style:style>
    <style:style style:name="P16" style:family="paragraph">
      <style:paragraph-properties fo:line-height="150%" fo:text-align="start" style:writing-mode="lr-tb"/>
      <style:text-properties fo:font-size="12pt"/>
    </style:style>
    <style:style style:name="P17" style:family="paragraph">
      <loext:graphic-properties draw:fill="none"/>
      <style:paragraph-properties fo:line-height="150%" fo:text-align="start"/>
      <style:text-properties fo:font-size="12pt" style:font-size-asian="11.3000001907349pt" style:font-size-complex="11.3000001907349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none"/>
      <style:paragraph-properties fo:text-align="center"/>
      <style:text-properties fo:font-size="11.3000001907349pt" style:font-size-asian="11.3000001907349pt" style:font-size-complex="11.3000001907349pt"/>
    </style:style>
    <style:style style:name="P20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T1" style:family="text">
      <style:text-properties fo:color="#000000" loext:opacity="100%" style:font-name="Times New Roman" fo:font-size="11.3000001907349pt" fo:font-weight="normal" style:font-name-asian="Times New Roman" style:font-size-asian="11.3000001907349pt" style:font-weight-asian="normal" style:font-name-complex="Times New Roman" style:font-size-complex="11.3000001907349pt" style:font-weight-complex="normal"/>
    </style:style>
    <style:style style:name="T2" style:family="text">
      <style:text-properties fo:color="#11285e" loext:opacity="100%" style:font-name="Times New Roman" fo:font-size="15.1000003814697pt" fo:font-weight="bold" style:font-name-asian="Times New Roman" style:font-size-asian="15.1000003814697pt" style:font-weight-asian="bold" style:font-name-complex="Times New Roman" style:font-size-complex="15.1000003814697pt" style:font-weight-complex="bold"/>
    </style:style>
    <style:style style:name="T3" style:family="text">
      <style:text-properties fo:color="#11285e" loext:opacity="100%" style:font-name="Times New Roman" fo:font-size="10.3000001907349pt" fo:font-weight="bold" style:font-name-asian="Times New Roman" style:font-size-asian="10.3000001907349pt" style:font-weight-asian="bold" style:font-name-complex="Times New Roman" style:font-size-complex="10.3000001907349pt" style:font-weight-complex="bold"/>
    </style:style>
    <style:style style:name="T4" style:family="text">
      <style:text-properties fo:color="#11285e" loext:opacity="100%" style:font-name="Times New Roman" fo:font-size="9.39999961853027pt" fo:font-weight="bold" style:font-name-asian="Times New Roman" style:font-size-asian="9.39999961853027pt" style:font-weight-asian="bold" style:font-name-complex="Times New Roman" style:font-size-complex="9.39999961853027pt" style:font-weight-complex="bold"/>
    </style:style>
    <style:style style:name="T5" style:family="text">
      <style:text-properties fo:color="#11285e" loext:opacity="100%" style:font-name="Times New Roman" fo:font-size="13.1999998092651pt" fo:font-weight="bold" style:font-name-asian="Times New Roman" style:font-size-asian="13.1999998092651pt" style:font-weight-asian="bold" style:font-name-complex="Times New Roman" style:font-size-complex="13.1999998092651pt" style:font-weight-complex="bold"/>
    </style:style>
    <style:style style:name="T6" style:family="text">
      <style:text-properties fo:color="#11285e" loext:opacity="100%" style:font-name="Times New Roman" fo:font-size="11.3000001907349pt" fo:font-weight="bold" style:font-name-asian="Times New Roman" style:font-size-asian="11.3000001907349pt" style:font-weight-asian="bold" style:font-name-complex="Times New Roman" style:font-size-complex="11.3000001907349pt" style:font-weight-complex="bold"/>
    </style:style>
    <style:style style:name="T7" style:family="text">
      <style:text-properties fo:color="#c00000" loext:opacity="100%" style:font-name="Times New Roman" fo:font-size="14.1000003814697pt" fo:font-weight="bold" style:font-name-asian="Times New Roman" style:font-size-asian="14.1000003814697pt" style:font-weight-asian="bold" style:font-name-complex="Times New Roman" style:font-size-complex="14.1000003814697pt" style:font-weight-complex="bold"/>
    </style:style>
    <style:style style:name="T8" style:family="text">
      <style:text-properties fo:color="#000000" loext:opacity="100%" style:font-name="Times New Roman" fo:font-size="11.3000001907349pt" fo:font-weight="bold" style:font-name-asian="Times New Roman" style:font-size-asian="11.3000001907349pt" style:font-weight-asian="bold" style:font-name-complex="Times New Roman" style:font-size-complex="11.3000001907349pt" style:font-weight-complex="bold"/>
    </style:style>
    <style:style style:name="T9" style:family="text">
      <style:text-properties fo:color="#c00000" loext:opacity="100%" style:font-name="Times New Roman" fo:font-size="13.1999998092651pt" fo:font-weight="bold" style:font-name-asian="Times New Roman" style:font-size-asian="13.1999998092651pt" style:font-weight-asian="bold" style:font-name-complex="Times New Roman" style:font-size-complex="13.1999998092651pt" style:font-weight-complex="bold"/>
    </style:style>
    <style:style style:name="T10" style:family="text">
      <style:text-properties fo:color="#000000" loext:opacity="100%" style:font-name="Times New Roman" fo:font-weight="normal" style:font-name-asian="Times New Roman" style:font-size-asian="11.3000001907349pt" style:font-weight-asian="normal" style:font-name-complex="Times New Roman" style:font-size-complex="11.3000001907349pt" style:font-weight-complex="normal"/>
    </style:style>
    <style:style style:name="T11" style:family="text">
      <style:text-properties fo:color="#000000" loext:opacity="100%" style:font-name="Times New Roman" fo:font-weight="bold" style:font-name-asian="Times New Roman" style:font-size-asian="11.3000001907349pt" style:font-weight-asian="bold" style:font-name-complex="Times New Roman" style:font-size-complex="11.3000001907349pt" style:font-weight-complex="bold"/>
    </style:style>
    <style:style style:name="T12" style:family="text">
      <style:text-properties fo:color="#000000" loext:opacity="100%" style:font-name="TimesNewRoman" fo:font-weight="bold" style:font-name-asian="TimesNewRoman" style:font-size-asian="11.3000001907349pt" style:font-weight-asian="bold" style:font-name-complex="TimesNewRoman" style:font-size-complex="11.3000001907349pt" style:font-weight-complex="bold"/>
    </style:style>
    <style:style style:name="T13" style:family="text">
      <style:text-properties fo:color="#000000" loext:opacity="100%" style:font-name="TimesNewRoman" fo:font-size="11.3000001907349pt" fo:font-weight="bold" style:font-name-asian="TimesNewRoman" style:font-size-asian="11.3000001907349pt" style:font-weight-asian="bold" style:font-name-complex="TimesNewRoman" style:font-size-complex="11.3000001907349pt" style:font-weight-complex="bold"/>
    </style:style>
    <style:style style:name="T14" style:family="text">
      <style:text-properties fo:color="#000000" loext:opacity="100%" style:font-name="Times New Roman" fo:font-size="10.3000001907349pt" fo:font-weight="bold" style:font-name-asian="Times New Roman" style:font-size-asian="10.3000001907349pt" style:font-weight-asian="bold" style:font-name-complex="Times New Roman" style:font-size-complex="10.3000001907349pt" style:font-weight-complex="bold"/>
    </style:style>
    <style:style style:name="T15" style:family="text">
      <style:text-properties fo:color="#000000" loext:opacity="100%" style:font-name="Times New Roman" fo:font-size="10.3000001907349pt" fo:font-weight="normal" style:font-name-asian="Times New Roman" style:font-size-asian="10.3000001907349pt" style:font-weight-asian="normal" style:font-name-complex="Times New Roman" style:font-size-complex="10.3000001907349pt" style:font-weight-complex="normal"/>
    </style:style>
    <style:style style:name="T16" style:family="text">
      <style:text-properties fo:color="#000000" loext:opacity="100%" style:font-name="Times New Roman" fo:font-size="13.1999998092651pt" fo:font-weight="bold" style:font-name-asian="Times New Roman" style:font-size-asian="13.1999998092651pt" style:font-weight-asian="bold" style:font-name-complex="Times New Roman" style:font-size-complex="13.1999998092651pt" style:font-weight-complex="bold"/>
    </style:style>
    <style:style style:name="T17" style:family="text">
      <style:text-properties fo:color="#000000" loext:opacity="100%" style:font-name="Courier New" fo:font-size="9.89999961853027pt" fo:font-weight="normal" style:font-name-asian="Courier New" style:font-size-asian="9.89999961853027pt" style:font-weight-asian="normal" style:font-name-complex="Courier New" style:font-size-complex="9.89999961853027pt" style:font-weight-complex="normal"/>
    </style:style>
    <style:style style:name="T18" style:family="text">
      <style:text-properties fo:color="#000000" loext:opacity="100%" style:font-name="Arial" fo:font-size="11.3000001907349pt" fo:font-weight="normal" style:font-name-asian="Arial" style:font-size-asian="11.3000001907349pt" style:font-weight-asian="normal" style:font-name-complex="Arial" style:font-size-complex="11.300000190734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97cm" svg:height="0.442cm" svg:x="1.793cm" svg:y="26.3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1.793cm" svg:y="1.81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912cm" svg:height="0.585cm" svg:x="5.7cm" svg:y="2.265cm">
          <draw:text-box>
            <text:p text:style-name="P1"><text:span text:style-name="T2">EAST WEST INSTITUTE OF TECHNOLOGY</text:span></text:p>
          </draw:text-box>
        </draw:frame>
        <draw:frame draw:style-name="gr1" draw:text-style-name="P2" draw:layer="layout" svg:width="0.397cm" svg:height="0.442cm" svg:x="15.354cm" svg:y="2.39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9.876cm" svg:y="2.94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7.587cm" svg:height="0.407cm" svg:x="7.2cm" svg:y="3.35cm">
          <draw:text-box>
            <text:p text:style-name="P1"><text:span text:style-name="T3">(An Autonomous Institute under VTU, Belagavi)</text:span></text:p>
          </draw:text-box>
        </draw:frame>
        <draw:frame draw:style-name="gr1" draw:text-style-name="P2" draw:layer="layout" svg:width="0.397cm" svg:height="0.442cm" svg:x="13.686cm" svg:y="3.36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9.871cm" svg:height="0.369cm" svg:x="6.2cm" svg:y="3.981cm">
          <draw:text-box>
            <text:p text:style-name="P1"><text:span text:style-name="T4">#63, Off Magadi Main Road, Vishwaneedam Post, Near Anjananagar,</text:span></text:p>
          </draw:text-box>
        </draw:frame>
        <draw:frame draw:style-name="gr1" draw:text-style-name="P2" draw:layer="layout" svg:width="0.397cm" svg:height="0.442cm" svg:x="14.839cm" svg:y="3.78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754cm" svg:height="0.369cm" svg:x="9.7cm" svg:y="4.481cm">
          <draw:text-box>
            <text:p text:style-name="P1"><text:span text:style-name="T4">Bengaluru- 560091.</text:span></text:p>
          </draw:text-box>
        </draw:frame>
        <draw:frame draw:style-name="gr1" draw:text-style-name="P2" draw:layer="layout" svg:width="0.397cm" svg:height="0.442cm" svg:x="11.262cm" svg:y="4.168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10.466cm" svg:height="0.518cm" svg:x="5.734cm" svg:y="5.1cm">
          <draw:text-box>
            <text:p text:style-name="P1"><text:span text:style-name="T5">Department of Information Science and Engineering</text:span></text:p>
          </draw:text-box>
        </draw:frame>
        <draw:frame draw:style-name="gr1" draw:text-style-name="P2" draw:layer="layout" svg:width="0.397cm" svg:height="0.442cm" svg:x="15.097cm" svg:y="5.2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278cm" svg:height="0.442cm" svg:x="8.7cm" svg:y="6.35cm">
          <draw:text-box>
            <text:p text:style-name="P1"><text:span text:style-name="T6">Academic Year: 2025-26</text:span><text:span text:style-name="T1"> </text:span></text:p>
          </draw:text-box>
        </draw:frame>
        <draw:frame draw:style-name="gr1" draw:text-style-name="P2" draw:layer="layout" svg:width="5.56cm" svg:height="0.442cm" svg:x="8.14cm" svg:y="7.35cm">
          <draw:text-box>
            <text:p text:style-name="P1"><text:span text:style-name="T1">An Innovative project work report </text:span></text:p>
          </draw:text-box>
        </draw:frame>
        <draw:frame draw:style-name="gr6" draw:text-style-name="P7" draw:layer="layout" svg:width="0.523cm" svg:height="0.442cm" svg:x="10.7cm" svg:y="8.158cm">
          <draw:text-box>
            <text:p text:style-name="P1"><text:span text:style-name="T1">on </text:span></text:p>
          </draw:text-box>
        </draw:frame>
        <draw:frame draw:style-name="gr7" draw:text-style-name="P8" draw:layer="layout" svg:width="8.424cm" svg:height="0.547cm" svg:x="3.026cm" svg:y="9.053cm">
          <draw:text-box>
            <text:p text:style-name="P1"><text:span text:style-name="T7">AI-BASED CURRENCY CLASSIFIER</text:span></text:p>
          </draw:text-box>
        </draw:frame>
        <draw:frame draw:style-name="gr1" draw:text-style-name="P2" draw:layer="layout" svg:width="0.397cm" svg:height="0.442cm" svg:x="10.839cm" svg:y="9.105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6.538cm" svg:height="0.547cm" svg:x="11.7cm" svg:y="9.053cm">
          <draw:text-box>
            <text:p text:style-name="P1"><text:span text:style-name="T7">FOR VISUALLY IMPAIRED </text:span></text:p>
          </draw:text-box>
        </draw:frame>
        <draw:frame draw:style-name="gr7" draw:text-style-name="P9" draw:layer="layout" svg:width="1.599cm" svg:height="0.547cm" svg:x="9.851cm" svg:y="9.6cm">
          <draw:text-box draw:corner-radius="0.37cm">
            <text:p text:style-name="P1"><text:span text:style-name="T7">USERS</text:span></text:p>
          </draw:text-box>
        </draw:frame>
        <draw:frame draw:style-name="gr8" draw:text-style-name="P7" draw:layer="layout" svg:width="0.397cm" svg:height="0.52cm" svg:x="11.053cm" svg:y="9.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9.876cm" svg:y="10.3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085cm" svg:height="0.442cm" svg:x="4.115cm" svg:y="11.158cm">
          <draw:text-box>
            <text:p text:style-name="P1"><text:span text:style-name="T1">Submitted in partial fulfillment of the requirements for the award of the degree of </text:span></text:p>
          </draw:text-box>
        </draw:frame>
        <draw:frame draw:style-name="gr1" draw:text-style-name="P2" draw:layer="layout" svg:width="6.005cm" svg:height="0.442cm" svg:x="7.45cm" svg:y="12.158cm">
          <draw:text-box>
            <text:p text:style-name="P1"><text:span text:style-name="T8">BACHELOR OF ENGINEERING </text:span></text:p>
          </draw:text-box>
        </draw:frame>
        <draw:frame draw:style-name="gr1" draw:text-style-name="P2" draw:layer="layout" svg:width="0.397cm" svg:height="0.442cm" svg:x="9.876cm" svg:y="12.831cm">
          <draw:text-box>
            <text:p text:style-name="P1"><text:span text:style-name="T8"><text:s/></text:span></text:p>
          </draw:text-box>
        </draw:frame>
        <draw:frame draw:style-name="gr9" draw:text-style-name="P7" draw:layer="layout" svg:width="1.006cm" svg:height="0.5cm" svg:x="10.45cm" svg:y="13.35cm">
          <draw:text-box>
            <text:p text:style-name="P1"><text:span text:style-name="T8">In </text:span></text:p>
          </draw:text-box>
        </draw:frame>
        <draw:frame draw:style-name="gr10" draw:text-style-name="P7" draw:layer="layout" svg:width="0.397cm" svg:height="0.442cm" svg:x="9.876cm" svg:y="14.07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8.868cm" svg:height="0.442cm" svg:x="5.95cm" svg:y="14.658cm">
          <draw:text-box>
            <text:p text:style-name="P1"><text:span text:style-name="T8">INFORMATION SCIENCE AND ENGINEERING </text:span></text:p>
          </draw:text-box>
        </draw:frame>
        <draw:frame draw:style-name="gr1" draw:text-style-name="P2" draw:layer="layout" svg:width="2.39cm" svg:height="0.442cm" svg:x="9.31cm" svg:y="16.158cm">
          <draw:text-box>
            <text:p text:style-name="P1"><text:span text:style-name="T8">Submitted by </text:span></text:p>
          </draw:text-box>
        </draw:frame>
        <draw:frame draw:style-name="gr1" draw:text-style-name="P2" draw:layer="layout" svg:width="3.539cm" svg:height="0.442cm" svg:x="8.911cm" svg:y="16.908cm">
          <draw:text-box>
            <text:p text:style-name="P1"><text:span text:style-name="T1">Abhijeet Choudhary <text:s text:c="2"/></text:span></text:p>
          </draw:text-box>
        </draw:frame>
        <draw:frame draw:style-name="gr1" draw:text-style-name="P2" draw:layer="layout" svg:width="0.397cm" svg:height="0.442cm" svg:x="9.876cm" svg:y="17.5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67cm" svg:height="0.442cm" svg:x="9.333cm" svg:y="17.85cm">
          <draw:text-box>
            <text:p text:style-name="P1"><text:span text:style-name="T1"><text:s/>1EW25IS001 </text:span></text:p>
          </draw:text-box>
        </draw:frame>
        <draw:frame draw:style-name="gr1" draw:text-style-name="P2" draw:layer="layout" svg:width="0.397cm" svg:height="0.442cm" svg:x="1.793cm" svg:y="18.8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897cm" svg:height="0.442cm" svg:x="1.793cm" svg:y="19.635cm">
          <draw:text-box>
            <text:p text:style-name="P1"><text:span text:style-name="T1"><text:s text:c="9"/></text:span></text:p>
          </draw:text-box>
        </draw:frame>
        <draw:frame draw:style-name="gr1" draw:text-style-name="P2" draw:layer="layout" svg:width="0.397cm" svg:height="0.442cm" svg:x="2.988cm" svg:y="19.6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4.183cm" svg:y="19.6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5.378cm" svg:y="19.6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6.573cm" svg:y="19.6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981cm" svg:height="0.442cm" svg:x="8.7cm" svg:y="19.658cm">
          <draw:text-box>
            <text:p text:style-name="P1"><text:span text:style-name="T8">Under the Guidance of </text:span></text:p>
          </draw:text-box>
        </draw:frame>
        <draw:frame draw:style-name="gr1" draw:text-style-name="P2" draw:layer="layout" svg:width="0.397cm" svg:height="0.442cm" svg:x="1.793cm" svg:y="20.4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794cm" svg:height="0.442cm" svg:x="8.906cm" svg:y="20.85cm">
          <draw:text-box>
            <text:p text:style-name="P1"><text:span text:style-name="T8">Raksha Sai Rannorey </text:span></text:p>
          </draw:text-box>
        </draw:frame>
        <draw:frame draw:style-name="gr1" draw:text-style-name="P2" draw:layer="layout" svg:width="0.397cm" svg:height="0.442cm" svg:x="9.876cm" svg:y="21.71cm">
          <draw:text-box>
            <text:p text:style-name="P1"><text:span text:style-name="T1"><text:s/></text:span></text:p>
          </draw:text-box>
        </draw:frame>
        <draw:frame draw:style-name="gr11" draw:text-style-name="P10" draw:layer="layout" svg:width="1.592cm" svg:height="1.592cm" svg:x="2.108cm" svg:y="1.758cm">
          <draw:image xlink:href="Pictures/10000001000000FA000000FAFD41DA85.png" xlink:type="simple" xlink:show="embed" xlink:actuate="onLoad" draw:mime-type="image/png">
            <text:p/>
          </draw:image>
        </draw:frame>
        <draw:frame draw:style-name="gr11" draw:text-style-name="P10" draw:layer="layout" svg:width="1.666cm" svg:height="1.741cm" svg:x="18.284cm" svg:y="1.609cm">
          <draw:image xlink:href="Pictures/10000001000000B2000000BAA7368BDF.png" xlink:type="simple" xlink:show="embed" xlink:actuate="onLoad" draw:mime-type="image/png">
            <text:p/>
          </draw:image>
        </draw:frame>
        <draw:frame draw:style-name="gr1" draw:text-style-name="P2" draw:layer="layout" svg:width="11.727cm" svg:height="0.442cm" svg:x="4.95cm" svg:y="22.1cm">
          <draw:text-box>
            <text:p text:style-name="P1"><text:span text:style-name="T1">Assistant Professor, Department of Information Science and Engineering </text:span></text:p>
          </draw:text-box>
        </draw:frame>
      </draw:page>
      <draw:page draw:name="page2" draw:style-name="dp1" draw:master-page-name="master-page40">
        <draw:frame draw:style-name="gr1" draw:text-style-name="P2" draw:layer="layout" svg:width="0.397cm" svg:height="0.442cm" svg:x="1.793cm" svg:y="26.3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1.793cm" svg:y="1.81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912cm" svg:height="0.585cm" svg:x="5.7cm" svg:y="2.265cm">
          <draw:text-box>
            <text:p text:style-name="P1"><text:span text:style-name="T2">EAST WEST INSTITUTE OF TECHNOLOGY</text:span></text:p>
          </draw:text-box>
        </draw:frame>
        <draw:frame draw:style-name="gr1" draw:text-style-name="P2" draw:layer="layout" svg:width="0.397cm" svg:height="0.442cm" svg:x="15.354cm" svg:y="2.39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7.587cm" svg:height="0.407cm" svg:x="7.2cm" svg:y="2.943cm">
          <draw:text-box>
            <text:p text:style-name="P1"><text:span text:style-name="T3">(An Autonomous Institute under VTU, Belagavi)</text:span></text:p>
          </draw:text-box>
        </draw:frame>
        <draw:frame draw:style-name="gr1" draw:text-style-name="P2" draw:layer="layout" svg:width="0.397cm" svg:height="0.442cm" svg:x="13.686cm" svg:y="2.91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9.871cm" svg:height="0.369cm" svg:x="5.95cm" svg:y="3.481cm">
          <draw:text-box>
            <text:p text:style-name="P1"><text:span text:style-name="T4">#63, Off Magadi Main Road, Vishwaneedam Post, Near Anjananagar,</text:span></text:p>
          </draw:text-box>
        </draw:frame>
        <draw:frame draw:style-name="gr1" draw:text-style-name="P2" draw:layer="layout" svg:width="0.397cm" svg:height="0.442cm" svg:x="14.839cm" svg:y="3.3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671cm" svg:height="0.369cm" svg:x="9.779cm" svg:y="3.981cm">
          <draw:text-box>
            <text:p text:style-name="P1"><text:span text:style-name="T4">Bengaluru- 560091</text:span></text:p>
          </draw:text-box>
        </draw:frame>
        <draw:frame draw:style-name="gr12" draw:text-style-name="P7" draw:layer="layout" svg:width="0.397cm" svg:height="0.553cm" svg:x="11.221cm" svg:y="3.6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9.64cm" svg:height="0.518cm" svg:x="5.81cm" svg:y="4.832cm">
          <draw:text-box>
            <text:p text:style-name="P1"><text:span text:style-name="T9">CERTIFICATE OF PROJECT COMPLETION</text:span></text:p>
          </draw:text-box>
        </draw:frame>
        <draw:frame draw:style-name="gr1" draw:text-style-name="P2" draw:layer="layout" svg:width="0.397cm" svg:height="0.442cm" svg:x="14.69cm" svg:y="4.881cm">
          <draw:text-box>
            <text:p text:style-name="P1"><text:span text:style-name="T1"><text:s/></text:span></text:p>
          </draw:text-box>
        </draw:frame>
        <draw:frame draw:style-name="gr13" draw:text-style-name="P12" draw:layer="layout" svg:width="17.334cm" svg:height="0.706cm" svg:x="2.7cm" svg:y="5.908cm">
          <draw:text-box>
            <text:p text:style-name="P11"><text:span text:style-name="T10">This is to certify that </text:span><text:span text:style-name="T11">Abhijeet Choudhary (1EW25IS001) </text:span><text:span text:style-name="T10">student of the Department of Information </text:span></text:p>
          </draw:text-box>
        </draw:frame>
        <draw:frame draw:style-name="gr1" draw:text-style-name="P12" draw:layer="layout" svg:width="17.591cm" svg:height="0.706cm" svg:x="2.7cm" svg:y="6.408cm">
          <draw:text-box>
            <text:p text:style-name="P11"><text:span text:style-name="T10">Science <text:s/>and <text:s/>Engineering, <text:s/>have <text:s/>successfully <text:s/>completed <text:s/>the <text:s/>course </text:span><text:span text:style-name="T11"><text:s/>BSDID208 </text:span><text:span text:style-name="T12"><text:s/>– </text:span><text:span text:style-name="T11"><text:s/>Innovation <text:s/>and </text:span></text:p>
          </draw:text-box>
        </draw:frame>
        <draw:frame draw:style-name="gr1" draw:text-style-name="P12" draw:layer="layout" svg:width="17.507cm" svg:height="0.706cm" svg:x="2.743cm" svg:y="7.1cm">
          <draw:text-box>
            <text:p text:style-name="P11"><text:span text:style-name="T11">Design Thinking Laboratory Project Work </text:span><text:span text:style-name="T10">for the Academic Year 2025-26, as prescribed under the </text:span></text:p>
          </draw:text-box>
        </draw:frame>
        <draw:frame draw:style-name="gr14" draw:text-style-name="P12" draw:layer="layout" svg:width="2.554cm" svg:height="0.706cm" svg:x="2.7cm" svg:y="7.537cm">
          <draw:text-box>
            <text:p text:style-name="P11"><text:span text:style-name="T11">2025 Scheme</text:span><text:span text:style-name="T10">. </text:span></text:p>
          </draw:text-box>
        </draw:frame>
        <draw:frame draw:style-name="gr1" draw:text-style-name="P14" draw:layer="layout" svg:width="16.329cm" svg:height="0.662cm" svg:x="1.793cm" svg:y="8.4cm">
          <draw:text-box>
            <text:p text:style-name="P13"><text:span text:style-name="T1">The <text:s/>project <text:s/>entitled </text:span><text:span text:style-name="T13"><text:s/>“AI</text:span><text:span text:style-name="T8">-BASED <text:s/>CURRENCY <text:s/>CLASSIFIER <text:s/>FOR <text:s/>VISUALLY <text:s/>IMPAIRED </text:span></text:p>
          </draw:text-box>
        </draw:frame>
        <draw:frame draw:style-name="gr1" draw:text-style-name="P14" draw:layer="layout" svg:width="10.268cm" svg:height="0.662cm" svg:x="1.793cm" svg:y="8.922cm">
          <draw:text-box>
            <text:p text:style-name="P13"><text:span text:style-name="T13">USERS” </text:span><text:span text:style-name="T1">was undertaken and completed under the guidance of: </text:span></text:p>
          </draw:text-box>
        </draw:frame>
        <draw:frame draw:style-name="gr1" draw:text-style-name="P14" draw:layer="layout" svg:width="6.135cm" svg:height="0.662cm" svg:x="1.793cm" svg:y="9.786cm">
          <draw:text-box>
            <text:p text:style-name="P13"><text:span text:style-name="T8">Project Guide: </text:span><text:span text:style-name="T1">Raksha Sai Rannorey </text:span></text:p>
          </draw:text-box>
        </draw:frame>
        <draw:frame draw:style-name="gr1" draw:text-style-name="P14" draw:layer="layout" svg:width="2.113cm" svg:height="0.662cm" svg:x="1.793cm" svg:y="10.64cm">
          <draw:text-box>
            <text:p text:style-name="P13"><text:span text:style-name="T8">Designation </text:span></text:p>
          </draw:text-box>
        </draw:frame>
        <draw:frame draw:style-name="gr1" draw:text-style-name="P14" draw:layer="layout" svg:width="0.433cm" svg:height="0.662cm" svg:x="4.097cm" svg:y="10.64cm">
          <draw:text-box>
            <text:p text:style-name="P13"><text:span text:style-name="T8">&amp; </text:span></text:p>
          </draw:text-box>
        </draw:frame>
        <draw:frame draw:style-name="gr1" draw:text-style-name="P14" draw:layer="layout" svg:width="2.289cm" svg:height="0.662cm" svg:x="4.719cm" svg:y="10.64cm">
          <draw:text-box>
            <text:p text:style-name="P13"><text:span text:style-name="T8">Department: </text:span></text:p>
          </draw:text-box>
        </draw:frame>
        <draw:frame draw:style-name="gr1" draw:text-style-name="P14" draw:layer="layout" svg:width="1.561cm" svg:height="0.662cm" svg:x="7.204cm" svg:y="10.64cm">
          <draw:text-box>
            <text:p text:style-name="P13"><text:span text:style-name="T1">Assistant </text:span></text:p>
          </draw:text-box>
        </draw:frame>
        <draw:frame draw:style-name="gr1" draw:text-style-name="P14" draw:layer="layout" svg:width="1.704cm" svg:height="0.662cm" svg:x="8.952cm" svg:y="10.64cm">
          <draw:text-box>
            <text:p text:style-name="P13"><text:span text:style-name="T1">Professor, </text:span></text:p>
          </draw:text-box>
        </draw:frame>
        <draw:frame draw:style-name="gr1" draw:text-style-name="P14" draw:layer="layout" svg:width="1.98cm" svg:height="0.662cm" svg:x="10.859cm" svg:y="10.64cm">
          <draw:text-box>
            <text:p text:style-name="P13"><text:span text:style-name="T1">Department </text:span></text:p>
          </draw:text-box>
        </draw:frame>
        <draw:frame draw:style-name="gr1" draw:text-style-name="P14" draw:layer="layout" svg:width="0.433cm" svg:height="0.662cm" svg:x="13.023cm" svg:y="10.64cm">
          <draw:text-box>
            <text:p text:style-name="P13"><text:span text:style-name="T1">of </text:span></text:p>
          </draw:text-box>
        </draw:frame>
        <draw:frame draw:style-name="gr1" draw:text-style-name="P14" draw:layer="layout" svg:width="2.002cm" svg:height="0.662cm" svg:x="13.652cm" svg:y="10.64cm">
          <draw:text-box>
            <text:p text:style-name="P13"><text:span text:style-name="T1">Information </text:span></text:p>
          </draw:text-box>
        </draw:frame>
        <draw:frame draw:style-name="gr1" draw:text-style-name="P14" draw:layer="layout" svg:width="1.339cm" svg:height="0.662cm" svg:x="15.85cm" svg:y="10.64cm">
          <draw:text-box>
            <text:p text:style-name="P13"><text:span text:style-name="T1">Science </text:span></text:p>
          </draw:text-box>
        </draw:frame>
        <draw:frame draw:style-name="gr1" draw:text-style-name="P14" draw:layer="layout" svg:width="0.676cm" svg:height="0.662cm" svg:x="17.383cm" svg:y="10.64cm">
          <draw:text-box>
            <text:p text:style-name="P13"><text:span text:style-name="T1">and </text:span></text:p>
          </draw:text-box>
        </draw:frame>
        <draw:frame draw:style-name="gr1" draw:text-style-name="P14" draw:layer="layout" svg:width="2.046cm" svg:height="0.662cm" svg:x="1.793cm" svg:y="11.171cm">
          <draw:text-box>
            <text:p text:style-name="P13"><text:span text:style-name="T1">Engineering </text:span></text:p>
          </draw:text-box>
        </draw:frame>
        <draw:frame draw:style-name="gr1" draw:text-style-name="P14" draw:layer="layout" svg:width="16.61cm" svg:height="0.662cm" svg:x="1.793cm" svg:y="12.026cm">
          <draw:text-box>
            <text:p text:style-name="P13"><text:span text:style-name="T1">The <text:s/>team <text:s/>has <text:s/>satisfactorily <text:s/>completed <text:s/>the <text:s/>project <text:s/>work <text:s/>and <text:s/>has <text:s/>fulfilled <text:s/>all <text:s/>the <text:s/>requirements <text:s/>as </text:span></text:p>
          </draw:text-box>
        </draw:frame>
        <draw:frame draw:style-name="gr1" draw:text-style-name="P14" draw:layer="layout" svg:width="4.477cm" svg:height="0.662cm" svg:x="1.793cm" svg:y="12.557cm">
          <draw:text-box>
            <text:p text:style-name="P13"><text:span text:style-name="T1">specified in the curriculum. </text:span></text:p>
          </draw:text-box>
        </draw:frame>
        <draw:frame draw:style-name="gr1" draw:text-style-name="P2" draw:layer="layout" svg:width="0.397cm" svg:height="0.442cm" svg:x="1.793cm" svg:y="13.41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176cm" svg:height="0.407cm" svg:x="3.295cm" svg:y="14.346cm">
          <draw:text-box>
            <text:p text:style-name="P1"><text:span text:style-name="T14">Project Guide</text:span></text:p>
          </draw:text-box>
        </draw:frame>
        <draw:frame draw:style-name="gr1" draw:text-style-name="P2" draw:layer="layout" svg:width="0.397cm" svg:height="0.442cm" svg:x="5.478cm" svg:y="14.31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539cm" svg:height="0.407cm" svg:x="8.798cm" svg:y="14.346cm">
          <draw:text-box>
            <text:p text:style-name="P1"><text:span text:style-name="T14">Examiner</text:span></text:p>
          </draw:text-box>
        </draw:frame>
        <draw:frame draw:style-name="gr1" draw:text-style-name="P2" draw:layer="layout" svg:width="0.397cm" svg:height="0.442cm" svg:x="10.341cm" svg:y="14.31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197cm" svg:height="0.407cm" svg:x="13.146cm" svg:y="14.346cm">
          <draw:text-box>
            <text:p text:style-name="P1"><text:span text:style-name="T14">Head of Department</text:span></text:p>
          </draw:text-box>
        </draw:frame>
        <draw:polygon draw:style-name="gr15" draw:text-style-name="P15" draw:layer="layout" svg:width="0.017cm" svg:height="0.149cm" svg:x="1.792cm" svg:y="14.181cm" svg:viewBox="0 0 18 150" draw:points="0,0 18,0 18,150 0,150">
          <text:p/>
        </draw:polygon>
        <draw:polygon draw:style-name="gr15" draw:text-style-name="P15" draw:layer="layout" svg:width="0.017cm" svg:height="0.016cm" svg:x="1.792cm" svg:y="14.181cm" svg:viewBox="0 0 18 17" draw:points="0,0 18,0 18,17 0,17">
          <text:p/>
        </draw:polygon>
        <draw:polygon draw:style-name="gr15" draw:text-style-name="P15" draw:layer="layout" svg:width="5.162cm" svg:height="0.016cm" svg:x="1.809cm" svg:y="14.181cm" svg:viewBox="0 0 5163 17" draw:points="0,0 5163,0 5163,17 0,17">
          <text:p/>
        </draw:polygon>
        <draw:polygon draw:style-name="gr15" draw:text-style-name="P15" draw:layer="layout" svg:width="0.017cm" svg:height="0.133cm" svg:x="6.971cm" svg:y="14.197cm" svg:viewBox="0 0 18 134" draw:points="0,0 18,0 18,134 0,134">
          <text:p/>
        </draw:polygon>
        <draw:polygon draw:style-name="gr15" draw:text-style-name="P15" draw:layer="layout" svg:width="0.017cm" svg:height="0.016cm" svg:x="6.971cm" svg:y="14.181cm" svg:viewBox="0 0 18 17" draw:points="0,0 18,0 18,17 0,17">
          <text:p/>
        </draw:polygon>
        <draw:polygon draw:style-name="gr15" draw:text-style-name="P15" draw:layer="layout" svg:width="5.161cm" svg:height="0.016cm" svg:x="6.988cm" svg:y="14.181cm" svg:viewBox="0 0 5162 17" draw:points="0,0 5162,0 5162,17 0,17">
          <text:p/>
        </draw:polygon>
        <draw:polygon draw:style-name="gr15" draw:text-style-name="P15" draw:layer="layout" svg:width="0.017cm" svg:height="0.133cm" svg:x="12.149cm" svg:y="14.197cm" svg:viewBox="0 0 18 134" draw:points="0,0 18,0 18,134 0,134">
          <text:p/>
        </draw:polygon>
        <draw:polygon draw:style-name="gr15" draw:text-style-name="P15" draw:layer="layout" svg:width="0.017cm" svg:height="0.016cm" svg:x="12.149cm" svg:y="14.181cm" svg:viewBox="0 0 18 17" draw:points="0,0 18,0 18,17 0,17">
          <text:p/>
        </draw:polygon>
        <draw:polygon draw:style-name="gr15" draw:text-style-name="P15" draw:layer="layout" svg:width="5.163cm" svg:height="0.016cm" svg:x="12.166cm" svg:y="14.181cm" svg:viewBox="0 0 5164 17" draw:points="0,0 5164,0 5164,17 0,17">
          <text:p/>
        </draw:polygon>
        <draw:polygon draw:style-name="gr15" draw:text-style-name="P15" draw:layer="layout" svg:width="0.016cm" svg:height="0.149cm" svg:x="17.329cm" svg:y="14.181cm" svg:viewBox="0 0 17 150" draw:points="0,0 17,0 17,150 0,150">
          <text:p/>
        </draw:polygon>
        <draw:polygon draw:style-name="gr15" draw:text-style-name="P15" draw:layer="layout" svg:width="0.016cm" svg:height="0.016cm" svg:x="17.329cm" svg:y="14.181cm" svg:viewBox="0 0 17 17" draw:points="0,0 17,0 17,17 0,17">
          <text:p/>
        </draw:polygon>
        <draw:polygon draw:style-name="gr15" draw:text-style-name="P15" draw:layer="layout" svg:width="0.017cm" svg:height="0.556cm" svg:x="1.792cm" svg:y="14.33cm" svg:viewBox="0 0 18 557" draw:points="0,0 18,0 18,557 0,557">
          <text:p/>
        </draw:polygon>
        <draw:polygon draw:style-name="gr15" draw:text-style-name="P15" draw:layer="layout" svg:width="0.017cm" svg:height="0.556cm" svg:x="6.971cm" svg:y="14.33cm" svg:viewBox="0 0 18 557" draw:points="0,0 18,0 18,557 0,557">
          <text:p/>
        </draw:polygon>
        <draw:polygon draw:style-name="gr15" draw:text-style-name="P15" draw:layer="layout" svg:width="0.017cm" svg:height="0.556cm" svg:x="12.149cm" svg:y="14.33cm" svg:viewBox="0 0 18 557" draw:points="0,0 18,0 18,557 0,557">
          <text:p/>
        </draw:polygon>
        <draw:polygon draw:style-name="gr15" draw:text-style-name="P15" draw:layer="layout" svg:width="0.016cm" svg:height="0.556cm" svg:x="17.329cm" svg:y="14.33cm" svg:viewBox="0 0 17 557" draw:points="0,0 17,0 17,557 0,557">
          <text:p/>
        </draw:polygon>
        <draw:frame draw:style-name="gr1" draw:text-style-name="P2" draw:layer="layout" svg:width="0.397cm" svg:height="0.442cm" svg:x="16.349cm" svg:y="14.31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136cm" svg:height="0.407cm" svg:x="2.813cm" svg:y="15.067cm">
          <draw:text-box>
            <text:p text:style-name="P1"><text:span text:style-name="T15">Raksha Sai Rannorey</text:span></text:p>
          </draw:text-box>
        </draw:frame>
        <draw:frame draw:style-name="gr1" draw:text-style-name="P2" draw:layer="layout" svg:width="0.397cm" svg:height="0.442cm" svg:x="5.959cm" svg:y="15.0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9.569cm" svg:y="15.05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096cm" svg:height="0.407cm" svg:x="13.196cm" svg:y="15.067cm">
          <draw:text-box>
            <text:p text:style-name="P1"><text:span text:style-name="T15">Dr. Shivakumar H M</text:span></text:p>
          </draw:text-box>
        </draw:frame>
        <draw:polygon draw:style-name="gr15" draw:text-style-name="P15" draw:layer="layout" svg:width="0.017cm" svg:height="0.149cm" svg:x="1.792cm" svg:y="14.886cm" svg:viewBox="0 0 18 150" draw:points="0,0 18,0 18,150 0,150">
          <text:p/>
        </draw:polygon>
        <draw:polygon draw:style-name="gr15" draw:text-style-name="P15" draw:layer="layout" svg:width="5.162cm" svg:height="0.017cm" svg:x="1.809cm" svg:y="14.886cm" svg:viewBox="0 0 5163 18" draw:points="0,0 5163,0 5163,18 0,18">
          <text:p/>
        </draw:polygon>
        <draw:polygon draw:style-name="gr15" draw:text-style-name="P15" draw:layer="layout" svg:width="0.017cm" svg:height="0.149cm" svg:x="6.971cm" svg:y="14.886cm" svg:viewBox="0 0 18 150" draw:points="0,0 18,0 18,150 0,150">
          <text:p/>
        </draw:polygon>
        <draw:polygon draw:style-name="gr15" draw:text-style-name="P15" draw:layer="layout" svg:width="5.161cm" svg:height="0.017cm" svg:x="6.988cm" svg:y="14.886cm" svg:viewBox="0 0 5162 18" draw:points="0,0 5162,0 5162,18 0,18">
          <text:p/>
        </draw:polygon>
        <draw:polygon draw:style-name="gr15" draw:text-style-name="P15" draw:layer="layout" svg:width="0.017cm" svg:height="0.149cm" svg:x="12.149cm" svg:y="14.886cm" svg:viewBox="0 0 18 150" draw:points="0,0 18,0 18,150 0,150">
          <text:p/>
        </draw:polygon>
        <draw:polygon draw:style-name="gr15" draw:text-style-name="P15" draw:layer="layout" svg:width="5.163cm" svg:height="0.017cm" svg:x="12.166cm" svg:y="14.886cm" svg:viewBox="0 0 5164 18" draw:points="0,0 5164,0 5164,18 0,18">
          <text:p/>
        </draw:polygon>
        <draw:polygon draw:style-name="gr15" draw:text-style-name="P15" draw:layer="layout" svg:width="0.016cm" svg:height="0.149cm" svg:x="17.329cm" svg:y="14.886cm" svg:viewBox="0 0 17 150" draw:points="0,0 17,0 17,150 0,150">
          <text:p/>
        </draw:polygon>
        <draw:polygon draw:style-name="gr15" draw:text-style-name="P15" draw:layer="layout" svg:width="0.017cm" svg:height="0.589cm" svg:x="1.792cm" svg:y="15.036cm" svg:viewBox="0 0 18 590" draw:points="0,0 18,0 18,590 0,590">
          <text:p/>
        </draw:polygon>
        <draw:polygon draw:style-name="gr15" draw:text-style-name="P15" draw:layer="layout" svg:width="0.017cm" svg:height="0.589cm" svg:x="6.971cm" svg:y="15.036cm" svg:viewBox="0 0 18 590" draw:points="0,0 18,0 18,590 0,590">
          <text:p/>
        </draw:polygon>
        <draw:polygon draw:style-name="gr15" draw:text-style-name="P15" draw:layer="layout" svg:width="0.017cm" svg:height="0.589cm" svg:x="12.149cm" svg:y="15.036cm" svg:viewBox="0 0 18 590" draw:points="0,0 18,0 18,590 0,590">
          <text:p/>
        </draw:polygon>
        <draw:polygon draw:style-name="gr15" draw:text-style-name="P15" draw:layer="layout" svg:width="0.016cm" svg:height="0.589cm" svg:x="17.329cm" svg:y="15.036cm" svg:viewBox="0 0 17 590" draw:points="0,0 17,0 17,590 0,590">
          <text:p/>
        </draw:polygon>
        <draw:frame draw:style-name="gr1" draw:text-style-name="P2" draw:layer="layout" svg:width="0.397cm" svg:height="0.442cm" svg:x="16.299cm" svg:y="15.03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397cm" svg:height="0.407cm" svg:x="3.685cm" svg:y="15.79cm">
          <draw:text-box>
            <text:p text:style-name="P1"><text:span text:style-name="T15">Signature</text:span></text:p>
          </draw:text-box>
        </draw:frame>
        <draw:frame draw:style-name="gr1" draw:text-style-name="P2" draw:layer="layout" svg:width="0.397cm" svg:height="0.442cm" svg:x="5.088cm" svg:y="15.7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397cm" svg:height="0.407cm" svg:x="8.864cm" svg:y="15.79cm">
          <draw:text-box>
            <text:p text:style-name="P1"><text:span text:style-name="T15">Signature</text:span></text:p>
          </draw:text-box>
        </draw:frame>
        <draw:frame draw:style-name="gr1" draw:text-style-name="P2" draw:layer="layout" svg:width="0.397cm" svg:height="0.442cm" svg:x="10.266cm" svg:y="15.7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397cm" svg:height="0.407cm" svg:x="14.042cm" svg:y="15.79cm">
          <draw:text-box>
            <text:p text:style-name="P1"><text:span text:style-name="T15">Signature</text:span></text:p>
          </draw:text-box>
        </draw:frame>
        <draw:polygon draw:style-name="gr15" draw:text-style-name="P15" draw:layer="layout" svg:width="0.017cm" svg:height="0.15cm" svg:x="1.792cm" svg:y="15.625cm" svg:viewBox="0 0 18 151" draw:points="0,0 18,0 18,151 0,151">
          <text:p/>
        </draw:polygon>
        <draw:polygon draw:style-name="gr15" draw:text-style-name="P15" draw:layer="layout" svg:width="5.162cm" svg:height="0.017cm" svg:x="1.809cm" svg:y="15.625cm" svg:viewBox="0 0 5163 18" draw:points="0,0 5163,0 5163,18 0,18">
          <text:p/>
        </draw:polygon>
        <draw:polygon draw:style-name="gr15" draw:text-style-name="P15" draw:layer="layout" svg:width="0.017cm" svg:height="0.15cm" svg:x="6.971cm" svg:y="15.625cm" svg:viewBox="0 0 18 151" draw:points="0,0 18,0 18,151 0,151">
          <text:p/>
        </draw:polygon>
        <draw:polygon draw:style-name="gr15" draw:text-style-name="P15" draw:layer="layout" svg:width="5.161cm" svg:height="0.017cm" svg:x="6.988cm" svg:y="15.625cm" svg:viewBox="0 0 5162 18" draw:points="0,0 5162,0 5162,18 0,18">
          <text:p/>
        </draw:polygon>
        <draw:polygon draw:style-name="gr15" draw:text-style-name="P15" draw:layer="layout" svg:width="0.017cm" svg:height="0.15cm" svg:x="12.149cm" svg:y="15.625cm" svg:viewBox="0 0 18 151" draw:points="0,0 18,0 18,151 0,151">
          <text:p/>
        </draw:polygon>
        <draw:polygon draw:style-name="gr15" draw:text-style-name="P15" draw:layer="layout" svg:width="5.163cm" svg:height="0.017cm" svg:x="12.166cm" svg:y="15.625cm" svg:viewBox="0 0 5164 18" draw:points="0,0 5164,0 5164,18 0,18">
          <text:p/>
        </draw:polygon>
        <draw:polygon draw:style-name="gr15" draw:text-style-name="P15" draw:layer="layout" svg:width="0.016cm" svg:height="0.15cm" svg:x="17.329cm" svg:y="15.625cm" svg:viewBox="0 0 17 151" draw:points="0,0 17,0 17,151 0,151">
          <text:p/>
        </draw:polygon>
        <draw:polygon draw:style-name="gr15" draw:text-style-name="P15" draw:layer="layout" svg:width="0.017cm" svg:height="0.555cm" svg:x="1.792cm" svg:y="15.775cm" svg:viewBox="0 0 18 556" draw:points="0,0 18,0 18,556 0,556">
          <text:p/>
        </draw:polygon>
        <draw:polygon draw:style-name="gr15" draw:text-style-name="P15" draw:layer="layout" svg:width="0.017cm" svg:height="0.555cm" svg:x="6.971cm" svg:y="15.775cm" svg:viewBox="0 0 18 556" draw:points="0,0 18,0 18,556 0,556">
          <text:p/>
        </draw:polygon>
        <draw:polygon draw:style-name="gr15" draw:text-style-name="P15" draw:layer="layout" svg:width="0.017cm" svg:height="0.555cm" svg:x="12.149cm" svg:y="15.775cm" svg:viewBox="0 0 18 556" draw:points="0,0 18,0 18,556 0,556">
          <text:p/>
        </draw:polygon>
        <draw:polygon draw:style-name="gr15" draw:text-style-name="P15" draw:layer="layout" svg:width="0.016cm" svg:height="0.555cm" svg:x="17.329cm" svg:y="15.775cm" svg:viewBox="0 0 17 556" draw:points="0,0 17,0 17,556 0,556">
          <text:p/>
        </draw:polygon>
        <draw:frame draw:style-name="gr1" draw:text-style-name="P2" draw:layer="layout" svg:width="0.397cm" svg:height="0.442cm" svg:x="15.445cm" svg:y="15.7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309cm" svg:height="0.407cm" svg:x="2.73cm" svg:y="16.487cm">
          <draw:text-box>
            <text:p text:style-name="P1"><text:span text:style-name="T15">Date: DD/MM/YYYY</text:span></text:p>
          </draw:text-box>
        </draw:frame>
        <draw:frame draw:style-name="gr1" draw:text-style-name="P2" draw:layer="layout" svg:width="0.397cm" svg:height="0.442cm" svg:x="6.05cm" svg:y="16.457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309cm" svg:height="0.407cm" svg:x="7.909cm" svg:y="16.487cm">
          <draw:text-box>
            <text:p text:style-name="P1"><text:span text:style-name="T15">Date: DD/MM/YYYY</text:span></text:p>
          </draw:text-box>
        </draw:frame>
        <draw:frame draw:style-name="gr1" draw:text-style-name="P2" draw:layer="layout" svg:width="0.397cm" svg:height="0.442cm" svg:x="11.229cm" svg:y="16.457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309cm" svg:height="0.407cm" svg:x="13.088cm" svg:y="16.487cm">
          <draw:text-box>
            <text:p text:style-name="P1"><text:span text:style-name="T15">Date: DD/MM/YYYY</text:span></text:p>
          </draw:text-box>
        </draw:frame>
        <draw:polygon draw:style-name="gr15" draw:text-style-name="P15" draw:layer="layout" svg:width="0.017cm" svg:height="0.15cm" svg:x="1.792cm" svg:y="16.33cm" svg:viewBox="0 0 18 151" draw:points="0,0 18,0 18,151 0,151">
          <text:p/>
        </draw:polygon>
        <draw:polygon draw:style-name="gr15" draw:text-style-name="P15" draw:layer="layout" svg:width="5.162cm" svg:height="0.017cm" svg:x="1.809cm" svg:y="16.33cm" svg:viewBox="0 0 5163 18" draw:points="0,0 5163,0 5163,18 0,18">
          <text:p/>
        </draw:polygon>
        <draw:polygon draw:style-name="gr15" draw:text-style-name="P15" draw:layer="layout" svg:width="0.017cm" svg:height="0.15cm" svg:x="6.971cm" svg:y="16.33cm" svg:viewBox="0 0 18 151" draw:points="0,0 18,0 18,151 0,151">
          <text:p/>
        </draw:polygon>
        <draw:polygon draw:style-name="gr15" draw:text-style-name="P15" draw:layer="layout" svg:width="5.161cm" svg:height="0.017cm" svg:x="6.988cm" svg:y="16.33cm" svg:viewBox="0 0 5162 18" draw:points="0,0 5162,0 5162,18 0,18">
          <text:p/>
        </draw:polygon>
        <draw:polygon draw:style-name="gr15" draw:text-style-name="P15" draw:layer="layout" svg:width="0.017cm" svg:height="0.15cm" svg:x="12.149cm" svg:y="16.33cm" svg:viewBox="0 0 18 151" draw:points="0,0 18,0 18,151 0,151">
          <text:p/>
        </draw:polygon>
        <draw:polygon draw:style-name="gr15" draw:text-style-name="P15" draw:layer="layout" svg:width="5.163cm" svg:height="0.017cm" svg:x="12.166cm" svg:y="16.33cm" svg:viewBox="0 0 5164 18" draw:points="0,0 5164,0 5164,18 0,18">
          <text:p/>
        </draw:polygon>
        <draw:polygon draw:style-name="gr15" draw:text-style-name="P15" draw:layer="layout" svg:width="0.016cm" svg:height="0.15cm" svg:x="17.329cm" svg:y="16.33cm" svg:viewBox="0 0 17 151" draw:points="0,0 17,0 17,151 0,151">
          <text:p/>
        </draw:polygon>
        <draw:polygon draw:style-name="gr15" draw:text-style-name="P15" draw:layer="layout" svg:width="0.017cm" svg:height="0.547cm" svg:x="1.792cm" svg:y="16.48cm" svg:viewBox="0 0 18 548" draw:points="0,0 18,0 18,548 0,548">
          <text:p/>
        </draw:polygon>
        <draw:polygon draw:style-name="gr15" draw:text-style-name="P15" draw:layer="layout" svg:width="0.017cm" svg:height="0.017cm" svg:x="1.792cm" svg:y="17.027cm" svg:viewBox="0 0 18 18" draw:points="0,0 18,0 18,18 0,18">
          <text:p/>
        </draw:polygon>
        <draw:polygon draw:style-name="gr15" draw:text-style-name="P15" draw:layer="layout" svg:width="0.017cm" svg:height="0.017cm" svg:x="1.792cm" svg:y="17.027cm" svg:viewBox="0 0 18 18" draw:points="0,0 18,0 18,18 0,18">
          <text:p/>
        </draw:polygon>
        <draw:polygon draw:style-name="gr15" draw:text-style-name="P15" draw:layer="layout" svg:width="5.162cm" svg:height="0.017cm" svg:x="1.809cm" svg:y="17.027cm" svg:viewBox="0 0 5163 18" draw:points="0,0 5163,0 5163,18 0,18">
          <text:p/>
        </draw:polygon>
        <draw:polygon draw:style-name="gr15" draw:text-style-name="P15" draw:layer="layout" svg:width="0.017cm" svg:height="0.547cm" svg:x="6.971cm" svg:y="16.48cm" svg:viewBox="0 0 18 548" draw:points="0,0 18,0 18,548 0,548">
          <text:p/>
        </draw:polygon>
        <draw:polygon draw:style-name="gr15" draw:text-style-name="P15" draw:layer="layout" svg:width="0.017cm" svg:height="0.017cm" svg:x="6.971cm" svg:y="17.027cm" svg:viewBox="0 0 18 18" draw:points="0,0 18,0 18,18 0,18">
          <text:p/>
        </draw:polygon>
        <draw:polygon draw:style-name="gr15" draw:text-style-name="P15" draw:layer="layout" svg:width="5.161cm" svg:height="0.017cm" svg:x="6.988cm" svg:y="17.027cm" svg:viewBox="0 0 5162 18" draw:points="0,0 5162,0 5162,18 0,18">
          <text:p/>
        </draw:polygon>
        <draw:polygon draw:style-name="gr15" draw:text-style-name="P15" draw:layer="layout" svg:width="0.017cm" svg:height="0.547cm" svg:x="12.149cm" svg:y="16.48cm" svg:viewBox="0 0 18 548" draw:points="0,0 18,0 18,548 0,548">
          <text:p/>
        </draw:polygon>
        <draw:polygon draw:style-name="gr15" draw:text-style-name="P15" draw:layer="layout" svg:width="0.017cm" svg:height="0.017cm" svg:x="12.149cm" svg:y="17.027cm" svg:viewBox="0 0 18 18" draw:points="0,0 18,0 18,18 0,18">
          <text:p/>
        </draw:polygon>
        <draw:polygon draw:style-name="gr15" draw:text-style-name="P15" draw:layer="layout" svg:width="5.163cm" svg:height="0.017cm" svg:x="12.166cm" svg:y="17.027cm" svg:viewBox="0 0 5164 18" draw:points="0,0 5164,0 5164,18 0,18">
          <text:p/>
        </draw:polygon>
        <draw:polygon draw:style-name="gr15" draw:text-style-name="P15" draw:layer="layout" svg:width="0.016cm" svg:height="0.547cm" svg:x="17.329cm" svg:y="16.48cm" svg:viewBox="0 0 17 548" draw:points="0,0 17,0 17,548 0,548">
          <text:p/>
        </draw:polygon>
        <draw:polygon draw:style-name="gr15" draw:text-style-name="P15" draw:layer="layout" svg:width="0.016cm" svg:height="0.017cm" svg:x="17.329cm" svg:y="17.027cm" svg:viewBox="0 0 17 18" draw:points="0,0 17,0 17,18 0,18">
          <text:p/>
        </draw:polygon>
        <draw:polygon draw:style-name="gr15" draw:text-style-name="P15" draw:layer="layout" svg:width="0.016cm" svg:height="0.017cm" svg:x="17.329cm" svg:y="17.027cm" svg:viewBox="0 0 17 18" draw:points="0,0 17,0 17,18 0,18">
          <text:p/>
        </draw:polygon>
        <draw:frame draw:style-name="gr11" draw:text-style-name="P10" draw:layer="layout" svg:width="1.492cm" svg:height="1.567cm" svg:x="1.95cm" svg:y="1.85cm">
          <draw:image xlink:href="Pictures/10000001000000B2000000BAA7368BDF.png" xlink:type="simple" xlink:show="embed" xlink:actuate="onLoad" draw:mime-type="image/png">
            <text:p/>
          </draw:image>
        </draw:frame>
        <draw:frame draw:style-name="gr1" draw:text-style-name="P2" draw:layer="layout" svg:width="0.397cm" svg:height="0.442cm" svg:x="16.407cm" svg:y="16.457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53">
        <draw:frame draw:style-name="gr1" draw:text-style-name="P2" draw:layer="layout" svg:width="0.397cm" svg:height="0.442cm" svg:x="9.826cm" svg:y="26.332cm">
          <draw:text-box>
            <text:p text:style-name="P1"><text:span text:style-name="T8">i </text:span></text:p>
          </draw:text-box>
        </draw:frame>
        <draw:frame draw:style-name="gr1" draw:text-style-name="P2" draw:layer="layout" svg:width="0.397cm" svg:height="0.442cm" svg:x="1.793cm" svg:y="1.811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5.228cm" svg:height="0.518cm" svg:x="7.27cm" svg:y="2.433cm">
          <draw:text-box>
            <text:p text:style-name="P1"><text:span text:style-name="T16">ACKNOWLEDGEMENT</text:span></text:p>
          </draw:text-box>
        </draw:frame>
        <draw:frame draw:style-name="gr1" draw:text-style-name="P2" draw:layer="layout" svg:width="0.397cm" svg:height="0.442cm" svg:x="12.482cm" svg:y="2.4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015cm" svg:height="0.442cm" svg:x="1.793cm" svg:y="3.57cm">
          <draw:text-box>
            <text:p text:style-name="P1"><text:span text:style-name="T1">I would like to express my sincere gratitude to </text:span><text:span text:style-name="T8">East West Institute of Technology </text:span><text:span text:style-name="T1">for providing an </text:span></text:p>
          </draw:text-box>
        </draw:frame>
        <draw:frame draw:style-name="gr1" draw:text-style-name="P2" draw:layer="layout" svg:width="15.582cm" svg:height="0.442cm" svg:x="1.793cm" svg:y="4.093cm">
          <draw:text-box>
            <text:p text:style-name="P1"><text:span text:style-name="T1">excellent academic environment and the necessary facilities to successfully carry out this project. </text:span></text:p>
          </draw:text-box>
        </draw:frame>
        <draw:frame draw:style-name="gr1" draw:text-style-name="P2" draw:layer="layout" svg:width="16.047cm" svg:height="0.442cm" svg:x="1.793cm" svg:y="4.956cm">
          <draw:text-box>
            <text:p text:style-name="P1"><text:span text:style-name="T1">I extend my heartfelt thanks to our respected </text:span><text:span text:style-name="T8">Principal and Dean </text:span><text:span text:style-name="T1">for their constant encouragement, </text:span></text:p>
          </draw:text-box>
        </draw:frame>
        <draw:frame draw:style-name="gr1" draw:text-style-name="P2" draw:layer="layout" svg:width="11.483cm" svg:height="0.442cm" svg:x="1.793cm" svg:y="5.479cm">
          <draw:text-box>
            <text:p text:style-name="P1"><text:span text:style-name="T1">support, and guidance in fostering academic excellence and innovation. </text:span></text:p>
          </draw:text-box>
        </draw:frame>
        <draw:frame draw:style-name="gr1" draw:text-style-name="P2" draw:layer="layout" svg:width="16.104cm" svg:height="0.442cm" svg:x="1.793cm" svg:y="6.333cm">
          <draw:text-box>
            <text:p text:style-name="P1"><text:span text:style-name="T1">I would also like to express my sincere gratitude to </text:span><text:span text:style-name="T8">Dr. Shivakumar H M</text:span><text:span text:style-name="T1">, Head of the Department, </text:span></text:p>
          </draw:text-box>
        </draw:frame>
        <draw:frame draw:style-name="gr1" draw:text-style-name="P2" draw:layer="layout" svg:width="16.478cm" svg:height="0.442cm" svg:x="1.793cm" svg:y="6.865cm">
          <draw:text-box>
            <text:p text:style-name="P1"><text:span text:style-name="T1">Department of Information Science and Engineering, for his continuous encouragement, guidance, and </text:span></text:p>
          </draw:text-box>
        </draw:frame>
        <draw:frame draw:style-name="gr1" draw:text-style-name="P2" draw:layer="layout" svg:width="5.948cm" svg:height="0.442cm" svg:x="1.793cm" svg:y="7.388cm">
          <draw:text-box>
            <text:p text:style-name="P1"><text:span text:style-name="T1">support throughout the project work. </text:span></text:p>
          </draw:text-box>
        </draw:frame>
        <draw:frame draw:style-name="gr1" draw:text-style-name="P2" draw:layer="layout" svg:width="15.885cm" svg:height="0.442cm" svg:x="1.793cm" svg:y="8.251cm">
          <draw:text-box>
            <text:p text:style-name="P1"><text:span text:style-name="T1">My thanks go to my project guide</text:span><text:span text:style-name="T8">, Ms. Raksha Sai Rannorey</text:span><text:span text:style-name="T1">, Assistant Professor, Department of </text:span></text:p>
          </draw:text-box>
        </draw:frame>
        <draw:frame draw:style-name="gr1" draw:text-style-name="P2" draw:layer="layout" svg:width="16.345cm" svg:height="0.442cm" svg:x="1.793cm" svg:y="8.773cm">
          <draw:text-box>
            <text:p text:style-name="P1"><text:span text:style-name="T1">Information Science and Engineering, for her invaluable guidance, constructive suggestions, patience, </text:span></text:p>
          </draw:text-box>
        </draw:frame>
        <draw:frame draw:style-name="gr1" draw:text-style-name="P2" draw:layer="layout" svg:width="15.131cm" svg:height="0.442cm" svg:x="1.793cm" svg:y="9.304cm">
          <draw:text-box>
            <text:p text:style-name="P1"><text:span text:style-name="T1">and continuous support, which greatly contributed to the successful completion of this project. </text:span></text:p>
          </draw:text-box>
        </draw:frame>
        <draw:frame draw:style-name="gr1" draw:text-style-name="P2" draw:layer="layout" svg:width="16.346cm" svg:height="0.442cm" svg:x="1.793cm" svg:y="10.159cm">
          <draw:text-box>
            <text:p text:style-name="P1"><text:span text:style-name="T1">I <text:s/>am <text:s/>also <text:s/>grateful <text:s/>to <text:s/>my <text:s/>parents <text:s/>for <text:s/>their <text:s/>unwavering <text:s/>support, <text:s/>motivation, <text:s/>and <text:s/>encouragement </text:span></text:p>
          </draw:text-box>
        </draw:frame>
        <draw:frame draw:style-name="gr1" draw:text-style-name="P2" draw:layer="layout" svg:width="5.472cm" svg:height="0.442cm" svg:x="1.793cm" svg:y="10.69cm">
          <draw:text-box>
            <text:p text:style-name="P1"><text:span text:style-name="T1">throughout my academic journey. </text:span></text:p>
          </draw:text-box>
        </draw:frame>
        <draw:frame draw:style-name="gr1" draw:text-style-name="P2" draw:layer="layout" svg:width="16.567cm" svg:height="0.442cm" svg:x="1.793cm" svg:y="11.545cm">
          <draw:text-box>
            <text:p text:style-name="P1"><text:span text:style-name="T1">Finally, I would like to thank my teammates for their cooperation, dedication, and collaborative efforts, </text:span></text:p>
          </draw:text-box>
        </draw:frame>
        <draw:frame draw:style-name="gr1" draw:text-style-name="P2" draw:layer="layout" svg:width="12.036cm" svg:height="0.442cm" svg:x="1.793cm" svg:y="12.076cm">
          <draw:text-box>
            <text:p text:style-name="P1"><text:span text:style-name="T1">which played a significant role in the successful completion of this project. </text:span></text:p>
          </draw:text-box>
        </draw:frame>
        <draw:frame draw:style-name="gr1" draw:text-style-name="P2" draw:layer="layout" svg:width="0.397cm" svg:height="0.442cm" svg:x="17.968cm" svg:y="12.9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647cm" svg:height="0.442cm" svg:x="3.602cm" svg:y="13.453cm">
          <draw:text-box>
            <text:p text:style-name="P1"><text:span text:style-name="T1"><text:s text:c="112"/>Regards, </text:span></text:p>
          </draw:text-box>
        </draw:frame>
        <draw:frame draw:style-name="gr1" draw:text-style-name="P2" draw:layer="layout" svg:width="0.397cm" svg:height="0.442cm" svg:x="17.968cm" svg:y="13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34cm" svg:height="0.442cm" svg:x="14.723cm" svg:y="14.507cm">
          <draw:text-box>
            <text:p text:style-name="P1"><text:span text:style-name="T1">Abhijeet Choudhary </text:span></text:p>
          </draw:text-box>
        </draw:frame>
        <draw:frame draw:style-name="gr1" draw:text-style-name="P2" draw:layer="layout" svg:width="0.397cm" svg:height="0.442cm" svg:x="17.968cm" svg:y="15.0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106cm" svg:height="0.442cm" svg:x="2.872cm" svg:y="15.487cm">
          <draw:text-box>
            <text:p text:style-name="P1"><text:span text:style-name="T1"><text:s text:c="119"/>1EW25IS001 </text:span></text:p>
          </draw:text-box>
        </draw:frame>
        <draw:frame draw:style-name="gr11" draw:text-style-name="P10" draw:layer="layout" svg:width="1.666cm" svg:height="1.741cm" svg:x="0cm" svg:y="0cm">
          <draw:image xlink:href="Pictures/10000001000000B2000000BAA7368BDF.png" xlink:type="simple" xlink:show="embed" xlink:actuate="onLoad" draw:mime-type="image/png">
            <text:p/>
          </draw:image>
        </draw:frame>
        <draw:frame draw:style-name="gr1" draw:text-style-name="P2" draw:layer="layout" svg:width="0.397cm" svg:height="0.442cm" svg:x="1.793cm" svg:y="15.943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53">
        <draw:frame draw:style-name="gr1" draw:text-style-name="P2" draw:layer="layout" svg:width="0.397cm" svg:height="0.442cm" svg:x="9.768cm" svg:y="26.332cm">
          <draw:text-box>
            <text:p text:style-name="P1"><text:span text:style-name="T8">ii </text:span></text:p>
          </draw:text-box>
        </draw:frame>
        <draw:frame draw:style-name="gr1" draw:text-style-name="P2" draw:layer="layout" svg:width="0.397cm" svg:height="0.442cm" svg:x="1.793cm" svg:y="1.811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3.495cm" svg:height="0.518cm" svg:x="8.133cm" svg:y="2.433cm">
          <draw:text-box>
            <text:p text:style-name="P1"><text:span text:style-name="T16">DECLARATION</text:span></text:p>
          </draw:text-box>
        </draw:frame>
        <draw:frame draw:style-name="gr1" draw:text-style-name="P2" draw:layer="layout" svg:width="0.397cm" svg:height="0.442cm" svg:x="11.619cm" svg:y="2.4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424cm" svg:height="0.442cm" svg:x="1.793cm" svg:y="3.57cm">
          <draw:text-box>
            <text:p text:style-name="P1"><text:span text:style-name="T1">I hereby declare that the project entitled </text:span><text:span text:style-name="T8">AI-Based Currency Classifier for Visually Impaired Users </text:span></text:p>
          </draw:text-box>
        </draw:frame>
        <draw:frame draw:style-name="gr1" draw:text-style-name="P2" draw:layer="layout" svg:width="16.036cm" svg:height="0.442cm" svg:x="1.793cm" svg:y="4.093cm">
          <draw:text-box>
            <text:p text:style-name="P1"><text:span text:style-name="T1">submitted to the Department of Information Science and Engineering is an original work carried out </text:span></text:p>
          </draw:text-box>
        </draw:frame>
        <draw:frame draw:style-name="gr1" draw:text-style-name="P2" draw:layer="layout" svg:width="16.094cm" svg:height="0.442cm" svg:x="1.793cm" svg:y="4.624cm">
          <draw:text-box>
            <text:p text:style-name="P1"><text:span text:style-name="T1">by <text:s/>us <text:s/>under <text:s/>the <text:s/>guidance <text:s/>of </text:span><text:span text:style-name="T8"><text:s/>Ms. <text:s/>Raksha <text:s/>Sai <text:s/>Rannorey</text:span><text:span text:style-name="T1">, <text:s/>Assistant <text:s/>Professor, <text:s/>Department <text:s/>of </text:span></text:p>
          </draw:text-box>
        </draw:frame>
        <draw:frame draw:style-name="gr1" draw:text-style-name="P2" draw:layer="layout" svg:width="6.157cm" svg:height="0.442cm" svg:x="1.793cm" svg:y="5.147cm">
          <draw:text-box>
            <text:p text:style-name="P1"><text:span text:style-name="T1">Information Science and Engineering. </text:span></text:p>
          </draw:text-box>
        </draw:frame>
        <draw:frame draw:style-name="gr1" draw:text-style-name="P2" draw:layer="layout" svg:width="15.606cm" svg:height="0.442cm" svg:x="1.793cm" svg:y="6.001cm">
          <draw:text-box>
            <text:p text:style-name="P1"><text:span text:style-name="T1">I affirm that the work presented in this report has not been submitted, in part or full, for any other </text:span></text:p>
          </draw:text-box>
        </draw:frame>
        <draw:frame draw:style-name="gr1" draw:text-style-name="P2" draw:layer="layout" svg:width="15.738cm" svg:height="0.442cm" svg:x="1.793cm" svg:y="6.532cm">
          <draw:text-box>
            <text:p text:style-name="P1"><text:span text:style-name="T1">degree at this or any other institution. All sources of information and references used in this report </text:span></text:p>
          </draw:text-box>
        </draw:frame>
        <draw:frame draw:style-name="gr1" draw:text-style-name="P2" draw:layer="layout" svg:width="5.007cm" svg:height="0.442cm" svg:x="1.793cm" svg:y="7.056cm">
          <draw:text-box>
            <text:p text:style-name="P1"><text:span text:style-name="T1">have been duly acknowledged. </text:span></text:p>
          </draw:text-box>
        </draw:frame>
        <draw:frame draw:style-name="gr1" draw:text-style-name="P2" draw:layer="layout" svg:width="12.445cm" svg:height="0.442cm" svg:x="1.793cm" svg:y="7.919cm">
          <draw:text-box>
            <text:p text:style-name="P1"><text:span text:style-name="T1">I take full responsibility for the content and authenticity of this project report. </text:span></text:p>
          </draw:text-box>
        </draw:frame>
        <draw:frame draw:style-name="gr1" draw:text-style-name="P2" draw:layer="layout" svg:width="0.397cm" svg:height="0.442cm" svg:x="1.793cm" svg:y="8.7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34cm" svg:height="0.442cm" svg:x="14.723cm" svg:y="9.902cm">
          <draw:text-box>
            <text:p text:style-name="P1"><text:span text:style-name="T1">Abhijeet Choudhary </text:span></text:p>
          </draw:text-box>
        </draw:frame>
        <draw:frame draw:style-name="gr1" draw:text-style-name="P2" draw:layer="layout" svg:width="0.397cm" svg:height="0.442cm" svg:x="17.968cm" svg:y="10.4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106cm" svg:height="0.442cm" svg:x="2.872cm" svg:y="10.881cm">
          <draw:text-box>
            <text:p text:style-name="P1"><text:span text:style-name="T1"><text:s text:c="119"/>1EW25IS001 </text:span></text:p>
          </draw:text-box>
        </draw:frame>
        <draw:frame draw:style-name="gr11" draw:text-style-name="P10" draw:layer="layout" svg:width="1.666cm" svg:height="1.741cm" svg:x="1.784cm" svg:y="0.609cm">
          <draw:image xlink:href="Pictures/10000001000000B2000000BAA7368BDF.png" xlink:type="simple" xlink:show="embed" xlink:actuate="onLoad" draw:mime-type="image/png">
            <text:p/>
          </draw:image>
        </draw:frame>
        <draw:frame draw:style-name="gr1" draw:text-style-name="P2" draw:layer="layout" svg:width="0.397cm" svg:height="0.442cm" svg:x="1.793cm" svg:y="11.337cm">
          <draw:text-box>
            <text:p text:style-name="P1"><text:span text:style-name="T1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433cm" svg:height="0.442cm" svg:x="9.71cm" svg:y="26.332cm">
          <draw:text-box>
            <text:p text:style-name="P1"><text:span text:style-name="T8">iii </text:span></text:p>
          </draw:text-box>
        </draw:frame>
        <draw:frame draw:style-name="gr1" draw:text-style-name="P2" draw:layer="layout" svg:width="0.397cm" svg:height="0.442cm" svg:x="1.793cm" svg:y="1.811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2.538cm" svg:height="0.518cm" svg:x="8.614cm" svg:y="2.433cm">
          <draw:text-box>
            <text:p text:style-name="P1"><text:span text:style-name="T16">ABSTRACT</text:span></text:p>
          </draw:text-box>
        </draw:frame>
        <draw:frame draw:style-name="gr1" draw:text-style-name="P2" draw:layer="layout" svg:width="0.397cm" svg:height="0.442cm" svg:x="11.146cm" svg:y="2.492cm">
          <draw:text-box>
            <text:p text:style-name="P1"><text:span text:style-name="T1"><text:s/></text:span></text:p>
          </draw:text-box>
        </draw:frame>
        <draw:frame draw:style-name="gr1" draw:text-style-name="P12" draw:layer="layout" svg:width="17.683cm" svg:height="0.706cm" svg:x="1.793cm" svg:y="3.57cm">
          <draw:text-box>
            <text:p text:style-name="P11"><text:span text:style-name="T10">Cash <text:s/>transactions <text:s/>remain <text:s/>common <text:s/>across <text:s/>India, <text:s/>and <text:s/>visually <text:s/>impaired <text:s/>users <text:s/>often <text:s/>face <text:s/>difficulty </text:span></text:p>
          </draw:text-box>
        </draw:frame>
        <draw:frame draw:style-name="gr1" draw:text-style-name="P12" draw:layer="layout" svg:width="16.907cm" svg:height="0.706cm" svg:x="1.793cm" svg:y="4.093cm">
          <draw:text-box>
            <text:p text:style-name="P11"><text:span text:style-name="T10">identifying the denomination of currency notes quickly and confidently. This project addresses that </text:span></text:p>
          </draw:text-box>
        </draw:frame>
        <draw:frame draw:style-name="gr1" draw:text-style-name="P12" draw:layer="layout" svg:width="16.646cm" svg:height="0.706cm" svg:x="1.793cm" svg:y="4.624cm">
          <draw:text-box>
            <text:p text:style-name="P11"><text:span text:style-name="T10">need by developing an accessible currency classifier that captures a note image through a camera, </text:span></text:p>
          </draw:text-box>
        </draw:frame>
        <draw:frame draw:style-name="gr1" draw:text-style-name="P12" draw:layer="layout" svg:width="15.849cm" svg:height="0.706cm" svg:x="1.793cm" svg:y="5.147cm">
          <draw:text-box>
            <text:p text:style-name="P11"><text:span text:style-name="T10">processes the frame, identifies the denomination, and gives both visual and spoken feedback. </text:span></text:p>
          </draw:text-box>
        </draw:frame>
        <draw:frame draw:style-name="gr1" draw:text-style-name="P12" draw:layer="layout" svg:width="17.556cm" svg:height="0.706cm" svg:x="1.793cm" svg:y="6.001cm">
          <draw:text-box>
            <text:p text:style-name="P11"><text:span text:style-name="T10">The solution is implemented in two complementary forms. The desktop version uses Python, OpenCV, </text:span></text:p>
          </draw:text-box>
        </draw:frame>
        <draw:frame draw:style-name="gr1" draw:text-style-name="P12" draw:layer="layout" svg:width="16.989cm" svg:height="0.706cm" svg:x="1.793cm" svg:y="6.532cm">
          <draw:text-box>
            <text:p text:style-name="P11"><text:span text:style-name="T10">NumPy, and pyttsx3 to perform template-based recognition from a webcam feed and announces the </text:span></text:p>
          </draw:text-box>
        </draw:frame>
        <draw:frame draw:style-name="gr1" draw:text-style-name="P12" draw:layer="layout" svg:width="17.284cm" svg:height="0.706cm" svg:x="1.793cm" svg:y="7.056cm">
          <draw:text-box>
            <text:p text:style-name="P11"><text:span text:style-name="T10">detected denomination aloud. The web version uses HTML, CSS, and JavaScript to access the device </text:span></text:p>
          </draw:text-box>
        </draw:frame>
        <draw:frame draw:style-name="gr1" draw:text-style-name="P12" draw:layer="layout" svg:width="17.4cm" svg:height="0.706cm" svg:x="1.793cm" svg:y="7.587cm">
          <draw:text-box>
            <text:p text:style-name="P11"><text:span text:style-name="T10">camera and send the captured image to a Roboflow inference endpoint, with browser speech synthesis </text:span></text:p>
          </draw:text-box>
        </draw:frame>
        <draw:frame draw:style-name="gr1" draw:text-style-name="P12" draw:layer="layout" svg:width="5.987cm" svg:height="0.706cm" svg:x="1.793cm" svg:y="8.11cm">
          <draw:text-box>
            <text:p text:style-name="P11"><text:span text:style-name="T10">providing immediate audio output. </text:span></text:p>
          </draw:text-box>
        </draw:frame>
        <draw:frame draw:style-name="gr1" draw:text-style-name="P12" draw:layer="layout" svg:width="17cm" svg:height="0.706cm" svg:x="1.793cm" svg:y="8.972cm">
          <draw:text-box>
            <text:p text:style-name="P11"><text:span text:style-name="T10">Together, these modules create a practical accessibility-focused system that is easy to use, low cost, </text:span></text:p>
          </draw:text-box>
        </draw:frame>
        <draw:frame draw:style-name="gr1" draw:text-style-name="P12" draw:layer="layout" svg:width="16.932cm" svg:height="0.706cm" svg:x="1.793cm" svg:y="9.495cm">
          <draw:text-box>
            <text:p text:style-name="P11"><text:span text:style-name="T10">and suitable for demonstration in controlled environments. The project shows how computer vision </text:span></text:p>
          </draw:text-box>
        </draw:frame>
        <draw:frame draw:style-name="gr1" draw:text-style-name="P12" draw:layer="layout" svg:width="17.412cm" svg:height="0.706cm" svg:x="1.793cm" svg:y="10.026cm">
          <draw:text-box>
            <text:p text:style-name="P11"><text:span text:style-name="T10">and voice feedback can be combined to support independent cash handling for visually impaired users </text:span></text:p>
          </draw:text-box>
        </draw:frame>
        <draw:frame draw:style-name="gr1" draw:text-style-name="P12" draw:layer="layout" svg:width="16.825cm" svg:height="0.706cm" svg:x="1.793cm" svg:y="10.549cm">
          <draw:text-box>
            <text:p text:style-name="P11"><text:span text:style-name="T10">while also leaving room for future upgrades such as deep learning, offline mobile deployment, and </text:span></text:p>
          </draw:text-box>
        </draw:frame>
        <draw:frame draw:style-name="gr1" draw:text-style-name="P17" draw:layer="layout" svg:width="4.574cm" svg:height="0.706cm" svg:x="1.793cm" svg:y="11.08cm">
          <draw:text-box>
            <text:p text:style-name="P16"><text:span text:style-name="T10">counterfeit-note detection. </text:span></text:p>
          </draw:text-box>
        </draw:frame>
        <draw:frame draw:style-name="gr11" draw:text-style-name="P10" draw:layer="layout" svg:width="1.666cm" svg:height="1.741cm" svg:x="1.792cm" svg:y="0.723cm">
          <draw:image xlink:href="Pictures/10000001000000B2000000BAA7368BDF.png" xlink:type="simple" xlink:show="embed" xlink:actuate="onLoad" draw:mime-type="image/png">
            <text:p/>
          </draw:image>
        </draw:frame>
        <draw:frame draw:style-name="gr1" draw:text-style-name="P2" draw:layer="layout" svg:width="0.397cm" svg:height="0.442cm" svg:x="1.793cm" svg:y="11.934cm">
          <draw:text-box>
            <text:p text:style-name="P1"><text:span text:style-name="T1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411cm" svg:height="0.442cm" svg:x="9.727cm" svg:y="26.332cm">
          <draw:text-box>
            <text:p text:style-name="P1"><text:span text:style-name="T8">iv </text:span></text:p>
          </draw:text-box>
        </draw:frame>
        <draw:frame draw:style-name="gr1" draw:text-style-name="P2" draw:layer="layout" svg:width="0.397cm" svg:height="0.442cm" svg:x="1.793cm" svg:y="1.811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5.022cm" svg:height="0.518cm" svg:x="7.37cm" svg:y="2.433cm">
          <draw:text-box>
            <text:p text:style-name="P1"><text:span text:style-name="T16">TABLE OF CONTENTS</text:span></text:p>
          </draw:text-box>
        </draw:frame>
        <draw:frame draw:style-name="gr1" draw:text-style-name="P2" draw:layer="layout" svg:width="0.397cm" svg:height="0.442cm" svg:x="12.382cm" svg:y="2.49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741cm" svg:height="0.407cm" svg:x="6.922cm" svg:y="3.707cm">
          <draw:text-box>
            <text:p text:style-name="P1"><text:span text:style-name="T14">Particulars</text:span></text:p>
          </draw:text-box>
        </draw:frame>
        <draw:frame draw:style-name="gr1" draw:text-style-name="P2" draw:layer="layout" svg:width="0.397cm" svg:height="0.442cm" svg:x="8.664cm" svg:y="3.67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377cm" svg:height="0.407cm" svg:x="14.873cm" svg:y="3.707cm">
          <draw:text-box>
            <text:p text:style-name="P1"><text:span text:style-name="T14">Page No.</text:span></text:p>
          </draw:text-box>
        </draw:frame>
        <draw:polygon draw:style-name="gr15" draw:text-style-name="P15" draw:layer="layout" svg:width="0.017cm" svg:height="0.149cm" svg:x="1.792cm" svg:y="3.551cm" svg:viewBox="0 0 18 150" draw:points="0,0 18,0 18,150 0,150">
          <text:p/>
        </draw:polygon>
        <draw:polygon draw:style-name="gr15" draw:text-style-name="P15" draw:layer="layout" svg:width="0.017cm" svg:height="0.017cm" svg:x="1.792cm" svg:y="3.551cm" svg:viewBox="0 0 18 18" draw:points="0,0 18,0 18,18 0,18">
          <text:p/>
        </draw:polygon>
        <draw:polygon draw:style-name="gr15" draw:text-style-name="P15" draw:layer="layout" svg:width="11.967cm" svg:height="0.017cm" svg:x="1.809cm" svg:y="3.551cm" svg:viewBox="0 0 11968 18" draw:points="0,0 11968,0 11968,18 0,18">
          <text:p/>
        </draw:polygon>
        <draw:polygon draw:style-name="gr15" draw:text-style-name="P15" draw:layer="layout" svg:width="0.017cm" svg:height="0.132cm" svg:x="13.776cm" svg:y="3.568cm" svg:viewBox="0 0 18 133" draw:points="0,0 18,0 18,133 0,133">
          <text:p/>
        </draw:polygon>
        <draw:polygon draw:style-name="gr15" draw:text-style-name="P15" draw:layer="layout" svg:width="0.017cm" svg:height="0.017cm" svg:x="13.776cm" svg:y="3.551cm" svg:viewBox="0 0 18 18" draw:points="0,0 18,0 18,18 0,18">
          <text:p/>
        </draw:polygon>
        <draw:polygon draw:style-name="gr15" draw:text-style-name="P15" draw:layer="layout" svg:width="3.536cm" svg:height="0.017cm" svg:x="13.793cm" svg:y="3.551cm" svg:viewBox="0 0 3537 18" draw:points="0,0 3537,0 3537,18 0,18">
          <text:p/>
        </draw:polygon>
        <draw:polygon draw:style-name="gr15" draw:text-style-name="P15" draw:layer="layout" svg:width="0.016cm" svg:height="0.149cm" svg:x="17.329cm" svg:y="3.551cm" svg:viewBox="0 0 17 150" draw:points="0,0 17,0 17,150 0,150">
          <text:p/>
        </draw:polygon>
        <draw:polygon draw:style-name="gr15" draw:text-style-name="P15" draw:layer="layout" svg:width="0.016cm" svg:height="0.017cm" svg:x="17.329cm" svg:y="3.551cm" svg:viewBox="0 0 17 18" draw:points="0,0 17,0 17,18 0,18">
          <text:p/>
        </draw:polygon>
        <draw:polygon draw:style-name="gr15" draw:text-style-name="P15" draw:layer="layout" svg:width="0.017cm" svg:height="0.549cm" svg:x="1.792cm" svg:y="3.7cm" svg:viewBox="0 0 18 550" draw:points="0,0 18,0 18,550 0,550">
          <text:p/>
        </draw:polygon>
        <draw:polygon draw:style-name="gr15" draw:text-style-name="P15" draw:layer="layout" svg:width="0.017cm" svg:height="0.549cm" svg:x="13.776cm" svg:y="3.7cm" svg:viewBox="0 0 18 550" draw:points="0,0 18,0 18,550 0,550">
          <text:p/>
        </draw:polygon>
        <draw:polygon draw:style-name="gr15" draw:text-style-name="P15" draw:layer="layout" svg:width="0.016cm" svg:height="0.549cm" svg:x="17.329cm" svg:y="3.7cm" svg:viewBox="0 0 17 550" draw:points="0,0 17,0 17,550 0,550">
          <text:p/>
        </draw:polygon>
        <draw:frame draw:style-name="gr1" draw:text-style-name="P2" draw:layer="layout" svg:width="0.397cm" svg:height="0.442cm" svg:x="16.25cm" svg:y="3.67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752cm" svg:height="0.407cm" svg:x="2cm" svg:y="4.413cm">
          <draw:text-box>
            <text:p text:style-name="P1"><text:span text:style-name="T15">Acknowledgement</text:span></text:p>
          </draw:text-box>
        </draw:frame>
        <draw:frame draw:style-name="gr1" draw:text-style-name="P2" draw:layer="layout" svg:width="0.397cm" svg:height="0.442cm" svg:x="4.755cm" svg:y="4.38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15.511cm" svg:y="4.413cm">
          <draw:text-box>
            <text:p text:style-name="P1"><text:span text:style-name="T15">i</text:span></text:p>
          </draw:text-box>
        </draw:frame>
        <draw:polygon draw:style-name="gr15" draw:text-style-name="P15" draw:layer="layout" svg:width="0.017cm" svg:height="0.149cm" svg:x="1.792cm" svg:y="4.249cm" svg:viewBox="0 0 18 150" draw:points="0,0 18,0 18,150 0,150">
          <text:p/>
        </draw:polygon>
        <draw:polygon draw:style-name="gr15" draw:text-style-name="P15" draw:layer="layout" svg:width="11.967cm" svg:height="0.016cm" svg:x="1.809cm" svg:y="4.249cm" svg:viewBox="0 0 11968 17" draw:points="0,0 11968,0 11968,17 0,17">
          <text:p/>
        </draw:polygon>
        <draw:polygon draw:style-name="gr15" draw:text-style-name="P15" draw:layer="layout" svg:width="0.017cm" svg:height="0.149cm" svg:x="13.776cm" svg:y="4.249cm" svg:viewBox="0 0 18 150" draw:points="0,0 18,0 18,150 0,150">
          <text:p/>
        </draw:polygon>
        <draw:polygon draw:style-name="gr15" draw:text-style-name="P15" draw:layer="layout" svg:width="3.536cm" svg:height="0.016cm" svg:x="13.793cm" svg:y="4.249cm" svg:viewBox="0 0 3537 17" draw:points="0,0 3537,0 3537,17 0,17">
          <text:p/>
        </draw:polygon>
        <draw:polygon draw:style-name="gr15" draw:text-style-name="P15" draw:layer="layout" svg:width="0.016cm" svg:height="0.149cm" svg:x="17.329cm" svg:y="4.249cm" svg:viewBox="0 0 17 150" draw:points="0,0 17,0 17,150 0,150">
          <text:p/>
        </draw:polygon>
        <draw:polygon draw:style-name="gr15" draw:text-style-name="P15" draw:layer="layout" svg:width="0.017cm" svg:height="0.556cm" svg:x="1.792cm" svg:y="4.398cm" svg:viewBox="0 0 18 557" draw:points="0,0 18,0 18,557 0,557">
          <text:p/>
        </draw:polygon>
        <draw:polygon draw:style-name="gr15" draw:text-style-name="P15" draw:layer="layout" svg:width="0.017cm" svg:height="0.556cm" svg:x="13.776cm" svg:y="4.398cm" svg:viewBox="0 0 18 557" draw:points="0,0 18,0 18,557 0,557">
          <text:p/>
        </draw:polygon>
        <draw:polygon draw:style-name="gr15" draw:text-style-name="P15" draw:layer="layout" svg:width="0.016cm" svg:height="0.556cm" svg:x="17.329cm" svg:y="4.398cm" svg:viewBox="0 0 17 557" draw:points="0,0 17,0 17,557 0,557">
          <text:p/>
        </draw:polygon>
        <draw:frame draw:style-name="gr1" draw:text-style-name="P2" draw:layer="layout" svg:width="0.397cm" svg:height="0.442cm" svg:x="15.611cm" svg:y="4.38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7cm" svg:height="0.407cm" svg:x="2cm" svg:y="5.11cm">
          <draw:text-box>
            <text:p text:style-name="P1"><text:span text:style-name="T15">Declaration</text:span></text:p>
          </draw:text-box>
        </draw:frame>
        <draw:frame draw:style-name="gr1" draw:text-style-name="P2" draw:layer="layout" svg:width="0.397cm" svg:height="0.442cm" svg:x="3.702cm" svg:y="5.08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15.462cm" svg:y="5.11cm">
          <draw:text-box>
            <text:p text:style-name="P1"><text:span text:style-name="T15">ii</text:span></text:p>
          </draw:text-box>
        </draw:frame>
        <draw:polygon draw:style-name="gr15" draw:text-style-name="P15" draw:layer="layout" svg:width="0.017cm" svg:height="0.149cm" svg:x="1.792cm" svg:y="4.954cm" svg:viewBox="0 0 18 150" draw:points="0,0 18,0 18,150 0,150">
          <text:p/>
        </draw:polygon>
        <draw:polygon draw:style-name="gr15" draw:text-style-name="P15" draw:layer="layout" svg:width="11.967cm" svg:height="0.016cm" svg:x="1.809cm" svg:y="4.954cm" svg:viewBox="0 0 11968 17" draw:points="0,0 11968,0 11968,17 0,17">
          <text:p/>
        </draw:polygon>
        <draw:polygon draw:style-name="gr15" draw:text-style-name="P15" draw:layer="layout" svg:width="0.017cm" svg:height="0.149cm" svg:x="13.776cm" svg:y="4.954cm" svg:viewBox="0 0 18 150" draw:points="0,0 18,0 18,150 0,150">
          <text:p/>
        </draw:polygon>
        <draw:polygon draw:style-name="gr15" draw:text-style-name="P15" draw:layer="layout" svg:width="3.536cm" svg:height="0.016cm" svg:x="13.793cm" svg:y="4.954cm" svg:viewBox="0 0 3537 17" draw:points="0,0 3537,0 3537,17 0,17">
          <text:p/>
        </draw:polygon>
        <draw:polygon draw:style-name="gr15" draw:text-style-name="P15" draw:layer="layout" svg:width="0.016cm" svg:height="0.149cm" svg:x="17.329cm" svg:y="4.954cm" svg:viewBox="0 0 17 150" draw:points="0,0 17,0 17,150 0,150">
          <text:p/>
        </draw:polygon>
        <draw:polygon draw:style-name="gr15" draw:text-style-name="P15" draw:layer="layout" svg:width="0.017cm" svg:height="0.548cm" svg:x="1.792cm" svg:y="5.103cm" svg:viewBox="0 0 18 549" draw:points="0,0 18,0 18,549 0,549">
          <text:p/>
        </draw:polygon>
        <draw:polygon draw:style-name="gr15" draw:text-style-name="P15" draw:layer="layout" svg:width="0.017cm" svg:height="0.548cm" svg:x="13.776cm" svg:y="5.103cm" svg:viewBox="0 0 18 549" draw:points="0,0 18,0 18,549 0,549">
          <text:p/>
        </draw:polygon>
        <draw:polygon draw:style-name="gr15" draw:text-style-name="P15" draw:layer="layout" svg:width="0.016cm" svg:height="0.548cm" svg:x="17.329cm" svg:y="5.103cm" svg:viewBox="0 0 17 549" draw:points="0,0 17,0 17,549 0,549">
          <text:p/>
        </draw:polygon>
        <draw:frame draw:style-name="gr1" draw:text-style-name="P2" draw:layer="layout" svg:width="0.397cm" svg:height="0.442cm" svg:x="15.661cm" svg:y="5.08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235cm" svg:height="0.407cm" svg:x="2cm" svg:y="5.815cm">
          <draw:text-box>
            <text:p text:style-name="P1"><text:span text:style-name="T15">Abstract</text:span></text:p>
          </draw:text-box>
        </draw:frame>
        <draw:frame draw:style-name="gr1" draw:text-style-name="P2" draw:layer="layout" svg:width="0.397cm" svg:height="0.442cm" svg:x="3.237cm" svg:y="5.78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15.404cm" svg:y="5.815cm">
          <draw:text-box>
            <text:p text:style-name="P1"><text:span text:style-name="T15">iii</text:span></text:p>
          </draw:text-box>
        </draw:frame>
        <draw:polygon draw:style-name="gr15" draw:text-style-name="P15" draw:layer="layout" svg:width="0.017cm" svg:height="0.149cm" svg:x="1.792cm" svg:y="5.651cm" svg:viewBox="0 0 18 150" draw:points="0,0 18,0 18,150 0,150">
          <text:p/>
        </draw:polygon>
        <draw:polygon draw:style-name="gr15" draw:text-style-name="P15" draw:layer="layout" svg:width="11.967cm" svg:height="0.016cm" svg:x="1.809cm" svg:y="5.651cm" svg:viewBox="0 0 11968 17" draw:points="0,0 11968,0 11968,17 0,17">
          <text:p/>
        </draw:polygon>
        <draw:polygon draw:style-name="gr15" draw:text-style-name="P15" draw:layer="layout" svg:width="0.017cm" svg:height="0.149cm" svg:x="13.776cm" svg:y="5.651cm" svg:viewBox="0 0 18 150" draw:points="0,0 18,0 18,150 0,150">
          <text:p/>
        </draw:polygon>
        <draw:polygon draw:style-name="gr15" draw:text-style-name="P15" draw:layer="layout" svg:width="3.536cm" svg:height="0.016cm" svg:x="13.793cm" svg:y="5.651cm" svg:viewBox="0 0 3537 17" draw:points="0,0 3537,0 3537,17 0,17">
          <text:p/>
        </draw:polygon>
        <draw:polygon draw:style-name="gr15" draw:text-style-name="P15" draw:layer="layout" svg:width="0.016cm" svg:height="0.149cm" svg:x="17.329cm" svg:y="5.651cm" svg:viewBox="0 0 17 150" draw:points="0,0 17,0 17,150 0,150">
          <text:p/>
        </draw:polygon>
        <draw:polygon draw:style-name="gr15" draw:text-style-name="P15" draw:layer="layout" svg:width="0.017cm" svg:height="0.556cm" svg:x="1.792cm" svg:y="5.8cm" svg:viewBox="0 0 18 557" draw:points="0,0 18,0 18,557 0,557">
          <text:p/>
        </draw:polygon>
        <draw:polygon draw:style-name="gr15" draw:text-style-name="P15" draw:layer="layout" svg:width="0.017cm" svg:height="0.556cm" svg:x="13.776cm" svg:y="5.8cm" svg:viewBox="0 0 18 557" draw:points="0,0 18,0 18,557 0,557">
          <text:p/>
        </draw:polygon>
        <draw:polygon draw:style-name="gr15" draw:text-style-name="P15" draw:layer="layout" svg:width="0.016cm" svg:height="0.556cm" svg:x="17.329cm" svg:y="5.8cm" svg:viewBox="0 0 17 557" draw:points="0,0 17,0 17,557 0,557">
          <text:p/>
        </draw:polygon>
        <draw:frame draw:style-name="gr1" draw:text-style-name="P2" draw:layer="layout" svg:width="0.397cm" svg:height="0.442cm" svg:x="15.71cm" svg:y="5.78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611cm" svg:height="0.407cm" svg:x="2cm" svg:y="6.52cm">
          <draw:text-box>
            <text:p text:style-name="P1"><text:span text:style-name="T15">Table of Contents</text:span></text:p>
          </draw:text-box>
        </draw:frame>
        <draw:frame draw:style-name="gr1" draw:text-style-name="P2" draw:layer="layout" svg:width="0.397cm" svg:height="0.442cm" svg:x="4.614cm" svg:y="6.49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15.42cm" svg:y="6.52cm">
          <draw:text-box>
            <text:p text:style-name="P1"><text:span text:style-name="T15">iv</text:span></text:p>
          </draw:text-box>
        </draw:frame>
        <draw:polygon draw:style-name="gr15" draw:text-style-name="P15" draw:layer="layout" svg:width="0.017cm" svg:height="0.149cm" svg:x="1.792cm" svg:y="6.356cm" svg:viewBox="0 0 18 150" draw:points="0,0 18,0 18,150 0,150">
          <text:p/>
        </draw:polygon>
        <draw:polygon draw:style-name="gr15" draw:text-style-name="P15" draw:layer="layout" svg:width="11.967cm" svg:height="0.016cm" svg:x="1.809cm" svg:y="6.356cm" svg:viewBox="0 0 11968 17" draw:points="0,0 11968,0 11968,17 0,17">
          <text:p/>
        </draw:polygon>
        <draw:polygon draw:style-name="gr15" draw:text-style-name="P15" draw:layer="layout" svg:width="0.017cm" svg:height="0.149cm" svg:x="13.776cm" svg:y="6.356cm" svg:viewBox="0 0 18 150" draw:points="0,0 18,0 18,150 0,150">
          <text:p/>
        </draw:polygon>
        <draw:polygon draw:style-name="gr15" draw:text-style-name="P15" draw:layer="layout" svg:width="3.536cm" svg:height="0.016cm" svg:x="13.793cm" svg:y="6.356cm" svg:viewBox="0 0 3537 17" draw:points="0,0 3537,0 3537,17 0,17">
          <text:p/>
        </draw:polygon>
        <draw:polygon draw:style-name="gr15" draw:text-style-name="P15" draw:layer="layout" svg:width="0.016cm" svg:height="0.149cm" svg:x="17.329cm" svg:y="6.356cm" svg:viewBox="0 0 17 150" draw:points="0,0 17,0 17,150 0,150">
          <text:p/>
        </draw:polygon>
        <draw:polygon draw:style-name="gr15" draw:text-style-name="P15" draw:layer="layout" svg:width="0.017cm" svg:height="0.556cm" svg:x="1.792cm" svg:y="6.505cm" svg:viewBox="0 0 18 557" draw:points="0,0 18,0 18,557 0,557">
          <text:p/>
        </draw:polygon>
        <draw:polygon draw:style-name="gr15" draw:text-style-name="P15" draw:layer="layout" svg:width="0.017cm" svg:height="0.556cm" svg:x="13.776cm" svg:y="6.505cm" svg:viewBox="0 0 18 557" draw:points="0,0 18,0 18,557 0,557">
          <text:p/>
        </draw:polygon>
        <draw:polygon draw:style-name="gr15" draw:text-style-name="P15" draw:layer="layout" svg:width="0.016cm" svg:height="0.556cm" svg:x="17.329cm" svg:y="6.505cm" svg:viewBox="0 0 17 557" draw:points="0,0 17,0 17,557 0,557">
          <text:p/>
        </draw:polygon>
        <draw:frame draw:style-name="gr1" draw:text-style-name="P2" draw:layer="layout" svg:width="0.397cm" svg:height="0.442cm" svg:x="15.702cm" svg:y="6.49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146cm" svg:height="0.407cm" svg:x="2cm" svg:y="7.218cm">
          <draw:text-box>
            <text:p text:style-name="P1"><text:span text:style-name="T15">List of Figures</text:span></text:p>
          </draw:text-box>
        </draw:frame>
        <draw:frame draw:style-name="gr1" draw:text-style-name="P2" draw:layer="layout" svg:width="0.397cm" svg:height="0.442cm" svg:x="4.15cm" svg:y="7.18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15.47cm" svg:y="7.218cm">
          <draw:text-box>
            <text:p text:style-name="P1"><text:span text:style-name="T15">v</text:span></text:p>
          </draw:text-box>
        </draw:frame>
        <draw:polygon draw:style-name="gr15" draw:text-style-name="P15" draw:layer="layout" svg:width="0.017cm" svg:height="0.149cm" svg:x="1.792cm" svg:y="7.062cm" svg:viewBox="0 0 18 150" draw:points="0,0 18,0 18,150 0,150">
          <text:p/>
        </draw:polygon>
        <draw:polygon draw:style-name="gr15" draw:text-style-name="P15" draw:layer="layout" svg:width="11.967cm" svg:height="0.016cm" svg:x="1.809cm" svg:y="7.062cm" svg:viewBox="0 0 11968 17" draw:points="0,0 11968,0 11968,17 0,17">
          <text:p/>
        </draw:polygon>
        <draw:polygon draw:style-name="gr15" draw:text-style-name="P15" draw:layer="layout" svg:width="0.017cm" svg:height="0.149cm" svg:x="13.776cm" svg:y="7.062cm" svg:viewBox="0 0 18 150" draw:points="0,0 18,0 18,150 0,150">
          <text:p/>
        </draw:polygon>
        <draw:polygon draw:style-name="gr15" draw:text-style-name="P15" draw:layer="layout" svg:width="3.536cm" svg:height="0.016cm" svg:x="13.793cm" svg:y="7.062cm" svg:viewBox="0 0 3537 17" draw:points="0,0 3537,0 3537,17 0,17">
          <text:p/>
        </draw:polygon>
        <draw:polygon draw:style-name="gr15" draw:text-style-name="P15" draw:layer="layout" svg:width="0.016cm" svg:height="0.149cm" svg:x="17.329cm" svg:y="7.062cm" svg:viewBox="0 0 17 150" draw:points="0,0 17,0 17,150 0,150">
          <text:p/>
        </draw:polygon>
        <draw:polygon draw:style-name="gr15" draw:text-style-name="P15" draw:layer="layout" svg:width="0.017cm" svg:height="0.548cm" svg:x="1.792cm" svg:y="7.211cm" svg:viewBox="0 0 18 549" draw:points="0,0 18,0 18,549 0,549">
          <text:p/>
        </draw:polygon>
        <draw:polygon draw:style-name="gr15" draw:text-style-name="P15" draw:layer="layout" svg:width="0.017cm" svg:height="0.548cm" svg:x="13.776cm" svg:y="7.211cm" svg:viewBox="0 0 18 549" draw:points="0,0 18,0 18,549 0,549">
          <text:p/>
        </draw:polygon>
        <draw:polygon draw:style-name="gr15" draw:text-style-name="P15" draw:layer="layout" svg:width="0.016cm" svg:height="0.548cm" svg:x="17.329cm" svg:y="7.211cm" svg:viewBox="0 0 17 549" draw:points="0,0 17,0 17,549 0,549">
          <text:p/>
        </draw:polygon>
        <draw:frame draw:style-name="gr1" draw:text-style-name="P2" draw:layer="layout" svg:width="0.397cm" svg:height="0.442cm" svg:x="15.652cm" svg:y="7.18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024cm" svg:height="0.407cm" svg:x="2cm" svg:y="7.923cm">
          <draw:text-box>
            <text:p text:style-name="P1"><text:span text:style-name="T15">List of Tables</text:span></text:p>
          </draw:text-box>
        </draw:frame>
        <draw:frame draw:style-name="gr1" draw:text-style-name="P2" draw:layer="layout" svg:width="0.397cm" svg:height="0.442cm" svg:x="4.025cm" svg:y="7.89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15.42cm" svg:y="7.923cm">
          <draw:text-box>
            <text:p text:style-name="P1"><text:span text:style-name="T15">vi</text:span></text:p>
          </draw:text-box>
        </draw:frame>
        <draw:polygon draw:style-name="gr15" draw:text-style-name="P15" draw:layer="layout" svg:width="0.017cm" svg:height="0.149cm" svg:x="1.792cm" svg:y="7.759cm" svg:viewBox="0 0 18 150" draw:points="0,0 18,0 18,150 0,150">
          <text:p/>
        </draw:polygon>
        <draw:polygon draw:style-name="gr15" draw:text-style-name="P15" draw:layer="layout" svg:width="11.967cm" svg:height="0.016cm" svg:x="1.809cm" svg:y="7.759cm" svg:viewBox="0 0 11968 17" draw:points="0,0 11968,0 11968,17 0,17">
          <text:p/>
        </draw:polygon>
        <draw:polygon draw:style-name="gr15" draw:text-style-name="P15" draw:layer="layout" svg:width="0.017cm" svg:height="0.149cm" svg:x="13.776cm" svg:y="7.759cm" svg:viewBox="0 0 18 150" draw:points="0,0 18,0 18,150 0,150">
          <text:p/>
        </draw:polygon>
        <draw:polygon draw:style-name="gr15" draw:text-style-name="P15" draw:layer="layout" svg:width="3.536cm" svg:height="0.016cm" svg:x="13.793cm" svg:y="7.759cm" svg:viewBox="0 0 3537 17" draw:points="0,0 3537,0 3537,17 0,17">
          <text:p/>
        </draw:polygon>
        <draw:polygon draw:style-name="gr15" draw:text-style-name="P15" draw:layer="layout" svg:width="0.016cm" svg:height="0.149cm" svg:x="17.329cm" svg:y="7.759cm" svg:viewBox="0 0 17 150" draw:points="0,0 17,0 17,150 0,150">
          <text:p/>
        </draw:polygon>
        <draw:polygon draw:style-name="gr15" draw:text-style-name="P15" draw:layer="layout" svg:width="0.017cm" svg:height="0.556cm" svg:x="1.792cm" svg:y="7.908cm" svg:viewBox="0 0 18 557" draw:points="0,0 18,0 18,557 0,557">
          <text:p/>
        </draw:polygon>
        <draw:polygon draw:style-name="gr15" draw:text-style-name="P15" draw:layer="layout" svg:width="0.017cm" svg:height="0.556cm" svg:x="13.776cm" svg:y="7.908cm" svg:viewBox="0 0 18 557" draw:points="0,0 18,0 18,557 0,557">
          <text:p/>
        </draw:polygon>
        <draw:polygon draw:style-name="gr15" draw:text-style-name="P15" draw:layer="layout" svg:width="0.016cm" svg:height="0.556cm" svg:x="17.329cm" svg:y="7.908cm" svg:viewBox="0 0 17 557" draw:points="0,0 17,0 17,557 0,557">
          <text:p/>
        </draw:polygon>
        <draw:frame draw:style-name="gr1" draw:text-style-name="P2" draw:layer="layout" svg:width="0.397cm" svg:height="0.442cm" svg:x="15.702cm" svg:y="7.89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154cm" svg:height="0.407cm" svg:x="2cm" svg:y="8.645cm">
          <draw:text-box>
            <text:p text:style-name="P1"><text:span text:style-name="T15">Chapter</text:span></text:p>
          </draw:text-box>
        </draw:frame>
        <draw:frame draw:style-name="gr1" draw:text-style-name="P2" draw:layer="layout" svg:width="0.397cm" svg:height="0.442cm" svg:x="3.154cm" svg:y="8.616cm">
          <draw:text-box>
            <text:p text:style-name="P1"><text:span text:style-name="T1"><text:s/></text:span></text:p>
          </draw:text-box>
        </draw:frame>
        <draw:polygon draw:style-name="gr15" draw:text-style-name="P15" draw:layer="layout" svg:width="0.017cm" svg:height="0.149cm" svg:x="1.792cm" svg:y="8.464cm" svg:viewBox="0 0 18 150" draw:points="0,0 18,0 18,150 0,150">
          <text:p/>
        </draw:polygon>
        <draw:polygon draw:style-name="gr15" draw:text-style-name="P15" draw:layer="layout" svg:width="11.967cm" svg:height="0.016cm" svg:x="1.809cm" svg:y="8.464cm" svg:viewBox="0 0 11968 17" draw:points="0,0 11968,0 11968,17 0,17">
          <text:p/>
        </draw:polygon>
        <draw:polygon draw:style-name="gr15" draw:text-style-name="P15" draw:layer="layout" svg:width="0.017cm" svg:height="0.149cm" svg:x="13.776cm" svg:y="8.464cm" svg:viewBox="0 0 18 150" draw:points="0,0 18,0 18,150 0,150">
          <text:p/>
        </draw:polygon>
        <draw:polygon draw:style-name="gr15" draw:text-style-name="P15" draw:layer="layout" svg:width="3.536cm" svg:height="0.016cm" svg:x="13.793cm" svg:y="8.464cm" svg:viewBox="0 0 3537 17" draw:points="0,0 3537,0 3537,17 0,17">
          <text:p/>
        </draw:polygon>
        <draw:polygon draw:style-name="gr15" draw:text-style-name="P15" draw:layer="layout" svg:width="0.016cm" svg:height="0.149cm" svg:x="17.329cm" svg:y="8.464cm" svg:viewBox="0 0 17 150" draw:points="0,0 17,0 17,150 0,150">
          <text:p/>
        </draw:polygon>
        <draw:polygon draw:style-name="gr15" draw:text-style-name="P15" draw:layer="layout" svg:width="0.017cm" svg:height="0.589cm" svg:x="1.792cm" svg:y="8.613cm" svg:viewBox="0 0 18 590" draw:points="0,0 18,0 18,590 0,590">
          <text:p/>
        </draw:polygon>
        <draw:polygon draw:style-name="gr15" draw:text-style-name="P15" draw:layer="layout" svg:width="0.017cm" svg:height="0.589cm" svg:x="13.776cm" svg:y="8.613cm" svg:viewBox="0 0 18 590" draw:points="0,0 18,0 18,590 0,590">
          <text:p/>
        </draw:polygon>
        <draw:polygon draw:style-name="gr15" draw:text-style-name="P15" draw:layer="layout" svg:width="0.016cm" svg:height="0.589cm" svg:x="17.329cm" svg:y="8.613cm" svg:viewBox="0 0 17 590" draw:points="0,0 17,0 17,590 0,590">
          <text:p/>
        </draw:polygon>
        <draw:frame draw:style-name="gr1" draw:text-style-name="P2" draw:layer="layout" svg:width="0.397cm" svg:height="0.442cm" svg:x="13.984cm" svg:y="8.63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2cm" svg:y="9.367cm">
          <draw:text-box>
            <text:p text:style-name="P1"><text:span text:style-name="T15">1 </text:span></text:p>
          </draw:text-box>
        </draw:frame>
        <draw:frame draw:style-name="gr3" draw:text-style-name="P4" draw:layer="layout" svg:width="1.802cm" svg:height="0.407cm" svg:x="2.548cm" svg:y="9.367cm">
          <draw:text-box>
            <text:p text:style-name="P1"><text:span text:style-name="T15">Introduction</text:span></text:p>
          </draw:text-box>
        </draw:frame>
        <draw:frame draw:style-name="gr1" draw:text-style-name="P2" draw:layer="layout" svg:width="0.397cm" svg:height="0.442cm" svg:x="4.357cm" svg:y="9.337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6cm" svg:height="0.407cm" svg:x="15.379cm" svg:y="9.367cm">
          <draw:text-box>
            <text:p text:style-name="P1"><text:span text:style-name="T15">01</text:span></text:p>
          </draw:text-box>
        </draw:frame>
        <draw:polygon draw:style-name="gr15" draw:text-style-name="P15" draw:layer="layout" svg:width="0.017cm" svg:height="0.149cm" svg:x="1.792cm" svg:y="9.202cm" svg:viewBox="0 0 18 150" draw:points="0,0 18,0 18,150 0,150">
          <text:p/>
        </draw:polygon>
        <draw:polygon draw:style-name="gr15" draw:text-style-name="P15" draw:layer="layout" svg:width="11.967cm" svg:height="0.017cm" svg:x="1.809cm" svg:y="9.202cm" svg:viewBox="0 0 11968 18" draw:points="0,0 11968,0 11968,18 0,18">
          <text:p/>
        </draw:polygon>
        <draw:polygon draw:style-name="gr15" draw:text-style-name="P15" draw:layer="layout" svg:width="0.017cm" svg:height="0.149cm" svg:x="13.776cm" svg:y="9.202cm" svg:viewBox="0 0 18 150" draw:points="0,0 18,0 18,150 0,150">
          <text:p/>
        </draw:polygon>
        <draw:polygon draw:style-name="gr15" draw:text-style-name="P15" draw:layer="layout" svg:width="3.536cm" svg:height="0.017cm" svg:x="13.793cm" svg:y="9.202cm" svg:viewBox="0 0 3537 18" draw:points="0,0 3537,0 3537,18 0,18">
          <text:p/>
        </draw:polygon>
        <draw:polygon draw:style-name="gr15" draw:text-style-name="P15" draw:layer="layout" svg:width="0.016cm" svg:height="0.149cm" svg:x="17.329cm" svg:y="9.202cm" svg:viewBox="0 0 17 150" draw:points="0,0 17,0 17,150 0,150">
          <text:p/>
        </draw:polygon>
        <draw:polygon draw:style-name="gr15" draw:text-style-name="P15" draw:layer="layout" svg:width="0.017cm" svg:height="0.557cm" svg:x="1.792cm" svg:y="9.351cm" svg:viewBox="0 0 18 558" draw:points="0,0 18,0 18,558 0,558">
          <text:p/>
        </draw:polygon>
        <draw:polygon draw:style-name="gr15" draw:text-style-name="P15" draw:layer="layout" svg:width="0.017cm" svg:height="0.557cm" svg:x="13.776cm" svg:y="9.351cm" svg:viewBox="0 0 18 558" draw:points="0,0 18,0 18,558 0,558">
          <text:p/>
        </draw:polygon>
        <draw:polygon draw:style-name="gr15" draw:text-style-name="P15" draw:layer="layout" svg:width="0.016cm" svg:height="0.557cm" svg:x="17.329cm" svg:y="9.351cm" svg:viewBox="0 0 17 558" draw:points="0,0 17,0 17,558 0,558">
          <text:p/>
        </draw:polygon>
        <draw:frame draw:style-name="gr1" draw:text-style-name="P2" draw:layer="layout" svg:width="0.397cm" svg:height="0.442cm" svg:x="15.744cm" svg:y="9.337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2cm" svg:y="10.064cm">
          <draw:text-box>
            <text:p text:style-name="P1"><text:span text:style-name="T15">2 </text:span></text:p>
          </draw:text-box>
        </draw:frame>
        <draw:frame draw:style-name="gr3" draw:text-style-name="P4" draw:layer="layout" svg:width="3.035cm" svg:height="0.407cm" svg:x="2.548cm" svg:y="10.064cm">
          <draw:text-box>
            <text:p text:style-name="P1"><text:span text:style-name="T15">Review of Literature</text:span></text:p>
          </draw:text-box>
        </draw:frame>
        <draw:frame draw:style-name="gr1" draw:text-style-name="P2" draw:layer="layout" svg:width="0.397cm" svg:height="0.442cm" svg:x="5.594cm" svg:y="10.035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851cm" svg:height="0.407cm" svg:x="15.13cm" svg:y="10.064cm">
          <draw:text-box>
            <text:p text:style-name="P1"><text:span text:style-name="T15">02-03</text:span></text:p>
          </draw:text-box>
        </draw:frame>
        <draw:polygon draw:style-name="gr15" draw:text-style-name="P15" draw:layer="layout" svg:width="0.017cm" svg:height="0.149cm" svg:x="1.792cm" svg:y="9.908cm" svg:viewBox="0 0 18 150" draw:points="0,0 18,0 18,150 0,150">
          <text:p/>
        </draw:polygon>
        <draw:polygon draw:style-name="gr15" draw:text-style-name="P15" draw:layer="layout" svg:width="11.967cm" svg:height="0.017cm" svg:x="1.809cm" svg:y="9.908cm" svg:viewBox="0 0 11968 18" draw:points="0,0 11968,0 11968,18 0,18">
          <text:p/>
        </draw:polygon>
        <draw:polygon draw:style-name="gr15" draw:text-style-name="P15" draw:layer="layout" svg:width="0.017cm" svg:height="0.149cm" svg:x="13.776cm" svg:y="9.908cm" svg:viewBox="0 0 18 150" draw:points="0,0 18,0 18,150 0,150">
          <text:p/>
        </draw:polygon>
        <draw:polygon draw:style-name="gr15" draw:text-style-name="P15" draw:layer="layout" svg:width="3.536cm" svg:height="0.017cm" svg:x="13.793cm" svg:y="9.908cm" svg:viewBox="0 0 3537 18" draw:points="0,0 3537,0 3537,18 0,18">
          <text:p/>
        </draw:polygon>
        <draw:polygon draw:style-name="gr15" draw:text-style-name="P15" draw:layer="layout" svg:width="0.016cm" svg:height="0.149cm" svg:x="17.329cm" svg:y="9.908cm" svg:viewBox="0 0 17 150" draw:points="0,0 17,0 17,150 0,150">
          <text:p/>
        </draw:polygon>
        <draw:polygon draw:style-name="gr15" draw:text-style-name="P15" draw:layer="layout" svg:width="0.017cm" svg:height="0.548cm" svg:x="1.792cm" svg:y="10.057cm" svg:viewBox="0 0 18 549" draw:points="0,0 18,0 18,549 0,549">
          <text:p/>
        </draw:polygon>
        <draw:polygon draw:style-name="gr15" draw:text-style-name="P15" draw:layer="layout" svg:width="0.017cm" svg:height="0.548cm" svg:x="13.776cm" svg:y="10.057cm" svg:viewBox="0 0 18 549" draw:points="0,0 18,0 18,549 0,549">
          <text:p/>
        </draw:polygon>
        <draw:polygon draw:style-name="gr15" draw:text-style-name="P15" draw:layer="layout" svg:width="0.016cm" svg:height="0.548cm" svg:x="17.329cm" svg:y="10.057cm" svg:viewBox="0 0 17 549" draw:points="0,0 17,0 17,549 0,549">
          <text:p/>
        </draw:polygon>
        <draw:frame draw:style-name="gr1" draw:text-style-name="P2" draw:layer="layout" svg:width="0.397cm" svg:height="0.442cm" svg:x="15.984cm" svg:y="10.035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2cm" svg:y="10.769cm">
          <draw:text-box>
            <text:p text:style-name="P1"><text:span text:style-name="T15">3 </text:span></text:p>
          </draw:text-box>
        </draw:frame>
        <draw:frame draw:style-name="gr3" draw:text-style-name="P4" draw:layer="layout" svg:width="1.964cm" svg:height="0.407cm" svg:x="2.548cm" svg:y="10.769cm">
          <draw:text-box>
            <text:p text:style-name="P1"><text:span text:style-name="T15">Methodology</text:span></text:p>
          </draw:text-box>
        </draw:frame>
        <draw:frame draw:style-name="gr1" draw:text-style-name="P2" draw:layer="layout" svg:width="0.397cm" svg:height="0.442cm" svg:x="4.515cm" svg:y="10.7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033cm" svg:height="0.407cm" svg:x="15.038cm" svg:y="10.769cm">
          <draw:text-box>
            <text:p text:style-name="P1"><text:span text:style-name="T15">04 - 05</text:span></text:p>
          </draw:text-box>
        </draw:frame>
        <draw:polygon draw:style-name="gr15" draw:text-style-name="P15" draw:layer="layout" svg:width="0.017cm" svg:height="0.149cm" svg:x="1.792cm" svg:y="10.605cm" svg:viewBox="0 0 18 150" draw:points="0,0 18,0 18,150 0,150">
          <text:p/>
        </draw:polygon>
        <draw:polygon draw:style-name="gr15" draw:text-style-name="P15" draw:layer="layout" svg:width="11.967cm" svg:height="0.016cm" svg:x="1.809cm" svg:y="10.605cm" svg:viewBox="0 0 11968 17" draw:points="0,0 11968,0 11968,17 0,17">
          <text:p/>
        </draw:polygon>
        <draw:polygon draw:style-name="gr15" draw:text-style-name="P15" draw:layer="layout" svg:width="0.017cm" svg:height="0.149cm" svg:x="13.776cm" svg:y="10.605cm" svg:viewBox="0 0 18 150" draw:points="0,0 18,0 18,150 0,150">
          <text:p/>
        </draw:polygon>
        <draw:polygon draw:style-name="gr15" draw:text-style-name="P15" draw:layer="layout" svg:width="3.536cm" svg:height="0.016cm" svg:x="13.793cm" svg:y="10.605cm" svg:viewBox="0 0 3537 17" draw:points="0,0 3537,0 3537,17 0,17">
          <text:p/>
        </draw:polygon>
        <draw:polygon draw:style-name="gr15" draw:text-style-name="P15" draw:layer="layout" svg:width="0.016cm" svg:height="0.149cm" svg:x="17.329cm" svg:y="10.605cm" svg:viewBox="0 0 17 150" draw:points="0,0 17,0 17,150 0,150">
          <text:p/>
        </draw:polygon>
        <draw:polygon draw:style-name="gr15" draw:text-style-name="P15" draw:layer="layout" svg:width="0.017cm" svg:height="0.556cm" svg:x="1.792cm" svg:y="10.754cm" svg:viewBox="0 0 18 557" draw:points="0,0 18,0 18,557 0,557">
          <text:p/>
        </draw:polygon>
        <draw:polygon draw:style-name="gr15" draw:text-style-name="P15" draw:layer="layout" svg:width="0.017cm" svg:height="0.556cm" svg:x="13.776cm" svg:y="10.754cm" svg:viewBox="0 0 18 557" draw:points="0,0 18,0 18,557 0,557">
          <text:p/>
        </draw:polygon>
        <draw:polygon draw:style-name="gr15" draw:text-style-name="P15" draw:layer="layout" svg:width="0.016cm" svg:height="0.556cm" svg:x="17.329cm" svg:y="10.754cm" svg:viewBox="0 0 17 557" draw:points="0,0 17,0 17,557 0,557">
          <text:p/>
        </draw:polygon>
        <draw:frame draw:style-name="gr1" draw:text-style-name="P2" draw:layer="layout" svg:width="0.397cm" svg:height="0.442cm" svg:x="16.075cm" svg:y="10.7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2cm" svg:y="11.466cm">
          <draw:text-box>
            <text:p text:style-name="P1"><text:span text:style-name="T15">4 </text:span></text:p>
          </draw:text-box>
        </draw:frame>
        <draw:frame draw:style-name="gr3" draw:text-style-name="P4" draw:layer="layout" svg:width="2.56cm" svg:height="0.407cm" svg:x="2.548cm" svg:y="11.466cm">
          <draw:text-box>
            <text:p text:style-name="P1"><text:span text:style-name="T15">Project Overview</text:span></text:p>
          </draw:text-box>
        </draw:frame>
        <draw:frame draw:style-name="gr1" draw:text-style-name="P2" draw:layer="layout" svg:width="0.397cm" svg:height="0.442cm" svg:x="5.113cm" svg:y="11.437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033cm" svg:height="0.407cm" svg:x="15.038cm" svg:y="11.466cm">
          <draw:text-box>
            <text:p text:style-name="P1"><text:span text:style-name="T15">06 - 07</text:span></text:p>
          </draw:text-box>
        </draw:frame>
        <draw:polygon draw:style-name="gr15" draw:text-style-name="P15" draw:layer="layout" svg:width="0.017cm" svg:height="0.149cm" svg:x="1.792cm" svg:y="11.31cm" svg:viewBox="0 0 18 150" draw:points="0,0 18,0 18,150 0,150">
          <text:p/>
        </draw:polygon>
        <draw:polygon draw:style-name="gr15" draw:text-style-name="P15" draw:layer="layout" svg:width="11.967cm" svg:height="0.016cm" svg:x="1.809cm" svg:y="11.31cm" svg:viewBox="0 0 11968 17" draw:points="0,0 11968,0 11968,17 0,17">
          <text:p/>
        </draw:polygon>
        <draw:polygon draw:style-name="gr15" draw:text-style-name="P15" draw:layer="layout" svg:width="0.017cm" svg:height="0.149cm" svg:x="13.776cm" svg:y="11.31cm" svg:viewBox="0 0 18 150" draw:points="0,0 18,0 18,150 0,150">
          <text:p/>
        </draw:polygon>
        <draw:polygon draw:style-name="gr15" draw:text-style-name="P15" draw:layer="layout" svg:width="3.536cm" svg:height="0.016cm" svg:x="13.793cm" svg:y="11.31cm" svg:viewBox="0 0 3537 17" draw:points="0,0 3537,0 3537,17 0,17">
          <text:p/>
        </draw:polygon>
        <draw:polygon draw:style-name="gr15" draw:text-style-name="P15" draw:layer="layout" svg:width="0.016cm" svg:height="0.149cm" svg:x="17.329cm" svg:y="11.31cm" svg:viewBox="0 0 17 150" draw:points="0,0 17,0 17,150 0,150">
          <text:p/>
        </draw:polygon>
        <draw:polygon draw:style-name="gr15" draw:text-style-name="P15" draw:layer="layout" svg:width="0.017cm" svg:height="0.548cm" svg:x="1.792cm" svg:y="11.459cm" svg:viewBox="0 0 18 549" draw:points="0,0 18,0 18,549 0,549">
          <text:p/>
        </draw:polygon>
        <draw:polygon draw:style-name="gr15" draw:text-style-name="P15" draw:layer="layout" svg:width="0.017cm" svg:height="0.548cm" svg:x="13.776cm" svg:y="11.459cm" svg:viewBox="0 0 18 549" draw:points="0,0 18,0 18,549 0,549">
          <text:p/>
        </draw:polygon>
        <draw:polygon draw:style-name="gr15" draw:text-style-name="P15" draw:layer="layout" svg:width="0.016cm" svg:height="0.548cm" svg:x="17.329cm" svg:y="11.459cm" svg:viewBox="0 0 17 549" draw:points="0,0 17,0 17,549 0,549">
          <text:p/>
        </draw:polygon>
        <draw:frame draw:style-name="gr1" draw:text-style-name="P2" draw:layer="layout" svg:width="0.397cm" svg:height="0.442cm" svg:x="16.075cm" svg:y="11.437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2cm" svg:y="12.171cm">
          <draw:text-box>
            <text:p text:style-name="P1"><text:span text:style-name="T15">5 </text:span></text:p>
          </draw:text-box>
        </draw:frame>
        <draw:frame draw:style-name="gr3" draw:text-style-name="P4" draw:layer="layout" svg:width="3.137cm" svg:height="0.407cm" svg:x="2.548cm" svg:y="12.171cm">
          <draw:text-box>
            <text:p text:style-name="P1"><text:span text:style-name="T15">Results &amp; Discussion</text:span></text:p>
          </draw:text-box>
        </draw:frame>
        <draw:frame draw:style-name="gr1" draw:text-style-name="P2" draw:layer="layout" svg:width="0.397cm" svg:height="0.442cm" svg:x="5.694cm" svg:y="12.14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6cm" svg:height="0.407cm" svg:x="15.379cm" svg:y="12.171cm">
          <draw:text-box>
            <text:p text:style-name="P1"><text:span text:style-name="T15">08</text:span></text:p>
          </draw:text-box>
        </draw:frame>
        <draw:polygon draw:style-name="gr15" draw:text-style-name="P15" draw:layer="layout" svg:width="0.017cm" svg:height="0.149cm" svg:x="1.792cm" svg:y="12.007cm" svg:viewBox="0 0 18 150" draw:points="0,0 18,0 18,150 0,150">
          <text:p/>
        </draw:polygon>
        <draw:polygon draw:style-name="gr15" draw:text-style-name="P15" draw:layer="layout" svg:width="11.967cm" svg:height="0.016cm" svg:x="1.809cm" svg:y="12.007cm" svg:viewBox="0 0 11968 17" draw:points="0,0 11968,0 11968,17 0,17">
          <text:p/>
        </draw:polygon>
        <draw:polygon draw:style-name="gr15" draw:text-style-name="P15" draw:layer="layout" svg:width="0.017cm" svg:height="0.149cm" svg:x="13.776cm" svg:y="12.007cm" svg:viewBox="0 0 18 150" draw:points="0,0 18,0 18,150 0,150">
          <text:p/>
        </draw:polygon>
        <draw:polygon draw:style-name="gr15" draw:text-style-name="P15" draw:layer="layout" svg:width="3.536cm" svg:height="0.016cm" svg:x="13.793cm" svg:y="12.007cm" svg:viewBox="0 0 3537 17" draw:points="0,0 3537,0 3537,17 0,17">
          <text:p/>
        </draw:polygon>
        <draw:polygon draw:style-name="gr15" draw:text-style-name="P15" draw:layer="layout" svg:width="0.016cm" svg:height="0.149cm" svg:x="17.329cm" svg:y="12.007cm" svg:viewBox="0 0 17 150" draw:points="0,0 17,0 17,150 0,150">
          <text:p/>
        </draw:polygon>
        <draw:polygon draw:style-name="gr15" draw:text-style-name="P15" draw:layer="layout" svg:width="0.017cm" svg:height="0.556cm" svg:x="1.792cm" svg:y="12.156cm" svg:viewBox="0 0 18 557" draw:points="0,0 18,0 18,557 0,557">
          <text:p/>
        </draw:polygon>
        <draw:polygon draw:style-name="gr15" draw:text-style-name="P15" draw:layer="layout" svg:width="0.017cm" svg:height="0.556cm" svg:x="13.776cm" svg:y="12.156cm" svg:viewBox="0 0 18 557" draw:points="0,0 18,0 18,557 0,557">
          <text:p/>
        </draw:polygon>
        <draw:polygon draw:style-name="gr15" draw:text-style-name="P15" draw:layer="layout" svg:width="0.016cm" svg:height="0.556cm" svg:x="17.329cm" svg:y="12.156cm" svg:viewBox="0 0 17 557" draw:points="0,0 17,0 17,557 0,557">
          <text:p/>
        </draw:polygon>
        <draw:frame draw:style-name="gr1" draw:text-style-name="P2" draw:layer="layout" svg:width="0.397cm" svg:height="0.442cm" svg:x="15.744cm" svg:y="12.14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2cm" svg:y="12.877cm">
          <draw:text-box>
            <text:p text:style-name="P1"><text:span text:style-name="T15">6 </text:span></text:p>
          </draw:text-box>
        </draw:frame>
        <draw:frame draw:style-name="gr3" draw:text-style-name="P4" draw:layer="layout" svg:width="5.735cm" svg:height="0.407cm" svg:x="2.548cm" svg:y="12.877cm">
          <draw:text-box>
            <text:p text:style-name="P1"><text:span text:style-name="T15">Conclusion and Scope for Future Work</text:span></text:p>
          </draw:text-box>
        </draw:frame>
        <draw:frame draw:style-name="gr1" draw:text-style-name="P2" draw:layer="layout" svg:width="0.397cm" svg:height="0.442cm" svg:x="8.299cm" svg:y="12.84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6cm" svg:height="0.407cm" svg:x="15.379cm" svg:y="12.877cm">
          <draw:text-box>
            <text:p text:style-name="P1"><text:span text:style-name="T15">09</text:span></text:p>
          </draw:text-box>
        </draw:frame>
        <draw:polygon draw:style-name="gr15" draw:text-style-name="P15" draw:layer="layout" svg:width="0.017cm" svg:height="0.15cm" svg:x="1.792cm" svg:y="12.712cm" svg:viewBox="0 0 18 151" draw:points="0,0 18,0 18,151 0,151">
          <text:p/>
        </draw:polygon>
        <draw:polygon draw:style-name="gr15" draw:text-style-name="P15" draw:layer="layout" svg:width="11.967cm" svg:height="0.017cm" svg:x="1.809cm" svg:y="12.712cm" svg:viewBox="0 0 11968 18" draw:points="0,0 11968,0 11968,18 0,18">
          <text:p/>
        </draw:polygon>
        <draw:polygon draw:style-name="gr15" draw:text-style-name="P15" draw:layer="layout" svg:width="0.017cm" svg:height="0.15cm" svg:x="13.776cm" svg:y="12.712cm" svg:viewBox="0 0 18 151" draw:points="0,0 18,0 18,151 0,151">
          <text:p/>
        </draw:polygon>
        <draw:polygon draw:style-name="gr15" draw:text-style-name="P15" draw:layer="layout" svg:width="3.536cm" svg:height="0.017cm" svg:x="13.793cm" svg:y="12.712cm" svg:viewBox="0 0 3537 18" draw:points="0,0 3537,0 3537,18 0,18">
          <text:p/>
        </draw:polygon>
        <draw:polygon draw:style-name="gr15" draw:text-style-name="P15" draw:layer="layout" svg:width="0.016cm" svg:height="0.15cm" svg:x="17.329cm" svg:y="12.712cm" svg:viewBox="0 0 17 151" draw:points="0,0 17,0 17,151 0,151">
          <text:p/>
        </draw:polygon>
        <draw:polygon draw:style-name="gr15" draw:text-style-name="P15" draw:layer="layout" svg:width="0.017cm" svg:height="0.556cm" svg:x="1.792cm" svg:y="12.862cm" svg:viewBox="0 0 18 557" draw:points="0,0 18,0 18,557 0,557">
          <text:p/>
        </draw:polygon>
        <draw:polygon draw:style-name="gr15" draw:text-style-name="P15" draw:layer="layout" svg:width="0.017cm" svg:height="0.556cm" svg:x="13.776cm" svg:y="12.862cm" svg:viewBox="0 0 18 557" draw:points="0,0 18,0 18,557 0,557">
          <text:p/>
        </draw:polygon>
        <draw:polygon draw:style-name="gr15" draw:text-style-name="P15" draw:layer="layout" svg:width="0.016cm" svg:height="0.556cm" svg:x="17.329cm" svg:y="12.862cm" svg:viewBox="0 0 17 557" draw:points="0,0 17,0 17,557 0,557">
          <text:p/>
        </draw:polygon>
        <draw:frame draw:style-name="gr1" draw:text-style-name="P2" draw:layer="layout" svg:width="0.397cm" svg:height="0.442cm" svg:x="15.744cm" svg:y="12.84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2cm" svg:y="13.591cm">
          <draw:text-box>
            <text:p text:style-name="P1"><text:span text:style-name="T15">7 </text:span></text:p>
          </draw:text-box>
        </draw:frame>
        <draw:frame draw:style-name="gr3" draw:text-style-name="P4" draw:layer="layout" svg:width="1.619cm" svg:height="0.407cm" svg:x="2.548cm" svg:y="13.591cm">
          <draw:text-box>
            <text:p text:style-name="P1"><text:span text:style-name="T15">References</text:span></text:p>
          </draw:text-box>
        </draw:frame>
        <draw:frame draw:style-name="gr1" draw:text-style-name="P2" draw:layer="layout" svg:width="0.397cm" svg:height="0.442cm" svg:x="4.166cm" svg:y="13.561cm">
          <draw:text-box>
            <text:p text:style-name="P1"><text:span text:style-name="T1"><text:s/></text:span></text:p>
          </draw:text-box>
        </draw:frame>
        <draw:polygon draw:style-name="gr15" draw:text-style-name="P15" draw:layer="layout" svg:width="0.017cm" svg:height="0.149cm" svg:x="1.792cm" svg:y="13.418cm" svg:viewBox="0 0 18 150" draw:points="0,0 18,0 18,150 0,150">
          <text:p/>
        </draw:polygon>
        <draw:polygon draw:style-name="gr15" draw:text-style-name="P15" draw:layer="layout" svg:width="11.967cm" svg:height="0.016cm" svg:x="1.809cm" svg:y="13.418cm" svg:viewBox="0 0 11968 17" draw:points="0,0 11968,0 11968,17 0,17">
          <text:p/>
        </draw:polygon>
        <draw:polygon draw:style-name="gr15" draw:text-style-name="P15" draw:layer="layout" svg:width="0.017cm" svg:height="0.149cm" svg:x="13.776cm" svg:y="13.418cm" svg:viewBox="0 0 18 150" draw:points="0,0 18,0 18,150 0,150">
          <text:p/>
        </draw:polygon>
        <draw:polygon draw:style-name="gr15" draw:text-style-name="P15" draw:layer="layout" svg:width="3.536cm" svg:height="0.016cm" svg:x="13.793cm" svg:y="13.418cm" svg:viewBox="0 0 3537 17" draw:points="0,0 3537,0 3537,17 0,17">
          <text:p/>
        </draw:polygon>
        <draw:polygon draw:style-name="gr15" draw:text-style-name="P15" draw:layer="layout" svg:width="0.016cm" svg:height="0.149cm" svg:x="17.329cm" svg:y="13.418cm" svg:viewBox="0 0 17 150" draw:points="0,0 17,0 17,150 0,150">
          <text:p/>
        </draw:polygon>
        <draw:polygon draw:style-name="gr15" draw:text-style-name="P15" draw:layer="layout" svg:width="0.017cm" svg:height="0.589cm" svg:x="1.792cm" svg:y="13.567cm" svg:viewBox="0 0 18 590" draw:points="0,0 18,0 18,590 0,590">
          <text:p/>
        </draw:polygon>
        <draw:polygon draw:style-name="gr15" draw:text-style-name="P15" draw:layer="layout" svg:width="0.017cm" svg:height="0.017cm" svg:x="1.792cm" svg:y="14.156cm" svg:viewBox="0 0 18 18" draw:points="0,0 18,0 18,18 0,18">
          <text:p/>
        </draw:polygon>
        <draw:polygon draw:style-name="gr15" draw:text-style-name="P15" draw:layer="layout" svg:width="0.017cm" svg:height="0.017cm" svg:x="1.792cm" svg:y="14.156cm" svg:viewBox="0 0 18 18" draw:points="0,0 18,0 18,18 0,18">
          <text:p/>
        </draw:polygon>
        <draw:polygon draw:style-name="gr15" draw:text-style-name="P15" draw:layer="layout" svg:width="11.967cm" svg:height="0.017cm" svg:x="1.809cm" svg:y="14.156cm" svg:viewBox="0 0 11968 18" draw:points="0,0 11968,0 11968,18 0,18">
          <text:p/>
        </draw:polygon>
        <draw:polygon draw:style-name="gr15" draw:text-style-name="P15" draw:layer="layout" svg:width="0.017cm" svg:height="0.589cm" svg:x="13.776cm" svg:y="13.567cm" svg:viewBox="0 0 18 590" draw:points="0,0 18,0 18,590 0,590">
          <text:p/>
        </draw:polygon>
        <draw:polygon draw:style-name="gr15" draw:text-style-name="P15" draw:layer="layout" svg:width="0.017cm" svg:height="0.017cm" svg:x="13.776cm" svg:y="14.156cm" svg:viewBox="0 0 18 18" draw:points="0,0 18,0 18,18 0,18">
          <text:p/>
        </draw:polygon>
        <draw:polygon draw:style-name="gr15" draw:text-style-name="P15" draw:layer="layout" svg:width="3.536cm" svg:height="0.017cm" svg:x="13.793cm" svg:y="14.156cm" svg:viewBox="0 0 3537 18" draw:points="0,0 3537,0 3537,18 0,18">
          <text:p/>
        </draw:polygon>
        <draw:polygon draw:style-name="gr15" draw:text-style-name="P15" draw:layer="layout" svg:width="0.016cm" svg:height="0.589cm" svg:x="17.329cm" svg:y="13.567cm" svg:viewBox="0 0 17 590" draw:points="0,0 17,0 17,590 0,590">
          <text:p/>
        </draw:polygon>
        <draw:polygon draw:style-name="gr15" draw:text-style-name="P15" draw:layer="layout" svg:width="0.016cm" svg:height="0.017cm" svg:x="17.329cm" svg:y="14.156cm" svg:viewBox="0 0 17 18" draw:points="0,0 17,0 17,18 0,18">
          <text:p/>
        </draw:polygon>
        <draw:polygon draw:style-name="gr15" draw:text-style-name="P15" draw:layer="layout" svg:width="0.016cm" svg:height="0.017cm" svg:x="17.329cm" svg:y="14.156cm" svg:viewBox="0 0 17 18" draw:points="0,0 17,0 17,18 0,18">
          <text:p/>
        </draw:polygon>
        <draw:frame draw:style-name="gr1" draw:text-style-name="P2" draw:layer="layout" svg:width="0.499cm" svg:height="0.442cm" svg:x="15.362cm" svg:y="13.586cm">
          <draw:text-box>
            <text:p text:style-name="P1"><text:span text:style-name="T1">10 </text:span></text:p>
          </draw:text-box>
        </draw:frame>
        <draw:frame draw:style-name="gr11" draw:text-style-name="P10" draw:layer="layout" svg:width="1.666cm" svg:height="1.741cm" svg:x="1.792cm" svg:y="0.856cm">
          <draw:image xlink:href="Pictures/10000001000000B2000000BAA7368BDF.png" xlink:type="simple" xlink:show="embed" xlink:actuate="onLoad" draw:mime-type="image/png">
            <text:p/>
          </draw:image>
        </draw:frame>
        <draw:frame draw:style-name="gr1" draw:text-style-name="P2" draw:layer="layout" svg:width="0.397cm" svg:height="0.442cm" svg:x="1.793cm" svg:y="14.192cm">
          <draw:text-box>
            <text:p text:style-name="P1"><text:span text:style-name="T1"><text:s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397cm" svg:height="0.442cm" svg:x="9.777cm" svg:y="26.332cm">
          <draw:text-box>
            <text:p text:style-name="P1"><text:span text:style-name="T8">v </text:span></text:p>
          </draw:text-box>
        </draw:frame>
        <draw:frame draw:style-name="gr1" draw:text-style-name="P2" draw:layer="layout" svg:width="0.397cm" svg:height="0.442cm" svg:x="1.793cm" svg:y="1.811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4.013cm" svg:height="0.518cm" svg:x="7.876cm" svg:y="2.433cm">
          <draw:text-box>
            <text:p text:style-name="P1"><text:span text:style-name="T16">LIST OF FIGURES</text:span></text:p>
          </draw:text-box>
        </draw:frame>
        <draw:frame draw:style-name="gr1" draw:text-style-name="P2" draw:layer="layout" svg:width="0.397cm" svg:height="0.442cm" svg:x="11.876cm" svg:y="2.49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024cm" svg:height="0.407cm" svg:x="2.365cm" svg:y="3.707cm">
          <draw:text-box>
            <text:p text:style-name="P1"><text:span text:style-name="T14">Sl. No.</text:span></text:p>
          </draw:text-box>
        </draw:frame>
        <draw:frame draw:style-name="gr1" draw:text-style-name="P2" draw:layer="layout" svg:width="0.397cm" svg:height="0.442cm" svg:x="3.386cm" svg:y="3.67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802cm" svg:height="0.407cm" svg:x="8.299cm" svg:y="3.707cm">
          <draw:text-box>
            <text:p text:style-name="P1"><text:span text:style-name="T14">Description</text:span></text:p>
          </draw:text-box>
        </draw:frame>
        <draw:frame draw:style-name="gr1" draw:text-style-name="P2" draw:layer="layout" svg:width="0.397cm" svg:height="0.442cm" svg:x="10.109cm" svg:y="3.67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377cm" svg:height="0.407cm" svg:x="15.204cm" svg:y="3.707cm">
          <draw:text-box>
            <text:p text:style-name="P1"><text:span text:style-name="T14">Page No.</text:span></text:p>
          </draw:text-box>
        </draw:frame>
        <draw:polygon draw:style-name="gr15" draw:text-style-name="P15" draw:layer="layout" svg:width="0.017cm" svg:height="0.149cm" svg:x="1.792cm" svg:y="3.551cm" svg:viewBox="0 0 18 150" draw:points="0,0 18,0 18,150 0,150">
          <text:p/>
        </draw:polygon>
        <draw:polygon draw:style-name="gr15" draw:text-style-name="P15" draw:layer="layout" svg:width="0.017cm" svg:height="0.017cm" svg:x="1.792cm" svg:y="3.551cm" svg:viewBox="0 0 18 18" draw:points="0,0 18,0 18,18 0,18">
          <text:p/>
        </draw:polygon>
        <draw:polygon draw:style-name="gr15" draw:text-style-name="P15" draw:layer="layout" svg:width="2.141cm" svg:height="0.017cm" svg:x="1.809cm" svg:y="3.551cm" svg:viewBox="0 0 2142 18" draw:points="0,0 2142,0 2142,18 0,18">
          <text:p/>
        </draw:polygon>
        <draw:polygon draw:style-name="gr15" draw:text-style-name="P15" draw:layer="layout" svg:width="0.017cm" svg:height="0.132cm" svg:x="3.95cm" svg:y="3.568cm" svg:viewBox="0 0 18 133" draw:points="0,0 18,0 18,133 0,133">
          <text:p/>
        </draw:polygon>
        <draw:polygon draw:style-name="gr15" draw:text-style-name="P15" draw:layer="layout" svg:width="0.017cm" svg:height="0.017cm" svg:x="3.95cm" svg:y="3.551cm" svg:viewBox="0 0 18 18" draw:points="0,0 18,0 18,18 0,18">
          <text:p/>
        </draw:polygon>
        <draw:polygon draw:style-name="gr15" draw:text-style-name="P15" draw:layer="layout" svg:width="10.473cm" svg:height="0.017cm" svg:x="3.967cm" svg:y="3.551cm" svg:viewBox="0 0 10474 18" draw:points="0,0 10474,0 10474,18 0,18">
          <text:p/>
        </draw:polygon>
        <draw:polygon draw:style-name="gr15" draw:text-style-name="P15" draw:layer="layout" svg:width="0.017cm" svg:height="0.132cm" svg:x="14.44cm" svg:y="3.568cm" svg:viewBox="0 0 18 133" draw:points="0,0 18,0 18,133 0,133">
          <text:p/>
        </draw:polygon>
        <draw:polygon draw:style-name="gr15" draw:text-style-name="P15" draw:layer="layout" svg:width="0.017cm" svg:height="0.017cm" svg:x="14.44cm" svg:y="3.551cm" svg:viewBox="0 0 18 18" draw:points="0,0 18,0 18,18 0,18">
          <text:p/>
        </draw:polygon>
        <draw:polygon draw:style-name="gr15" draw:text-style-name="P15" draw:layer="layout" svg:width="2.872cm" svg:height="0.017cm" svg:x="14.457cm" svg:y="3.551cm" svg:viewBox="0 0 2873 18" draw:points="0,0 2873,0 2873,18 0,18">
          <text:p/>
        </draw:polygon>
        <draw:polygon draw:style-name="gr15" draw:text-style-name="P15" draw:layer="layout" svg:width="0.016cm" svg:height="0.149cm" svg:x="17.329cm" svg:y="3.551cm" svg:viewBox="0 0 17 150" draw:points="0,0 17,0 17,150 0,150">
          <text:p/>
        </draw:polygon>
        <draw:polygon draw:style-name="gr15" draw:text-style-name="P15" draw:layer="layout" svg:width="0.016cm" svg:height="0.017cm" svg:x="17.329cm" svg:y="3.551cm" svg:viewBox="0 0 17 18" draw:points="0,0 17,0 17,18 0,18">
          <text:p/>
        </draw:polygon>
        <draw:polygon draw:style-name="gr15" draw:text-style-name="P15" draw:layer="layout" svg:width="0.017cm" svg:height="0.549cm" svg:x="1.792cm" svg:y="3.7cm" svg:viewBox="0 0 18 550" draw:points="0,0 18,0 18,550 0,550">
          <text:p/>
        </draw:polygon>
        <draw:polygon draw:style-name="gr15" draw:text-style-name="P15" draw:layer="layout" svg:width="0.017cm" svg:height="0.549cm" svg:x="3.95cm" svg:y="3.7cm" svg:viewBox="0 0 18 550" draw:points="0,0 18,0 18,550 0,550">
          <text:p/>
        </draw:polygon>
        <draw:polygon draw:style-name="gr15" draw:text-style-name="P15" draw:layer="layout" svg:width="0.017cm" svg:height="0.549cm" svg:x="14.44cm" svg:y="3.7cm" svg:viewBox="0 0 18 550" draw:points="0,0 18,0 18,550 0,550">
          <text:p/>
        </draw:polygon>
        <draw:polygon draw:style-name="gr15" draw:text-style-name="P15" draw:layer="layout" svg:width="0.016cm" svg:height="0.549cm" svg:x="17.329cm" svg:y="3.7cm" svg:viewBox="0 0 17 550" draw:points="0,0 17,0 17,550 0,550">
          <text:p/>
        </draw:polygon>
        <draw:frame draw:style-name="gr1" draw:text-style-name="P2" draw:layer="layout" svg:width="0.397cm" svg:height="0.442cm" svg:x="16.582cm" svg:y="3.67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2.788cm" svg:y="4.413cm">
          <draw:text-box>
            <text:p text:style-name="P1"><text:span text:style-name="T15">1</text:span></text:p>
          </draw:text-box>
        </draw:frame>
        <draw:frame draw:style-name="gr1" draw:text-style-name="P2" draw:layer="layout" svg:width="0.397cm" svg:height="0.442cm" svg:x="2.972cm" svg:y="4.38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43cm" svg:height="0.407cm" svg:x="4.158cm" svg:y="4.413cm">
          <draw:text-box>
            <text:p text:style-name="P1"><text:span text:style-name="T15">Currency Classifier Workflow</text:span></text:p>
          </draw:text-box>
        </draw:frame>
        <draw:frame draw:style-name="gr1" draw:text-style-name="P2" draw:layer="layout" svg:width="0.397cm" svg:height="0.442cm" svg:x="8.598cm" svg:y="4.38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6cm" svg:height="0.407cm" svg:x="15.71cm" svg:y="4.413cm">
          <draw:text-box>
            <text:p text:style-name="P1"><text:span text:style-name="T15">06</text:span></text:p>
          </draw:text-box>
        </draw:frame>
        <draw:polygon draw:style-name="gr15" draw:text-style-name="P15" draw:layer="layout" svg:width="0.017cm" svg:height="0.149cm" svg:x="1.792cm" svg:y="4.249cm" svg:viewBox="0 0 18 150" draw:points="0,0 18,0 18,150 0,150">
          <text:p/>
        </draw:polygon>
        <draw:polygon draw:style-name="gr15" draw:text-style-name="P15" draw:layer="layout" svg:width="2.141cm" svg:height="0.016cm" svg:x="1.809cm" svg:y="4.249cm" svg:viewBox="0 0 2142 17" draw:points="0,0 2142,0 2142,17 0,17">
          <text:p/>
        </draw:polygon>
        <draw:polygon draw:style-name="gr15" draw:text-style-name="P15" draw:layer="layout" svg:width="0.017cm" svg:height="0.149cm" svg:x="3.95cm" svg:y="4.249cm" svg:viewBox="0 0 18 150" draw:points="0,0 18,0 18,150 0,150">
          <text:p/>
        </draw:polygon>
        <draw:polygon draw:style-name="gr15" draw:text-style-name="P15" draw:layer="layout" svg:width="10.473cm" svg:height="0.016cm" svg:x="3.967cm" svg:y="4.249cm" svg:viewBox="0 0 10474 17" draw:points="0,0 10474,0 10474,17 0,17">
          <text:p/>
        </draw:polygon>
        <draw:polygon draw:style-name="gr15" draw:text-style-name="P15" draw:layer="layout" svg:width="0.017cm" svg:height="0.149cm" svg:x="14.44cm" svg:y="4.249cm" svg:viewBox="0 0 18 150" draw:points="0,0 18,0 18,150 0,150">
          <text:p/>
        </draw:polygon>
        <draw:polygon draw:style-name="gr15" draw:text-style-name="P15" draw:layer="layout" svg:width="2.872cm" svg:height="0.016cm" svg:x="14.457cm" svg:y="4.249cm" svg:viewBox="0 0 2873 17" draw:points="0,0 2873,0 2873,17 0,17">
          <text:p/>
        </draw:polygon>
        <draw:polygon draw:style-name="gr15" draw:text-style-name="P15" draw:layer="layout" svg:width="0.016cm" svg:height="0.149cm" svg:x="17.329cm" svg:y="4.249cm" svg:viewBox="0 0 17 150" draw:points="0,0 17,0 17,150 0,150">
          <text:p/>
        </draw:polygon>
        <draw:polygon draw:style-name="gr15" draw:text-style-name="P15" draw:layer="layout" svg:width="0.017cm" svg:height="0.556cm" svg:x="1.792cm" svg:y="4.398cm" svg:viewBox="0 0 18 557" draw:points="0,0 18,0 18,557 0,557">
          <text:p/>
        </draw:polygon>
        <draw:polygon draw:style-name="gr15" draw:text-style-name="P15" draw:layer="layout" svg:width="0.017cm" svg:height="0.556cm" svg:x="3.95cm" svg:y="4.398cm" svg:viewBox="0 0 18 557" draw:points="0,0 18,0 18,557 0,557">
          <text:p/>
        </draw:polygon>
        <draw:polygon draw:style-name="gr15" draw:text-style-name="P15" draw:layer="layout" svg:width="0.017cm" svg:height="0.556cm" svg:x="14.44cm" svg:y="4.398cm" svg:viewBox="0 0 18 557" draw:points="0,0 18,0 18,557 0,557">
          <text:p/>
        </draw:polygon>
        <draw:polygon draw:style-name="gr15" draw:text-style-name="P15" draw:layer="layout" svg:width="0.016cm" svg:height="0.556cm" svg:x="17.329cm" svg:y="4.398cm" svg:viewBox="0 0 17 557" draw:points="0,0 17,0 17,557 0,557">
          <text:p/>
        </draw:polygon>
        <draw:frame draw:style-name="gr1" draw:text-style-name="P2" draw:layer="layout" svg:width="0.397cm" svg:height="0.442cm" svg:x="16.075cm" svg:y="4.38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2.788cm" svg:y="5.11cm">
          <draw:text-box>
            <text:p text:style-name="P1"><text:span text:style-name="T15">2</text:span></text:p>
          </draw:text-box>
        </draw:frame>
        <draw:frame draw:style-name="gr1" draw:text-style-name="P2" draw:layer="layout" svg:width="0.397cm" svg:height="0.442cm" svg:x="2.972cm" svg:y="5.08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6.513cm" svg:height="0.407cm" svg:x="4.158cm" svg:y="5.11cm">
          <draw:text-box>
            <text:p text:style-name="P1"><text:span text:style-name="T15">System Architecture and Module Integration</text:span></text:p>
          </draw:text-box>
        </draw:frame>
        <draw:frame draw:style-name="gr1" draw:text-style-name="P2" draw:layer="layout" svg:width="0.397cm" svg:height="0.442cm" svg:x="10.69cm" svg:y="5.08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6cm" svg:height="0.407cm" svg:x="15.71cm" svg:y="5.11cm">
          <draw:text-box>
            <text:p text:style-name="P1"><text:span text:style-name="T15">07</text:span></text:p>
          </draw:text-box>
        </draw:frame>
        <draw:polygon draw:style-name="gr15" draw:text-style-name="P15" draw:layer="layout" svg:width="0.017cm" svg:height="0.149cm" svg:x="1.792cm" svg:y="4.954cm" svg:viewBox="0 0 18 150" draw:points="0,0 18,0 18,150 0,150">
          <text:p/>
        </draw:polygon>
        <draw:polygon draw:style-name="gr15" draw:text-style-name="P15" draw:layer="layout" svg:width="2.141cm" svg:height="0.016cm" svg:x="1.809cm" svg:y="4.954cm" svg:viewBox="0 0 2142 17" draw:points="0,0 2142,0 2142,17 0,17">
          <text:p/>
        </draw:polygon>
        <draw:polygon draw:style-name="gr15" draw:text-style-name="P15" draw:layer="layout" svg:width="0.017cm" svg:height="0.149cm" svg:x="3.95cm" svg:y="4.954cm" svg:viewBox="0 0 18 150" draw:points="0,0 18,0 18,150 0,150">
          <text:p/>
        </draw:polygon>
        <draw:polygon draw:style-name="gr15" draw:text-style-name="P15" draw:layer="layout" svg:width="10.473cm" svg:height="0.016cm" svg:x="3.967cm" svg:y="4.954cm" svg:viewBox="0 0 10474 17" draw:points="0,0 10474,0 10474,17 0,17">
          <text:p/>
        </draw:polygon>
        <draw:polygon draw:style-name="gr15" draw:text-style-name="P15" draw:layer="layout" svg:width="0.017cm" svg:height="0.149cm" svg:x="14.44cm" svg:y="4.954cm" svg:viewBox="0 0 18 150" draw:points="0,0 18,0 18,150 0,150">
          <text:p/>
        </draw:polygon>
        <draw:polygon draw:style-name="gr15" draw:text-style-name="P15" draw:layer="layout" svg:width="2.872cm" svg:height="0.016cm" svg:x="14.457cm" svg:y="4.954cm" svg:viewBox="0 0 2873 17" draw:points="0,0 2873,0 2873,17 0,17">
          <text:p/>
        </draw:polygon>
        <draw:polygon draw:style-name="gr15" draw:text-style-name="P15" draw:layer="layout" svg:width="0.016cm" svg:height="0.149cm" svg:x="17.329cm" svg:y="4.954cm" svg:viewBox="0 0 17 150" draw:points="0,0 17,0 17,150 0,150">
          <text:p/>
        </draw:polygon>
        <draw:polygon draw:style-name="gr15" draw:text-style-name="P15" draw:layer="layout" svg:width="0.017cm" svg:height="0.548cm" svg:x="1.792cm" svg:y="5.103cm" svg:viewBox="0 0 18 549" draw:points="0,0 18,0 18,549 0,549">
          <text:p/>
        </draw:polygon>
        <draw:polygon draw:style-name="gr15" draw:text-style-name="P15" draw:layer="layout" svg:width="0.017cm" svg:height="0.016cm" svg:x="1.792cm" svg:y="5.651cm" svg:viewBox="0 0 18 17" draw:points="0,0 18,0 18,17 0,17">
          <text:p/>
        </draw:polygon>
        <draw:polygon draw:style-name="gr15" draw:text-style-name="P15" draw:layer="layout" svg:width="0.017cm" svg:height="0.016cm" svg:x="1.792cm" svg:y="5.651cm" svg:viewBox="0 0 18 17" draw:points="0,0 18,0 18,17 0,17">
          <text:p/>
        </draw:polygon>
        <draw:polygon draw:style-name="gr15" draw:text-style-name="P15" draw:layer="layout" svg:width="2.141cm" svg:height="0.016cm" svg:x="1.809cm" svg:y="5.651cm" svg:viewBox="0 0 2142 17" draw:points="0,0 2142,0 2142,17 0,17">
          <text:p/>
        </draw:polygon>
        <draw:polygon draw:style-name="gr15" draw:text-style-name="P15" draw:layer="layout" svg:width="0.017cm" svg:height="0.548cm" svg:x="3.95cm" svg:y="5.103cm" svg:viewBox="0 0 18 549" draw:points="0,0 18,0 18,549 0,549">
          <text:p/>
        </draw:polygon>
        <draw:polygon draw:style-name="gr15" draw:text-style-name="P15" draw:layer="layout" svg:width="0.017cm" svg:height="0.016cm" svg:x="3.95cm" svg:y="5.651cm" svg:viewBox="0 0 18 17" draw:points="0,0 18,0 18,17 0,17">
          <text:p/>
        </draw:polygon>
        <draw:polygon draw:style-name="gr15" draw:text-style-name="P15" draw:layer="layout" svg:width="10.473cm" svg:height="0.016cm" svg:x="3.967cm" svg:y="5.651cm" svg:viewBox="0 0 10474 17" draw:points="0,0 10474,0 10474,17 0,17">
          <text:p/>
        </draw:polygon>
        <draw:polygon draw:style-name="gr15" draw:text-style-name="P15" draw:layer="layout" svg:width="0.017cm" svg:height="0.548cm" svg:x="14.44cm" svg:y="5.103cm" svg:viewBox="0 0 18 549" draw:points="0,0 18,0 18,549 0,549">
          <text:p/>
        </draw:polygon>
        <draw:polygon draw:style-name="gr15" draw:text-style-name="P15" draw:layer="layout" svg:width="0.017cm" svg:height="0.016cm" svg:x="14.44cm" svg:y="5.651cm" svg:viewBox="0 0 18 17" draw:points="0,0 18,0 18,17 0,17">
          <text:p/>
        </draw:polygon>
        <draw:polygon draw:style-name="gr15" draw:text-style-name="P15" draw:layer="layout" svg:width="2.872cm" svg:height="0.016cm" svg:x="14.457cm" svg:y="5.651cm" svg:viewBox="0 0 2873 17" draw:points="0,0 2873,0 2873,17 0,17">
          <text:p/>
        </draw:polygon>
        <draw:polygon draw:style-name="gr15" draw:text-style-name="P15" draw:layer="layout" svg:width="0.016cm" svg:height="0.548cm" svg:x="17.329cm" svg:y="5.103cm" svg:viewBox="0 0 17 549" draw:points="0,0 17,0 17,549 0,549">
          <text:p/>
        </draw:polygon>
        <draw:polygon draw:style-name="gr15" draw:text-style-name="P15" draw:layer="layout" svg:width="0.016cm" svg:height="0.016cm" svg:x="17.329cm" svg:y="5.651cm" svg:viewBox="0 0 17 17" draw:points="0,0 17,0 17,17 0,17">
          <text:p/>
        </draw:polygon>
        <draw:polygon draw:style-name="gr15" draw:text-style-name="P15" draw:layer="layout" svg:width="0.016cm" svg:height="0.016cm" svg:x="17.329cm" svg:y="5.651cm" svg:viewBox="0 0 17 17" draw:points="0,0 17,0 17,17 0,17">
          <text:p/>
        </draw:polygon>
        <draw:frame draw:style-name="gr1" draw:text-style-name="P2" draw:layer="layout" svg:width="0.397cm" svg:height="0.442cm" svg:x="16.075cm" svg:y="5.081cm">
          <draw:text-box>
            <text:p text:style-name="P1"><text:span text:style-name="T1"><text:s/></text:span></text:p>
          </draw:text-box>
        </draw:frame>
        <draw:frame draw:style-name="gr11" draw:text-style-name="P10" draw:layer="layout" svg:width="1.666cm" svg:height="1.741cm" svg:x="1.905cm" svg:y="1.153cm">
          <draw:image xlink:href="Pictures/10000001000000B2000000BAA7368BDF.png" xlink:type="simple" xlink:show="embed" xlink:actuate="onLoad" draw:mime-type="image/png">
            <text:p/>
          </draw:image>
        </draw:frame>
        <draw:frame draw:style-name="gr1" draw:text-style-name="P2" draw:layer="layout" svg:width="0.397cm" svg:height="0.442cm" svg:x="1.793cm" svg:y="5.686cm">
          <draw:text-box>
            <text:p text:style-name="P1"><text:span text:style-name="T1"><text:s/>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411cm" svg:height="0.442cm" svg:x="9.727cm" svg:y="26.332cm">
          <draw:text-box>
            <text:p text:style-name="P1"><text:span text:style-name="T8">vi </text:span></text:p>
          </draw:text-box>
        </draw:frame>
        <draw:frame draw:style-name="gr1" draw:text-style-name="P2" draw:layer="layout" svg:width="0.397cm" svg:height="0.442cm" svg:x="1.793cm" svg:y="1.811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3.781cm" svg:height="0.518cm" svg:x="7.992cm" svg:y="2.433cm">
          <draw:text-box>
            <text:p text:style-name="P1"><text:span text:style-name="T16">LIST OF TABLES</text:span></text:p>
          </draw:text-box>
        </draw:frame>
        <draw:frame draw:style-name="gr1" draw:text-style-name="P2" draw:layer="layout" svg:width="0.397cm" svg:height="0.442cm" svg:x="11.76cm" svg:y="2.49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024cm" svg:height="0.407cm" svg:x="2.365cm" svg:y="3.707cm">
          <draw:text-box>
            <text:p text:style-name="P1"><text:span text:style-name="T14">Sl. No.</text:span></text:p>
          </draw:text-box>
        </draw:frame>
        <draw:frame draw:style-name="gr1" draw:text-style-name="P2" draw:layer="layout" svg:width="0.397cm" svg:height="0.442cm" svg:x="3.386cm" svg:y="3.67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802cm" svg:height="0.407cm" svg:x="8.299cm" svg:y="3.707cm">
          <draw:text-box>
            <text:p text:style-name="P1"><text:span text:style-name="T14">Description</text:span></text:p>
          </draw:text-box>
        </draw:frame>
        <draw:frame draw:style-name="gr1" draw:text-style-name="P2" draw:layer="layout" svg:width="0.397cm" svg:height="0.442cm" svg:x="10.109cm" svg:y="3.67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377cm" svg:height="0.407cm" svg:x="15.204cm" svg:y="3.707cm">
          <draw:text-box>
            <text:p text:style-name="P1"><text:span text:style-name="T14">Page No.</text:span></text:p>
          </draw:text-box>
        </draw:frame>
        <draw:polygon draw:style-name="gr15" draw:text-style-name="P15" draw:layer="layout" svg:width="0.017cm" svg:height="0.149cm" svg:x="1.792cm" svg:y="3.551cm" svg:viewBox="0 0 18 150" draw:points="0,0 18,0 18,150 0,150">
          <text:p/>
        </draw:polygon>
        <draw:polygon draw:style-name="gr15" draw:text-style-name="P15" draw:layer="layout" svg:width="0.017cm" svg:height="0.017cm" svg:x="1.792cm" svg:y="3.551cm" svg:viewBox="0 0 18 18" draw:points="0,0 18,0 18,18 0,18">
          <text:p/>
        </draw:polygon>
        <draw:polygon draw:style-name="gr15" draw:text-style-name="P15" draw:layer="layout" svg:width="2.141cm" svg:height="0.017cm" svg:x="1.809cm" svg:y="3.551cm" svg:viewBox="0 0 2142 18" draw:points="0,0 2142,0 2142,18 0,18">
          <text:p/>
        </draw:polygon>
        <draw:polygon draw:style-name="gr15" draw:text-style-name="P15" draw:layer="layout" svg:width="0.017cm" svg:height="0.132cm" svg:x="3.95cm" svg:y="3.568cm" svg:viewBox="0 0 18 133" draw:points="0,0 18,0 18,133 0,133">
          <text:p/>
        </draw:polygon>
        <draw:polygon draw:style-name="gr15" draw:text-style-name="P15" draw:layer="layout" svg:width="0.017cm" svg:height="0.017cm" svg:x="3.95cm" svg:y="3.551cm" svg:viewBox="0 0 18 18" draw:points="0,0 18,0 18,18 0,18">
          <text:p/>
        </draw:polygon>
        <draw:polygon draw:style-name="gr15" draw:text-style-name="P15" draw:layer="layout" svg:width="10.473cm" svg:height="0.017cm" svg:x="3.967cm" svg:y="3.551cm" svg:viewBox="0 0 10474 18" draw:points="0,0 10474,0 10474,18 0,18">
          <text:p/>
        </draw:polygon>
        <draw:polygon draw:style-name="gr15" draw:text-style-name="P15" draw:layer="layout" svg:width="0.017cm" svg:height="0.132cm" svg:x="14.44cm" svg:y="3.568cm" svg:viewBox="0 0 18 133" draw:points="0,0 18,0 18,133 0,133">
          <text:p/>
        </draw:polygon>
        <draw:polygon draw:style-name="gr15" draw:text-style-name="P15" draw:layer="layout" svg:width="0.017cm" svg:height="0.017cm" svg:x="14.44cm" svg:y="3.551cm" svg:viewBox="0 0 18 18" draw:points="0,0 18,0 18,18 0,18">
          <text:p/>
        </draw:polygon>
        <draw:polygon draw:style-name="gr15" draw:text-style-name="P15" draw:layer="layout" svg:width="2.872cm" svg:height="0.017cm" svg:x="14.457cm" svg:y="3.551cm" svg:viewBox="0 0 2873 18" draw:points="0,0 2873,0 2873,18 0,18">
          <text:p/>
        </draw:polygon>
        <draw:polygon draw:style-name="gr15" draw:text-style-name="P15" draw:layer="layout" svg:width="0.016cm" svg:height="0.149cm" svg:x="17.329cm" svg:y="3.551cm" svg:viewBox="0 0 17 150" draw:points="0,0 17,0 17,150 0,150">
          <text:p/>
        </draw:polygon>
        <draw:polygon draw:style-name="gr15" draw:text-style-name="P15" draw:layer="layout" svg:width="0.016cm" svg:height="0.017cm" svg:x="17.329cm" svg:y="3.551cm" svg:viewBox="0 0 17 18" draw:points="0,0 17,0 17,18 0,18">
          <text:p/>
        </draw:polygon>
        <draw:polygon draw:style-name="gr15" draw:text-style-name="P15" draw:layer="layout" svg:width="0.017cm" svg:height="0.549cm" svg:x="1.792cm" svg:y="3.7cm" svg:viewBox="0 0 18 550" draw:points="0,0 18,0 18,550 0,550">
          <text:p/>
        </draw:polygon>
        <draw:polygon draw:style-name="gr15" draw:text-style-name="P15" draw:layer="layout" svg:width="0.017cm" svg:height="0.549cm" svg:x="3.95cm" svg:y="3.7cm" svg:viewBox="0 0 18 550" draw:points="0,0 18,0 18,550 0,550">
          <text:p/>
        </draw:polygon>
        <draw:polygon draw:style-name="gr15" draw:text-style-name="P15" draw:layer="layout" svg:width="0.017cm" svg:height="0.549cm" svg:x="14.44cm" svg:y="3.7cm" svg:viewBox="0 0 18 550" draw:points="0,0 18,0 18,550 0,550">
          <text:p/>
        </draw:polygon>
        <draw:polygon draw:style-name="gr15" draw:text-style-name="P15" draw:layer="layout" svg:width="0.016cm" svg:height="0.549cm" svg:x="17.329cm" svg:y="3.7cm" svg:viewBox="0 0 17 550" draw:points="0,0 17,0 17,550 0,550">
          <text:p/>
        </draw:polygon>
        <draw:frame draw:style-name="gr1" draw:text-style-name="P2" draw:layer="layout" svg:width="0.397cm" svg:height="0.442cm" svg:x="16.582cm" svg:y="3.67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2.788cm" svg:y="4.413cm">
          <draw:text-box>
            <text:p text:style-name="P1"><text:span text:style-name="T15">1</text:span></text:p>
          </draw:text-box>
        </draw:frame>
        <draw:frame draw:style-name="gr1" draw:text-style-name="P2" draw:layer="layout" svg:width="0.397cm" svg:height="0.442cm" svg:x="2.972cm" svg:y="4.38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5.766cm" svg:height="0.407cm" svg:x="4.158cm" svg:y="4.413cm">
          <draw:text-box>
            <text:p text:style-name="P1"><text:span text:style-name="T15">System Components and Their Purpose</text:span></text:p>
          </draw:text-box>
        </draw:frame>
        <draw:frame draw:style-name="gr1" draw:text-style-name="P2" draw:layer="layout" svg:width="0.397cm" svg:height="0.442cm" svg:x="9.943cm" svg:y="4.38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6cm" svg:height="0.407cm" svg:x="15.71cm" svg:y="4.413cm">
          <draw:text-box>
            <text:p text:style-name="P1"><text:span text:style-name="T15">04</text:span></text:p>
          </draw:text-box>
        </draw:frame>
        <draw:polygon draw:style-name="gr15" draw:text-style-name="P15" draw:layer="layout" svg:width="0.017cm" svg:height="0.149cm" svg:x="1.792cm" svg:y="4.249cm" svg:viewBox="0 0 18 150" draw:points="0,0 18,0 18,150 0,150">
          <text:p/>
        </draw:polygon>
        <draw:polygon draw:style-name="gr15" draw:text-style-name="P15" draw:layer="layout" svg:width="2.141cm" svg:height="0.016cm" svg:x="1.809cm" svg:y="4.249cm" svg:viewBox="0 0 2142 17" draw:points="0,0 2142,0 2142,17 0,17">
          <text:p/>
        </draw:polygon>
        <draw:polygon draw:style-name="gr15" draw:text-style-name="P15" draw:layer="layout" svg:width="0.017cm" svg:height="0.149cm" svg:x="3.95cm" svg:y="4.249cm" svg:viewBox="0 0 18 150" draw:points="0,0 18,0 18,150 0,150">
          <text:p/>
        </draw:polygon>
        <draw:polygon draw:style-name="gr15" draw:text-style-name="P15" draw:layer="layout" svg:width="10.473cm" svg:height="0.016cm" svg:x="3.967cm" svg:y="4.249cm" svg:viewBox="0 0 10474 17" draw:points="0,0 10474,0 10474,17 0,17">
          <text:p/>
        </draw:polygon>
        <draw:polygon draw:style-name="gr15" draw:text-style-name="P15" draw:layer="layout" svg:width="0.017cm" svg:height="0.149cm" svg:x="14.44cm" svg:y="4.249cm" svg:viewBox="0 0 18 150" draw:points="0,0 18,0 18,150 0,150">
          <text:p/>
        </draw:polygon>
        <draw:polygon draw:style-name="gr15" draw:text-style-name="P15" draw:layer="layout" svg:width="2.872cm" svg:height="0.016cm" svg:x="14.457cm" svg:y="4.249cm" svg:viewBox="0 0 2873 17" draw:points="0,0 2873,0 2873,17 0,17">
          <text:p/>
        </draw:polygon>
        <draw:polygon draw:style-name="gr15" draw:text-style-name="P15" draw:layer="layout" svg:width="0.016cm" svg:height="0.149cm" svg:x="17.329cm" svg:y="4.249cm" svg:viewBox="0 0 17 150" draw:points="0,0 17,0 17,150 0,150">
          <text:p/>
        </draw:polygon>
        <draw:polygon draw:style-name="gr15" draw:text-style-name="P15" draw:layer="layout" svg:width="0.017cm" svg:height="0.556cm" svg:x="1.792cm" svg:y="4.398cm" svg:viewBox="0 0 18 557" draw:points="0,0 18,0 18,557 0,557">
          <text:p/>
        </draw:polygon>
        <draw:polygon draw:style-name="gr15" draw:text-style-name="P15" draw:layer="layout" svg:width="0.017cm" svg:height="0.556cm" svg:x="3.95cm" svg:y="4.398cm" svg:viewBox="0 0 18 557" draw:points="0,0 18,0 18,557 0,557">
          <text:p/>
        </draw:polygon>
        <draw:polygon draw:style-name="gr15" draw:text-style-name="P15" draw:layer="layout" svg:width="0.017cm" svg:height="0.556cm" svg:x="14.44cm" svg:y="4.398cm" svg:viewBox="0 0 18 557" draw:points="0,0 18,0 18,557 0,557">
          <text:p/>
        </draw:polygon>
        <draw:polygon draw:style-name="gr15" draw:text-style-name="P15" draw:layer="layout" svg:width="0.016cm" svg:height="0.556cm" svg:x="17.329cm" svg:y="4.398cm" svg:viewBox="0 0 17 557" draw:points="0,0 17,0 17,557 0,557">
          <text:p/>
        </draw:polygon>
        <draw:frame draw:style-name="gr1" draw:text-style-name="P2" draw:layer="layout" svg:width="0.397cm" svg:height="0.442cm" svg:x="16.075cm" svg:y="4.38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07cm" svg:x="2.788cm" svg:y="5.11cm">
          <draw:text-box>
            <text:p text:style-name="P1"><text:span text:style-name="T15">2</text:span></text:p>
          </draw:text-box>
        </draw:frame>
        <draw:frame draw:style-name="gr1" draw:text-style-name="P2" draw:layer="layout" svg:width="0.397cm" svg:height="0.442cm" svg:x="2.972cm" svg:y="5.08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764cm" svg:height="0.407cm" svg:x="4.158cm" svg:y="5.11cm">
          <draw:text-box>
            <text:p text:style-name="P1"><text:span text:style-name="T15">Test Scenarios and Observations</text:span></text:p>
          </draw:text-box>
        </draw:frame>
        <draw:frame draw:style-name="gr1" draw:text-style-name="P2" draw:layer="layout" svg:width="0.397cm" svg:height="0.442cm" svg:x="8.939cm" svg:y="5.08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6cm" svg:height="0.407cm" svg:x="15.71cm" svg:y="5.11cm">
          <draw:text-box>
            <text:p text:style-name="P1"><text:span text:style-name="T15">08</text:span></text:p>
          </draw:text-box>
        </draw:frame>
        <draw:polygon draw:style-name="gr15" draw:text-style-name="P15" draw:layer="layout" svg:width="0.017cm" svg:height="0.149cm" svg:x="1.792cm" svg:y="4.954cm" svg:viewBox="0 0 18 150" draw:points="0,0 18,0 18,150 0,150">
          <text:p/>
        </draw:polygon>
        <draw:polygon draw:style-name="gr15" draw:text-style-name="P15" draw:layer="layout" svg:width="2.141cm" svg:height="0.016cm" svg:x="1.809cm" svg:y="4.954cm" svg:viewBox="0 0 2142 17" draw:points="0,0 2142,0 2142,17 0,17">
          <text:p/>
        </draw:polygon>
        <draw:polygon draw:style-name="gr15" draw:text-style-name="P15" draw:layer="layout" svg:width="0.017cm" svg:height="0.149cm" svg:x="3.95cm" svg:y="4.954cm" svg:viewBox="0 0 18 150" draw:points="0,0 18,0 18,150 0,150">
          <text:p/>
        </draw:polygon>
        <draw:polygon draw:style-name="gr15" draw:text-style-name="P15" draw:layer="layout" svg:width="10.473cm" svg:height="0.016cm" svg:x="3.967cm" svg:y="4.954cm" svg:viewBox="0 0 10474 17" draw:points="0,0 10474,0 10474,17 0,17">
          <text:p/>
        </draw:polygon>
        <draw:polygon draw:style-name="gr15" draw:text-style-name="P15" draw:layer="layout" svg:width="0.017cm" svg:height="0.149cm" svg:x="14.44cm" svg:y="4.954cm" svg:viewBox="0 0 18 150" draw:points="0,0 18,0 18,150 0,150">
          <text:p/>
        </draw:polygon>
        <draw:polygon draw:style-name="gr15" draw:text-style-name="P15" draw:layer="layout" svg:width="2.872cm" svg:height="0.016cm" svg:x="14.457cm" svg:y="4.954cm" svg:viewBox="0 0 2873 17" draw:points="0,0 2873,0 2873,17 0,17">
          <text:p/>
        </draw:polygon>
        <draw:polygon draw:style-name="gr15" draw:text-style-name="P15" draw:layer="layout" svg:width="0.016cm" svg:height="0.149cm" svg:x="17.329cm" svg:y="4.954cm" svg:viewBox="0 0 17 150" draw:points="0,0 17,0 17,150 0,150">
          <text:p/>
        </draw:polygon>
        <draw:polygon draw:style-name="gr15" draw:text-style-name="P15" draw:layer="layout" svg:width="0.017cm" svg:height="0.548cm" svg:x="1.792cm" svg:y="5.103cm" svg:viewBox="0 0 18 549" draw:points="0,0 18,0 18,549 0,549">
          <text:p/>
        </draw:polygon>
        <draw:polygon draw:style-name="gr15" draw:text-style-name="P15" draw:layer="layout" svg:width="0.017cm" svg:height="0.016cm" svg:x="1.792cm" svg:y="5.651cm" svg:viewBox="0 0 18 17" draw:points="0,0 18,0 18,17 0,17">
          <text:p/>
        </draw:polygon>
        <draw:polygon draw:style-name="gr15" draw:text-style-name="P15" draw:layer="layout" svg:width="0.017cm" svg:height="0.016cm" svg:x="1.792cm" svg:y="5.651cm" svg:viewBox="0 0 18 17" draw:points="0,0 18,0 18,17 0,17">
          <text:p/>
        </draw:polygon>
        <draw:polygon draw:style-name="gr15" draw:text-style-name="P15" draw:layer="layout" svg:width="2.141cm" svg:height="0.016cm" svg:x="1.809cm" svg:y="5.651cm" svg:viewBox="0 0 2142 17" draw:points="0,0 2142,0 2142,17 0,17">
          <text:p/>
        </draw:polygon>
        <draw:polygon draw:style-name="gr15" draw:text-style-name="P15" draw:layer="layout" svg:width="0.017cm" svg:height="0.548cm" svg:x="3.95cm" svg:y="5.103cm" svg:viewBox="0 0 18 549" draw:points="0,0 18,0 18,549 0,549">
          <text:p/>
        </draw:polygon>
        <draw:polygon draw:style-name="gr15" draw:text-style-name="P15" draw:layer="layout" svg:width="0.017cm" svg:height="0.016cm" svg:x="3.95cm" svg:y="5.651cm" svg:viewBox="0 0 18 17" draw:points="0,0 18,0 18,17 0,17">
          <text:p/>
        </draw:polygon>
        <draw:polygon draw:style-name="gr15" draw:text-style-name="P15" draw:layer="layout" svg:width="10.473cm" svg:height="0.016cm" svg:x="3.967cm" svg:y="5.651cm" svg:viewBox="0 0 10474 17" draw:points="0,0 10474,0 10474,17 0,17">
          <text:p/>
        </draw:polygon>
        <draw:polygon draw:style-name="gr15" draw:text-style-name="P15" draw:layer="layout" svg:width="0.017cm" svg:height="0.548cm" svg:x="14.44cm" svg:y="5.103cm" svg:viewBox="0 0 18 549" draw:points="0,0 18,0 18,549 0,549">
          <text:p/>
        </draw:polygon>
        <draw:polygon draw:style-name="gr15" draw:text-style-name="P15" draw:layer="layout" svg:width="0.017cm" svg:height="0.016cm" svg:x="14.44cm" svg:y="5.651cm" svg:viewBox="0 0 18 17" draw:points="0,0 18,0 18,17 0,17">
          <text:p/>
        </draw:polygon>
        <draw:polygon draw:style-name="gr15" draw:text-style-name="P15" draw:layer="layout" svg:width="2.872cm" svg:height="0.016cm" svg:x="14.457cm" svg:y="5.651cm" svg:viewBox="0 0 2873 17" draw:points="0,0 2873,0 2873,17 0,17">
          <text:p/>
        </draw:polygon>
        <draw:polygon draw:style-name="gr15" draw:text-style-name="P15" draw:layer="layout" svg:width="0.016cm" svg:height="0.548cm" svg:x="17.329cm" svg:y="5.103cm" svg:viewBox="0 0 17 549" draw:points="0,0 17,0 17,549 0,549">
          <text:p/>
        </draw:polygon>
        <draw:polygon draw:style-name="gr15" draw:text-style-name="P15" draw:layer="layout" svg:width="0.016cm" svg:height="0.016cm" svg:x="17.329cm" svg:y="5.651cm" svg:viewBox="0 0 17 17" draw:points="0,0 17,0 17,17 0,17">
          <text:p/>
        </draw:polygon>
        <draw:polygon draw:style-name="gr15" draw:text-style-name="P15" draw:layer="layout" svg:width="0.016cm" svg:height="0.016cm" svg:x="17.329cm" svg:y="5.651cm" svg:viewBox="0 0 17 17" draw:points="0,0 17,0 17,17 0,17">
          <text:p/>
        </draw:polygon>
        <draw:frame draw:style-name="gr11" draw:text-style-name="P10" draw:layer="layout" svg:width="1.666cm" svg:height="1.741cm" svg:x="1.792cm" svg:y="1.369cm">
          <draw:image xlink:href="Pictures/10000001000000B2000000BAA7368BDF.png" xlink:type="simple" xlink:show="embed" xlink:actuate="onLoad" draw:mime-type="image/png">
            <text:p/>
          </draw:image>
        </draw:frame>
        <draw:frame draw:style-name="gr1" draw:text-style-name="P2" draw:layer="layout" svg:width="0.397cm" svg:height="0.442cm" svg:x="16.075cm" svg:y="5.081cm">
          <draw:text-box>
            <text:p text:style-name="P1"><text:span text:style-name="T1"><text:s/></text:span></text:p>
          </draw:text-box>
        </draw:frame>
      </draw:page>
      <draw:page draw:name="page9" draw:style-name="dp1" draw:master-page-name="master-page3">
        <draw:frame draw:style-name="gr16" draw:text-style-name="P19" draw:layer="layout" svg:width="0.4cm" svg:height="0.442cm" svg:x="10.127cm" svg:y="26.201cm">
          <draw:text-box>
            <text:p text:style-name="P18"><text:span text:style-name="T1"><text:s/>1 </text:span></text:p>
          </draw:text-box>
        </draw:frame>
        <draw:frame draw:style-name="gr5" draw:text-style-name="P6" draw:layer="layout" svg:width="2.628cm" svg:height="0.518cm" svg:x="1.793cm" svg:y="1.81cm">
          <draw:text-box>
            <text:p text:style-name="P1"><text:span text:style-name="T16">CHAPTER 1</text:span></text:p>
          </draw:text-box>
        </draw:frame>
        <draw:frame draw:style-name="gr1" draw:text-style-name="P2" draw:layer="layout" svg:width="0.397cm" svg:height="0.442cm" svg:x="4.415cm" svg:y="1.869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3.728cm" svg:height="0.518cm" svg:x="8.017cm" svg:y="2.739cm">
          <draw:text-box>
            <text:p text:style-name="P1"><text:span text:style-name="T16">INTRODUCTION</text:span></text:p>
          </draw:text-box>
        </draw:frame>
        <draw:frame draw:style-name="gr1" draw:text-style-name="P2" draw:layer="layout" svg:width="0.397cm" svg:height="0.442cm" svg:x="11.735cm" svg:y="2.7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157cm" svg:height="0.442cm" svg:x="1.793cm" svg:y="3.678cm">
          <draw:text-box>
            <text:p text:style-name="P1"><text:span text:style-name="T1">Currency recognition <text:s/>is an important <text:s/>everyday <text:s/>task, especially in <text:s/>a country <text:s/>like India where <text:s/>cash </text:span></text:p>
          </draw:text-box>
        </draw:frame>
        <draw:frame draw:style-name="gr1" draw:text-style-name="P2" draw:layer="layout" svg:width="16.414cm" svg:height="0.442cm" svg:x="1.793cm" svg:y="4.201cm">
          <draw:text-box>
            <text:p text:style-name="P1"><text:span text:style-name="T1">transactions are still widely used in shops, markets, travel, and small businesses. For visually impaired </text:span></text:p>
          </draw:text-box>
        </draw:frame>
        <draw:frame draw:style-name="gr1" draw:text-style-name="P2" draw:layer="layout" svg:width="15.737cm" svg:height="0.442cm" svg:x="1.793cm" svg:y="4.732cm">
          <draw:text-box>
            <text:p text:style-name="P1"><text:span text:style-name="T1">users, identifying the denomination of a note quickly and accurately can be difficult because notes </text:span></text:p>
          </draw:text-box>
        </draw:frame>
        <draw:frame draw:style-name="gr1" draw:text-style-name="P2" draw:layer="layout" svg:width="15.881cm" svg:height="0.442cm" svg:x="1.793cm" svg:y="5.255cm">
          <draw:text-box>
            <text:p text:style-name="P1"><text:span text:style-name="T1">differ in size, design, color, and texture, and those differences are not always easy to distinguish by </text:span></text:p>
          </draw:text-box>
        </draw:frame>
        <draw:frame draw:style-name="gr1" draw:text-style-name="P2" draw:layer="layout" svg:width="16.145cm" svg:height="0.442cm" svg:x="1.793cm" svg:y="5.786cm">
          <draw:text-box>
            <text:p text:style-name="P1"><text:span text:style-name="T1">touch alone. A reliable recognition system can reduce dependence on others and improve confidence </text:span></text:p>
          </draw:text-box>
        </draw:frame>
        <draw:frame draw:style-name="gr1" draw:text-style-name="P2" draw:layer="layout" svg:width="4.135cm" svg:height="0.442cm" svg:x="1.793cm" svg:y="6.308cm">
          <draw:text-box>
            <text:p text:style-name="P1"><text:span text:style-name="T1">during daily transactions. </text:span></text:p>
          </draw:text-box>
        </draw:frame>
        <draw:frame draw:style-name="gr1" draw:text-style-name="P2" draw:layer="layout" svg:width="16.401cm" svg:height="0.442cm" svg:x="1.793cm" svg:y="7.172cm">
          <draw:text-box>
            <text:p text:style-name="P1"><text:span text:style-name="T1">The project titled AI-Based Currency Classifier for Visually Impaired Users was developed to provide </text:span></text:p>
          </draw:text-box>
        </draw:frame>
        <draw:frame draw:style-name="gr1" draw:text-style-name="P2" draw:layer="layout" svg:width="15.538cm" svg:height="0.442cm" svg:x="1.793cm" svg:y="7.695cm">
          <draw:text-box>
            <text:p text:style-name="P1"><text:span text:style-name="T1">a simple and accessible way to identify Indian currency notes using a camera feed. The system is </text:span></text:p>
          </draw:text-box>
        </draw:frame>
        <draw:frame draw:style-name="gr1" draw:text-style-name="P2" draw:layer="layout" svg:width="16.014cm" svg:height="0.442cm" svg:x="1.793cm" svg:y="8.226cm">
          <draw:text-box>
            <text:p text:style-name="P1"><text:span text:style-name="T1">designed to display the detected denomination on screen and also speak the value aloud, making the </text:span></text:p>
          </draw:text-box>
        </draw:frame>
        <draw:frame draw:style-name="gr1" draw:text-style-name="P2" draw:layer="layout" svg:width="10.742cm" svg:height="0.442cm" svg:x="1.793cm" svg:y="8.748cm">
          <draw:text-box>
            <text:p text:style-name="P1"><text:span text:style-name="T1">result accessible even when the user cannot see the display clearly. </text:span></text:p>
          </draw:text-box>
        </draw:frame>
        <draw:frame draw:style-name="gr1" draw:text-style-name="P2" draw:layer="layout" svg:width="16.611cm" svg:height="0.442cm" svg:x="1.793cm" svg:y="9.612cm">
          <draw:text-box>
            <text:p text:style-name="P1"><text:span text:style-name="T1">The <text:s/>desktop <text:s/>version <text:s/>uses <text:s/>OpenCV-based <text:s/>template <text:s/>matching. <text:s/>It <text:s/>captures <text:s/>the <text:s/>live <text:s/>webcam <text:s/>frame, </text:span></text:p>
          </draw:text-box>
        </draw:frame>
        <draw:frame draw:style-name="gr1" draw:text-style-name="P2" draw:layer="layout" svg:width="16.268cm" svg:height="0.442cm" svg:x="1.793cm" svg:y="10.134cm">
          <draw:text-box>
            <text:p text:style-name="P1"><text:span text:style-name="T1">converts the image to grayscale, compares it against stored template images, and selects the note with </text:span></text:p>
          </draw:text-box>
        </draw:frame>
        <draw:frame draw:style-name="gr1" draw:text-style-name="P2" draw:layer="layout" svg:width="16.28cm" svg:height="0.442cm" svg:x="1.793cm" svg:y="10.657cm">
          <draw:text-box>
            <text:p text:style-name="P1"><text:span text:style-name="T1">the highest similarity score. If the best match crosses the confidence threshold, the note denomination </text:span></text:p>
          </draw:text-box>
        </draw:frame>
        <draw:frame draw:style-name="gr1" draw:text-style-name="P2" draw:layer="layout" svg:width="15.914cm" svg:height="0.442cm" svg:x="1.793cm" svg:y="11.188cm">
          <draw:text-box>
            <text:p text:style-name="P1"><text:span text:style-name="T1">is highlighted on the screen and announced through a text-to-speech engine. This makes the project </text:span></text:p>
          </draw:text-box>
        </draw:frame>
        <draw:frame draw:style-name="gr1" draw:text-style-name="P2" draw:layer="layout" svg:width="16.568cm" svg:height="0.442cm" svg:x="1.793cm" svg:y="11.711cm">
          <draw:text-box>
            <text:p text:style-name="P1"><text:span text:style-name="T1">lightweight <text:s/>and <text:s/>easy <text:s/>to <text:s/>demonstrate <text:s/>on <text:s/>a <text:s/>standard <text:s/>laptop <text:s/>without <text:s/>requiring <text:s/>a <text:s/>powerful <text:s/>GPU <text:s/>or </text:span></text:p>
          </draw:text-box>
        </draw:frame>
        <draw:frame draw:style-name="gr1" draw:text-style-name="P2" draw:layer="layout" svg:width="4.29cm" svg:height="0.442cm" svg:x="1.793cm" svg:y="12.241cm">
          <draw:text-box>
            <text:p text:style-name="P1"><text:span text:style-name="T1">complex training pipeline. </text:span></text:p>
          </draw:text-box>
        </draw:frame>
        <draw:frame draw:style-name="gr1" draw:text-style-name="P2" draw:layer="layout" svg:width="16.423cm" svg:height="0.442cm" svg:x="1.793cm" svg:y="13.097cm">
          <draw:text-box>
            <text:p text:style-name="P1"><text:span text:style-name="T1">In addition to the local desktop approach, a web version is included for broader usability. The browser-</text:span></text:p>
          </draw:text-box>
        </draw:frame>
        <draw:frame draw:style-name="gr1" draw:text-style-name="P2" draw:layer="layout" svg:width="16.509cm" svg:height="0.442cm" svg:x="1.793cm" svg:y="13.627cm">
          <draw:text-box>
            <text:p text:style-name="P1"><text:span text:style-name="T1">based interface uses the device camera and sends the captured frame to a Roboflow inference API. The </text:span></text:p>
          </draw:text-box>
        </draw:frame>
        <draw:frame draw:style-name="gr1" draw:text-style-name="P2" draw:layer="layout" svg:width="16.28cm" svg:height="0.442cm" svg:x="1.793cm" svg:y="14.15cm">
          <draw:text-box>
            <text:p text:style-name="P1"><text:span text:style-name="T1">browser then speaks the detected denomination using speech synthesis. This dual approach makes the </text:span></text:p>
          </draw:text-box>
        </draw:frame>
        <draw:frame draw:style-name="gr1" draw:text-style-name="P2" draw:layer="layout" svg:width="16.201cm" svg:height="0.442cm" svg:x="1.793cm" svg:y="14.681cm">
          <draw:text-box>
            <text:p text:style-name="P1"><text:span text:style-name="T1">project flexible, because it can work offline in template-based mode or online in cloud-assisted mode </text:span></text:p>
          </draw:text-box>
        </draw:frame>
        <draw:frame draw:style-name="gr1" draw:text-style-name="P2" draw:layer="layout" svg:width="5.417cm" svg:height="0.442cm" svg:x="1.793cm" svg:y="15.205cm">
          <draw:text-box>
            <text:p text:style-name="P1"><text:span text:style-name="T1">depending on the available setup. </text:span></text:p>
          </draw:text-box>
        </draw:frame>
        <draw:frame draw:style-name="gr1" draw:text-style-name="P2" draw:layer="layout" svg:width="4.745cm" svg:height="0.442cm" svg:x="1.793cm" svg:y="16.067cm">
          <draw:text-box>
            <text:p text:style-name="P1"><text:span text:style-name="T8">Existing Technologies Used </text:span></text:p>
          </draw:text-box>
        </draw:frame>
        <draw:frame draw:style-name="gr1" draw:text-style-name="P2" draw:layer="layout" svg:width="16.115cm" svg:height="0.442cm" svg:x="1.793cm" svg:y="16.789cm">
          <draw:text-box>
            <text:p text:style-name="P1"><text:span text:style-name="T1">The project uses a combination of established computer vision and web technologies. Python is used </text:span></text:p>
          </draw:text-box>
        </draw:frame>
        <draw:frame draw:style-name="gr1" draw:text-style-name="P2" draw:layer="layout" svg:width="15.781cm" svg:height="0.442cm" svg:x="1.793cm" svg:y="17.312cm">
          <draw:text-box>
            <text:p text:style-name="P1"><text:span text:style-name="T1">for the desktop logic, while OpenCV handles webcam capture, grayscale conversion, and template </text:span></text:p>
          </draw:text-box>
        </draw:frame>
        <draw:frame draw:style-name="gr1" draw:text-style-name="P2" draw:layer="layout" svg:width="16.59cm" svg:height="0.442cm" svg:x="1.793cm" svg:y="17.843cm">
          <draw:text-box>
            <text:p text:style-name="P1"><text:span text:style-name="T1">matching. <text:s/>NumPy <text:s/>supports <text:s/>image-array <text:s/>manipulation, <text:s/>and <text:s/>pyttsx3 <text:s/>provides <text:s/>offline <text:s/>text-to-speech </text:span></text:p>
          </draw:text-box>
        </draw:frame>
        <draw:frame draw:style-name="gr1" draw:text-style-name="P2" draw:layer="layout" svg:width="16.036cm" svg:height="0.442cm" svg:x="1.793cm" svg:y="18.366cm">
          <draw:text-box>
            <text:p text:style-name="P1"><text:span text:style-name="T1">output. For the browser version, HTML, CSS, and JavaScript are used to create the interface, access </text:span></text:p>
          </draw:text-box>
        </draw:frame>
        <draw:frame draw:style-name="gr1" draw:text-style-name="P2" draw:layer="layout" svg:width="13.637cm" svg:height="0.442cm" svg:x="1.793cm" svg:y="18.897cm">
          <draw:text-box>
            <text:p text:style-name="P1"><text:span text:style-name="T1">the camera, capture frames, and communicate with the Roboflow detection endpoint. </text:span></text:p>
          </draw:text-box>
        </draw:frame>
        <draw:frame draw:style-name="gr1" draw:text-style-name="P2" draw:layer="layout" svg:width="15.926cm" svg:height="0.442cm" svg:x="1.793cm" svg:y="19.751cm">
          <draw:text-box>
            <text:p text:style-name="P1"><text:span text:style-name="T1">The dataset folder follows a simple naming convention where template images are stored as 10.jpg, </text:span></text:p>
          </draw:text-box>
        </draw:frame>
        <draw:frame draw:style-name="gr1" draw:text-style-name="P2" draw:layer="layout" svg:width="16.259cm" svg:height="0.442cm" svg:x="1.793cm" svg:y="20.282cm">
          <draw:text-box>
            <text:p text:style-name="P1"><text:span text:style-name="T1">20.jpg, 50.jpg, 100.jpg, 200.jpg, and 500.jpg. This naming makes it easy for the program to map each </text:span></text:p>
          </draw:text-box>
        </draw:frame>
        <draw:frame draw:style-name="gr1" draw:text-style-name="P2" draw:layer="layout" svg:width="16.069cm" svg:height="0.442cm" svg:x="1.793cm" svg:y="20.805cm">
          <draw:text-box>
            <text:p text:style-name="P1"><text:span text:style-name="T1">stored image to a currency denomination. The web version additionally relies on the browser speech </text:span></text:p>
          </draw:text-box>
        </draw:frame>
        <draw:frame draw:style-name="gr1" draw:text-style-name="P2" draw:layer="layout" svg:width="15.65cm" svg:height="0.442cm" svg:x="1.793cm" svg:y="21.337cm">
          <draw:text-box>
            <text:p text:style-name="P1"><text:span text:style-name="T1">synthesis API, which is convenient for quick demonstrations and does not require a separate local </text:span></text:p>
          </draw:text-box>
        </draw:frame>
        <draw:frame draw:style-name="gr1" draw:text-style-name="P2" draw:layer="layout" svg:width="2.223cm" svg:height="0.442cm" svg:x="1.793cm" svg:y="21.859cm">
          <draw:text-box>
            <text:p text:style-name="P1"><text:span text:style-name="T1">voice engine. </text:span></text:p>
          </draw:text-box>
        </draw:frame>
        <draw:frame draw:style-name="gr1" draw:text-style-name="P2" draw:layer="layout" svg:width="0.397cm" svg:height="0.442cm" svg:x="1.793cm" svg:y="22.722cm">
          <draw:text-box>
            <text:p text:style-name="P1"><text:span text:style-name="T1"><text:s/></text:span></text:p>
          </draw:text-box>
        </draw:frame>
      </draw:page>
      <draw:page draw:name="page10" draw:style-name="dp1" draw:master-page-name="master-page3">
        <draw:frame draw:style-name="gr17" draw:text-style-name="P19" draw:layer="layout" svg:width="0.397cm" svg:height="0.442cm" svg:x="10.2cm" svg:y="26.35cm">
          <draw:text-box>
            <text:p text:style-name="P18"><text:span text:style-name="T1">2 </text:span></text:p>
          </draw:text-box>
        </draw:frame>
        <draw:frame draw:style-name="gr5" draw:text-style-name="P6" draw:layer="layout" svg:width="2.628cm" svg:height="0.518cm" svg:x="1.793cm" svg:y="1.81cm">
          <draw:text-box>
            <text:p text:style-name="P1"><text:span text:style-name="T16">CHAPTER 2</text:span></text:p>
          </draw:text-box>
        </draw:frame>
        <draw:frame draw:style-name="gr1" draw:text-style-name="P2" draw:layer="layout" svg:width="0.397cm" svg:height="0.442cm" svg:x="4.415cm" svg:y="1.869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5.902cm" svg:height="0.518cm" svg:x="6.939cm" svg:y="2.739cm">
          <draw:text-box>
            <text:p text:style-name="P1"><text:span text:style-name="T16">REVIEW OF LITERATURE</text:span></text:p>
          </draw:text-box>
        </draw:frame>
        <draw:frame draw:style-name="gr1" draw:text-style-name="P2" draw:layer="layout" svg:width="0.397cm" svg:height="0.442cm" svg:x="12.823cm" svg:y="2.7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59cm" svg:height="0.442cm" svg:x="1.793cm" svg:y="3.678cm">
          <draw:text-box>
            <text:p text:style-name="P1"><text:span text:style-name="T1">The <text:s/>paper <text:s/>titled </text:span><text:span text:style-name="T8"><text:s/>A <text:s/>Paper <text:s/>Currency <text:s/>Recognition <text:s/>System <text:s/>Using <text:s/>Negatively <text:s/>Correlated <text:s/>Neural </text:span></text:p>
          </draw:text-box>
        </draw:frame>
        <draw:frame draw:style-name="gr1" draw:text-style-name="P2" draw:layer="layout" svg:width="16.496cm" svg:height="0.442cm" svg:x="1.793cm" svg:y="4.201cm">
          <draw:text-box>
            <text:p text:style-name="P1"><text:span text:style-name="T8">Network Ensemble </text:span><text:span text:style-name="T1">, authored by </text:span><text:span text:style-name="T8">Kalyan Kumar Debnath, Sultan Uddin Ahmed, Md. Shahjahan, </text:span></text:p>
          </draw:text-box>
        </draw:frame>
        <draw:frame draw:style-name="gr1" draw:text-style-name="P2" draw:layer="layout" svg:width="16.304cm" svg:height="0.442cm" svg:x="1.793cm" svg:y="4.732cm">
          <draw:text-box>
            <text:p text:style-name="P1"><text:span text:style-name="T8">and Kazuyuki Murase </text:span><text:span text:style-name="T1">introduces a highly reliable automated system designed to efficiently identify </text:span></text:p>
          </draw:text-box>
        </draw:frame>
        <draw:frame draw:style-name="gr1" draw:text-style-name="P2" draw:layer="layout" svg:width="15.902cm" svg:height="0.442cm" svg:x="1.793cm" svg:y="5.255cm">
          <draw:text-box>
            <text:p text:style-name="P1"><text:span text:style-name="T1">different denominations of paper currency. Reliable currency recognition is essential for automated </text:span></text:p>
          </draw:text-box>
        </draw:frame>
        <draw:frame draw:style-name="gr1" draw:text-style-name="P2" draw:layer="layout" svg:width="16.125cm" svg:height="0.442cm" svg:x="1.793cm" svg:y="5.786cm">
          <draw:text-box>
            <text:p text:style-name="P1"><text:span text:style-name="T1">systems like vending machines, ticket counters, and banking services, but machines often struggle to </text:span></text:p>
          </draw:text-box>
        </draw:frame>
        <draw:frame draw:style-name="gr1" draw:text-style-name="P2" draw:layer="layout" svg:width="16.115cm" svg:height="0.442cm" svg:x="1.793cm" svg:y="6.308cm">
          <draw:text-box>
            <text:p text:style-name="P1"><text:span text:style-name="T1">accurately classify new, old, and highly noisy banknotes. Previous methodologies typically relied on </text:span></text:p>
          </draw:text-box>
        </draw:frame>
        <draw:frame draw:style-name="gr1" draw:text-style-name="P2" draw:layer="layout" svg:width="1.052cm" svg:height="0.442cm" svg:x="1.793cm" svg:y="6.84cm">
          <draw:text-box>
            <text:p text:style-name="P1"><text:span text:style-name="T1">single </text:span></text:p>
          </draw:text-box>
        </draw:frame>
        <draw:frame draw:style-name="gr1" draw:text-style-name="P2" draw:layer="layout" svg:width="2.178cm" svg:height="0.442cm" svg:x="2.978cm" svg:y="6.84cm">
          <draw:text-box>
            <text:p text:style-name="P1"><text:span text:style-name="T1">feed-forward </text:span></text:p>
          </draw:text-box>
        </draw:frame>
        <draw:frame draw:style-name="gr1" draw:text-style-name="P2" draw:layer="layout" svg:width="1.096cm" svg:height="0.442cm" svg:x="5.302cm" svg:y="6.84cm">
          <draw:text-box>
            <text:p text:style-name="P1"><text:span text:style-name="T1">neural </text:span></text:p>
          </draw:text-box>
        </draw:frame>
        <draw:frame draw:style-name="gr1" draw:text-style-name="P2" draw:layer="layout" svg:width="1.56cm" svg:height="0.442cm" svg:x="6.537cm" svg:y="6.84cm">
          <draw:text-box>
            <text:p text:style-name="P1"><text:span text:style-name="T1">networks </text:span></text:p>
          </draw:text-box>
        </draw:frame>
        <draw:frame draw:style-name="gr1" draw:text-style-name="P2" draw:layer="layout" svg:width="0.433cm" svg:height="0.442cm" svg:x="8.244cm" svg:y="6.84cm">
          <draw:text-box>
            <text:p text:style-name="P1"><text:span text:style-name="T1">or </text:span></text:p>
          </draw:text-box>
        </draw:frame>
        <draw:frame draw:style-name="gr1" draw:text-style-name="P2" draw:layer="layout" svg:width="0.853cm" svg:height="0.442cm" svg:x="8.816cm" svg:y="6.84cm">
          <draw:text-box>
            <text:p text:style-name="P1"><text:span text:style-name="T1">edge </text:span></text:p>
          </draw:text-box>
        </draw:frame>
        <draw:frame draw:style-name="gr1" draw:text-style-name="P2" draw:layer="layout" svg:width="1.56cm" svg:height="0.442cm" svg:x="9.803cm" svg:y="6.84cm">
          <draw:text-box>
            <text:p text:style-name="P1"><text:span text:style-name="T1">detection </text:span></text:p>
          </draw:text-box>
        </draw:frame>
        <draw:frame draw:style-name="gr1" draw:text-style-name="P2" draw:layer="layout" svg:width="1.903cm" svg:height="0.442cm" svg:x="11.51cm" svg:y="6.84cm">
          <draw:text-box>
            <text:p text:style-name="P1"><text:span text:style-name="T1">techniques, </text:span></text:p>
          </draw:text-box>
        </draw:frame>
        <draw:frame draw:style-name="gr1" draw:text-style-name="P2" draw:layer="layout" svg:width="1.074cm" svg:height="0.442cm" svg:x="13.549cm" svg:y="6.84cm">
          <draw:text-box>
            <text:p text:style-name="P1"><text:span text:style-name="T1">which </text:span></text:p>
          </draw:text-box>
        </draw:frame>
        <draw:frame draw:style-name="gr1" draw:text-style-name="P2" draw:layer="layout" svg:width="0.587cm" svg:height="0.442cm" svg:x="14.767cm" svg:y="6.84cm">
          <draw:text-box>
            <text:p text:style-name="P1"><text:span text:style-name="T1">are </text:span></text:p>
          </draw:text-box>
        </draw:frame>
        <draw:frame draw:style-name="gr1" draw:text-style-name="P2" draw:layer="layout" svg:width="1.008cm" svg:height="0.442cm" svg:x="15.496cm" svg:y="6.84cm">
          <draw:text-box>
            <text:p text:style-name="P1"><text:span text:style-name="T1">prone </text:span></text:p>
          </draw:text-box>
        </draw:frame>
        <draw:frame draw:style-name="gr1" draw:text-style-name="P2" draw:layer="layout" svg:width="0.411cm" svg:height="0.442cm" svg:x="16.648cm" svg:y="6.84cm">
          <draw:text-box>
            <text:p text:style-name="P1"><text:span text:style-name="T1">to </text:span></text:p>
          </draw:text-box>
        </draw:frame>
        <draw:frame draw:style-name="gr1" draw:text-style-name="P2" draw:layer="layout" svg:width="0.853cm" svg:height="0.442cm" svg:x="17.196cm" svg:y="6.84cm">
          <draw:text-box>
            <text:p text:style-name="P1"><text:span text:style-name="T1">false </text:span></text:p>
          </draw:text-box>
        </draw:frame>
        <draw:frame draw:style-name="gr1" draw:text-style-name="P2" draw:layer="layout" svg:width="16.602cm" svg:height="0.442cm" svg:x="1.793cm" svg:y="7.363cm">
          <draw:text-box>
            <text:p text:style-name="P1"><text:span text:style-name="T1">classifications <text:s/>and <text:s/>struggle <text:s/>significantly <text:s/>when <text:s/>processing <text:s/>noisy <text:s/>or <text:s/>degraded <text:s/>notes. <text:s/>To <text:s/>solve <text:s/>this </text:span></text:p>
          </draw:text-box>
        </draw:frame>
        <draw:frame draw:style-name="gr1" draw:text-style-name="P2" draw:layer="layout" svg:width="15.748cm" svg:height="0.442cm" svg:x="1.793cm" svg:y="7.894cm">
          <draw:text-box>
            <text:p text:style-name="P1"><text:span text:style-name="T1">problem, the researchers propose using <text:s/>an Ensemble Neural Network (ENN) trained via Negative </text:span></text:p>
          </draw:text-box>
        </draw:frame>
        <draw:frame draw:style-name="gr1" draw:text-style-name="P2" draw:layer="layout" svg:width="16.004cm" svg:height="0.442cm" svg:x="1.793cm" svg:y="8.416cm">
          <draw:text-box>
            <text:p text:style-name="P1"><text:span text:style-name="T1">Correlation Learning (NCL). The use of NCL intentionally produces diversity among the individual </text:span></text:p>
          </draw:text-box>
        </draw:frame>
        <draw:frame draw:style-name="gr1" draw:text-style-name="P2" draw:layer="layout" svg:width="16.114cm" svg:height="0.442cm" svg:x="1.793cm" svg:y="8.947cm">
          <draw:text-box>
            <text:p text:style-name="P1"><text:span text:style-name="T1">networks within the ensemble, ensuring that different networks become experts on different portions </text:span></text:p>
          </draw:text-box>
        </draw:frame>
        <draw:frame draw:style-name="gr1" draw:text-style-name="P2" draw:layer="layout" svg:width="15.838cm" svg:height="0.442cm" svg:x="1.793cm" svg:y="9.47cm">
          <draw:text-box>
            <text:p text:style-name="P1"><text:span text:style-name="T1">of the input patterns so the ensemble learns the patterns completely. To test the system, the authors </text:span></text:p>
          </draw:text-box>
        </draw:frame>
        <draw:frame draw:style-name="gr1" draw:text-style-name="P2" draw:layer="layout" svg:width="16.137cm" svg:height="0.442cm" svg:x="1.793cm" svg:y="9.993cm">
          <draw:text-box>
            <text:p text:style-name="P1"><text:span text:style-name="T1">experimented on seven denominations of Bangladeshi TAKA: 2, 5, 10, 20, 50, 100, and 500. In their </text:span></text:p>
          </draw:text-box>
        </draw:frame>
        <draw:frame draw:style-name="gr1" draw:text-style-name="P2" draw:layer="layout" svg:width="16.455cm" svg:height="0.442cm" svg:x="1.793cm" svg:y="10.524cm">
          <draw:text-box>
            <text:p text:style-name="P1"><text:span text:style-name="T1">methodology, currency images are converted into grayscale, compressed, and each pixel is fed directly </text:span></text:p>
          </draw:text-box>
        </draw:frame>
        <draw:frame draw:style-name="gr1" draw:text-style-name="P2" draw:layer="layout" svg:width="16.324cm" svg:height="0.442cm" svg:x="1.793cm" svg:y="11.047cm">
          <draw:text-box>
            <text:p text:style-name="P1"><text:span text:style-name="T1">as an input to the network. The final recognition decision is made through a voting process among the </text:span></text:p>
          </draw:text-box>
        </draw:frame>
        <draw:frame draw:style-name="gr1" draw:text-style-name="P2" draw:layer="layout" svg:width="16.876cm" svg:height="0.442cm" svg:x="1.793cm" svg:y="11.578cm">
          <draw:text-box>
            <text:p text:style-name="P1"><text:span text:style-name="T1">individual <text:s/>networks, <text:s/>where <text:s/>the <text:s/>winning <text:s/>neuron <text:s/>of <text:s/>each <text:s/>network <text:s/>casts <text:s/>a <text:s/>vote <text:s/>for <text:s/>a <text:s/>specific <text:s/>class. </text:span></text:p>
          </draw:text-box>
        </draw:frame>
        <draw:frame draw:style-name="gr1" draw:text-style-name="P2" draw:layer="layout" svg:width="16.092cm" svg:height="0.442cm" svg:x="1.793cm" svg:y="12.1cm">
          <draw:text-box>
            <text:p text:style-name="P1"><text:span text:style-name="T1">Experimental results demonstrated that the ENN vastly reduces misclassification compared to single </text:span></text:p>
          </draw:text-box>
        </draw:frame>
        <draw:frame draw:style-name="gr1" draw:text-style-name="P2" draw:layer="layout" svg:width="16.048cm" svg:height="0.442cm" svg:x="1.793cm" svg:y="12.632cm">
          <draw:text-box>
            <text:p text:style-name="P1"><text:span text:style-name="T1">networks <text:s/>or <text:s/>independently <text:s/>trained <text:s/>ensembles. <text:s/>The <text:s/>proposed <text:s/>system <text:s/>proved <text:s/>highly <text:s/>capable <text:s/>of </text:span></text:p>
          </draw:text-box>
        </draw:frame>
        <draw:frame draw:style-name="gr1" draw:text-style-name="P2" draw:layer="layout" svg:width="15.726cm" svg:height="0.442cm" svg:x="1.793cm" svg:y="13.155cm">
          <draw:text-box>
            <text:p text:style-name="P1"><text:span text:style-name="T1">accurately recognizing old and severely degraded TAKA notes, showing robust performance even </text:span></text:p>
          </draw:text-box>
        </draw:frame>
        <draw:frame draw:style-name="gr1" draw:text-style-name="P2" draw:layer="layout" svg:width="10.102cm" svg:height="0.442cm" svg:x="1.793cm" svg:y="13.686cm">
          <draw:text-box>
            <text:p text:style-name="P1"><text:span text:style-name="T1">when artificial noise was deliberately added to the test sets. [1] </text:span></text:p>
          </draw:text-box>
        </draw:frame>
        <draw:frame draw:style-name="gr1" draw:text-style-name="P2" draw:layer="layout" svg:width="16.36cm" svg:height="0.442cm" svg:x="1.793cm" svg:y="14.54cm">
          <draw:text-box>
            <text:p text:style-name="P1"><text:span text:style-name="T1">The paper titled </text:span><text:span text:style-name="T8">Currency Detector for Visually Impaired (Study of The System Which Identifies </text:span></text:p>
          </draw:text-box>
        </draw:frame>
        <draw:frame draw:style-name="gr1" draw:text-style-name="P2" draw:layer="layout" svg:width="16.307cm" svg:height="0.442cm" svg:x="1.793cm" svg:y="15.071cm">
          <draw:text-box>
            <text:p text:style-name="P1"><text:span text:style-name="T8">Indian Currency for Blind People)</text:span><text:span text:style-name="T1">, authored by </text:span><text:span text:style-name="T8">Pratiksha Ganjave, Rushikesh Markad, Gaurav </text:span></text:p>
          </draw:text-box>
        </draw:frame>
        <draw:frame draw:style-name="gr1" draw:text-style-name="P2" draw:layer="layout" svg:width="15.683cm" svg:height="0.442cm" svg:x="1.793cm" svg:y="15.595cm">
          <draw:text-box>
            <text:p text:style-name="P1"><text:span text:style-name="T8">Rasal, and Yash Kalekar</text:span><text:span text:style-name="T1">, addresses the daily challenges visually handicapped people face when </text:span></text:p>
          </draw:text-box>
        </draw:frame>
        <draw:frame draw:style-name="gr1" draw:text-style-name="P2" draw:layer="layout" svg:width="15.827cm" svg:height="0.442cm" svg:x="1.793cm" svg:y="16.125cm">
          <draw:text-box>
            <text:p text:style-name="P1"><text:span text:style-name="T1">distinguishing between various Indian cash denominations. Due to similarities in paper texture and </text:span></text:p>
          </draw:text-box>
        </draw:frame>
        <draw:frame draw:style-name="gr1" draw:text-style-name="P2" draw:layer="layout" svg:width="16.368cm" svg:height="0.442cm" svg:x="1.793cm" svg:y="16.648cm">
          <draw:text-box>
            <text:p text:style-name="P1"><text:span text:style-name="T1">size, recognizing physical money remains difficult and time-consuming without automated assistance. </text:span></text:p>
          </draw:text-box>
        </draw:frame>
        <draw:frame draw:style-name="gr1" draw:text-style-name="P2" draw:layer="layout" svg:width="15.694cm" svg:height="0.442cm" svg:x="1.793cm" svg:y="17.179cm">
          <draw:text-box>
            <text:p text:style-name="P1"><text:span text:style-name="T1">To address this, the project investigates an automatic currency recognition system using computer </text:span></text:p>
          </draw:text-box>
        </draw:frame>
        <draw:frame draw:style-name="gr1" draw:text-style-name="P2" draw:layer="layout" svg:width="15.993cm" svg:height="0.442cm" svg:x="1.793cm" svg:y="17.702cm">
          <draw:text-box>
            <text:p text:style-name="P1"><text:span text:style-name="T1">vision and image processing techniques, aiming to empower the visually impaired both socially and </text:span></text:p>
          </draw:text-box>
        </draw:frame>
        <draw:frame draw:style-name="gr1" draw:text-style-name="P2" draw:layer="layout" svg:width="15.854cm" svg:height="0.442cm" svg:x="1.793cm" svg:y="18.233cm">
          <draw:text-box>
            <text:p text:style-name="P1"><text:span text:style-name="T1">financially. The proposed system's core methodology comprises a sequence of critical steps: image </text:span></text:p>
          </draw:text-box>
        </draw:frame>
        <draw:frame draw:style-name="gr1" draw:text-style-name="P2" draw:layer="layout" svg:width="16.113cm" svg:height="0.442cm" svg:x="1.793cm" svg:y="18.756cm">
          <draw:text-box>
            <text:p text:style-name="P1"><text:span text:style-name="T1">acquisition, pre-processing, edge detection, segmentation, feature extraction, and image comparison. </text:span></text:p>
          </draw:text-box>
        </draw:frame>
        <draw:frame draw:style-name="gr1" draw:text-style-name="P2" draw:layer="layout" svg:width="16.434cm" svg:height="0.442cm" svg:x="1.793cm" svg:y="19.287cm">
          <draw:text-box>
            <text:p text:style-name="P1"><text:span text:style-name="T1">This <text:s/>process <text:s/>extracts <text:s/>distinct <text:s/>characteristics <text:s/>of <text:s/>Indian <text:s/>banknotes, <text:s/>such <text:s/>as <text:s/>the <text:s/>RBI <text:s/>logo, <text:s/>central </text:span></text:p>
          </draw:text-box>
        </draw:frame>
        <draw:frame draw:style-name="gr1" draw:text-style-name="P2" draw:layer="layout" svg:width="16.799cm" svg:height="0.442cm" svg:x="1.793cm" svg:y="19.81cm">
          <draw:text-box>
            <text:p text:style-name="P1"><text:span text:style-name="T1">numbers, <text:s/>color <text:s/>bands, <text:s/>and <text:s/>security <text:s/>threads. <text:s/>A <text:s/>major <text:s/>focus <text:s/>of <text:s/>the <text:s/>research <text:s/>paper <text:s/>is <text:s/>conducting <text:s/>a </text:span></text:p>
          </draw:text-box>
        </draw:frame>
        <draw:frame draw:style-name="gr1" draw:text-style-name="P2" draw:layer="layout" svg:width="16.259cm" svg:height="0.442cm" svg:x="1.793cm" svg:y="20.341cm">
          <draw:text-box>
            <text:p text:style-name="P1"><text:span text:style-name="T1">comparative analysis of four prominent feature extraction algorithms: FAST, ORB, SIFT, and SURF. </text:span></text:p>
          </draw:text-box>
        </draw:frame>
        <draw:frame draw:style-name="gr1" draw:text-style-name="P2" draw:layer="layout" svg:width="16.047cm" svg:height="0.442cm" svg:x="1.793cm" svg:y="20.863cm">
          <draw:text-box>
            <text:p text:style-name="P1"><text:span text:style-name="T1">The study finds that SIFT is highly effective for recognizing features regardless of image rotation or </text:span></text:p>
          </draw:text-box>
        </draw:frame>
        <draw:frame draw:style-name="gr1" draw:text-style-name="P2" draw:layer="layout" svg:width="16.37cm" svg:height="0.442cm" svg:x="1.793cm" svg:y="21.387cm">
          <draw:text-box>
            <text:p text:style-name="P1"><text:span text:style-name="T1">illumination, but it requires high computational power. Conversely, SURF provides a computationally </text:span></text:p>
          </draw:text-box>
        </draw:frame>
        <draw:frame draw:style-name="gr1" draw:text-style-name="P2" draw:layer="layout" svg:width="16.446cm" svg:height="0.442cm" svg:x="1.793cm" svg:y="21.918cm">
          <draw:text-box>
            <text:p text:style-name="P1"><text:span text:style-name="T1">faster, scale-invariant alternative, though it struggles with rotation and illumination changes. The ORB </text:span></text:p>
          </draw:text-box>
        </draw:frame>
        <draw:frame draw:style-name="gr1" draw:text-style-name="P2" draw:layer="layout" svg:width="16.189cm" svg:height="0.442cm" svg:x="1.793cm" svg:y="22.44cm">
          <draw:text-box>
            <text:p text:style-name="P1"><text:span text:style-name="T1">algorithm demonstrated exceptional matching speed and achieved an overall accuracy of 96% during </text:span></text:p>
          </draw:text-box>
        </draw:frame>
        <draw:frame draw:style-name="gr1" draw:text-style-name="P2" draw:layer="layout" svg:width="16.811cm" svg:height="0.442cm" svg:x="1.793cm" svg:y="22.971cm">
          <draw:text-box>
            <text:p text:style-name="P1"><text:span text:style-name="T1">testing. <text:s/>Meanwhile, <text:s/>FAST <text:s/>is <text:s/>primarily <text:s/>utilized <text:s/>for <text:s/>rapid <text:s/>corner <text:s/>detection <text:s/>and <text:s/>image <text:s/>denoising <text:s/>to </text:span></text:p>
          </draw:text-box>
        </draw:frame>
        <draw:frame draw:style-name="gr1" draw:text-style-name="P2" draw:layer="layout" svg:width="16.424cm" svg:height="0.442cm" svg:x="1.793cm" svg:y="23.494cm">
          <draw:text-box>
            <text:p text:style-name="P1"><text:span text:style-name="T1">ensure <text:s/>the <text:s/>system <text:s/>can <text:s/>operate <text:s/>smoothly. <text:s/>Upon <text:s/>successful <text:s/>recognition <text:s/>of <text:s/>a <text:s/>banknote <text:s/>against <text:s/>its </text:span></text:p>
          </draw:text-box>
        </draw:frame>
        <draw:frame draw:style-name="gr1" draw:text-style-name="P2" draw:layer="layout" svg:width="16.335cm" svg:height="0.442cm" svg:x="1.793cm" svg:y="24.025cm">
          <draw:text-box>
            <text:p text:style-name="P1"><text:span text:style-name="T1">database, the system is designed to provide an audio output of the monetary value, directly addressing </text:span></text:p>
          </draw:text-box>
        </draw:frame>
        <draw:frame draw:style-name="gr1" draw:text-style-name="P2" draw:layer="layout" svg:width="16.168cm" svg:height="0.442cm" svg:x="1.793cm" svg:y="24.548cm">
          <draw:text-box>
            <text:p text:style-name="P1"><text:span text:style-name="T1">the accessibility needs of blind users. Ultimately, the researchers conclude that rather than relying on </text:span></text:p>
          </draw:text-box>
        </draw:frame>
        <draw:frame draw:style-name="gr1" draw:text-style-name="P2" draw:layer="layout" svg:width="15.948cm" svg:height="0.442cm" svg:x="1.793cm" svg:y="25.079cm">
          <draw:text-box>
            <text:p text:style-name="P1"><text:span text:style-name="T1">a single algorithm, appropriately combining these techniques according to specific system demands </text:span></text:p>
          </draw:text-box>
        </draw:frame>
        <draw:frame draw:style-name="gr1" draw:text-style-name="P2" draw:layer="layout" svg:width="11.959cm" svg:height="0.442cm" svg:x="1.793cm" svg:y="25.602cm">
          <draw:text-box>
            <text:p text:style-name="P1"><text:span text:style-name="T1">will yield the most robust currency detection tool for the visually impaired </text:span></text:p>
          </draw:text-box>
        </draw:frame>
      </draw:page>
      <draw:page draw:name="page11" draw:style-name="dp1" draw:master-page-name="master-page3">
        <draw:frame draw:style-name="gr10" draw:text-style-name="P7" draw:layer="layout" svg:width="0.397cm" svg:height="0.442cm" svg:x="10.303cm" svg:y="26.35cm">
          <draw:text-box>
            <text:p text:style-name="P1"><text:span text:style-name="T1">3</text:span></text:p>
          </draw:text-box>
        </draw:frame>
        <draw:frame draw:style-name="gr1" draw:text-style-name="P2" draw:layer="layout" svg:width="16.471cm" svg:height="0.442cm" svg:x="1.793cm" svg:y="1.811cm">
          <draw:text-box>
            <text:p text:style-name="P1"><text:span text:style-name="T1">3. The paper titled </text:span><text:span text:style-name="T8">Currency Recognition System for Blind people using ORB Algorithm</text:span><text:span text:style-name="T1">, authored </text:span></text:p>
          </draw:text-box>
        </draw:frame>
        <draw:frame draw:style-name="gr1" draw:text-style-name="P2" draw:layer="layout" svg:width="16.691cm" svg:height="0.442cm" svg:x="1.793cm" svg:y="2.334cm">
          <draw:text-box>
            <text:p text:style-name="P1"><text:span text:style-name="T1">by </text:span><text:span text:style-name="T8"><text:s/>Ahmed <text:s/>Yousry, <text:s/>Mohamed <text:s/>Taha <text:s/>and <text:s/>Mazen <text:s/>M.Selim</text:span><text:span text:style-name="T1">, <text:s/>proposes <text:s/>a <text:s/>mobile-based <text:s/>application </text:span></text:p>
          </draw:text-box>
        </draw:frame>
        <draw:frame draw:style-name="gr1" draw:text-style-name="P2" draw:layer="layout" svg:width="16.213cm" svg:height="0.442cm" svg:x="1.793cm" svg:y="2.865cm">
          <draw:text-box>
            <text:p text:style-name="P1"><text:span text:style-name="T1">designed to help visually impaired individuals independently identify Egyptian paper currencies. The </text:span></text:p>
          </draw:text-box>
        </draw:frame>
        <draw:frame draw:style-name="gr1" draw:text-style-name="P2" draw:layer="layout" svg:width="16.236cm" svg:height="0.442cm" svg:x="1.793cm" svg:y="3.388cm">
          <draw:text-box>
            <text:p text:style-name="P1"><text:span text:style-name="T1">research addresses the significant challenge blind individuals face in distinguishing banknotes, which </text:span></text:p>
          </draw:text-box>
        </draw:frame>
        <draw:frame draw:style-name="gr1" draw:text-style-name="P2" draw:layer="layout" svg:width="16.335cm" svg:height="0.442cm" svg:x="1.793cm" svg:y="3.919cm">
          <draw:text-box>
            <text:p text:style-name="P1"><text:span text:style-name="T1">makes them vulnerable to cheating during monetary transactions. To solve this, the authors developed </text:span></text:p>
          </draw:text-box>
        </draw:frame>
        <draw:frame draw:style-name="gr1" draw:text-style-name="P2" draw:layer="layout" svg:width="16.834cm" svg:height="0.442cm" svg:x="1.793cm" svg:y="4.442cm">
          <draw:text-box>
            <text:p text:style-name="P1"><text:span text:style-name="T1">a <text:s/>system <text:s/>utilizing <text:s/>the <text:s/>Oriented <text:s/>FAST <text:s/>and <text:s/>rotated <text:s/>BRIEF <text:s/>(ORB) <text:s/>algorithm, <text:s/>chosen <text:s/>for <text:s/>its <text:s/>speed, </text:span></text:p>
          </draw:text-box>
        </draw:frame>
        <draw:frame draw:style-name="gr1" draw:text-style-name="P2" draw:layer="layout" svg:width="16.479cm" svg:height="0.442cm" svg:x="1.793cm" svg:y="4.973cm">
          <draw:text-box>
            <text:p text:style-name="P1"><text:span text:style-name="T1">efficiency, and robustness against variations in illumination, rotation, and scaling. The system operates </text:span></text:p>
          </draw:text-box>
        </draw:frame>
        <draw:frame draw:style-name="gr1" draw:text-style-name="P2" draw:layer="layout" svg:width="16.389cm" svg:height="0.442cm" svg:x="1.793cm" svg:y="5.495cm">
          <draw:text-box>
            <text:p text:style-name="P1"><text:span text:style-name="T1">through an Android application where the user captures an image of a banknote. The image undergoes </text:span></text:p>
          </draw:text-box>
        </draw:frame>
        <draw:frame draw:style-name="gr1" draw:text-style-name="P2" draw:layer="layout" svg:width="16.501cm" svg:height="0.442cm" svg:x="1.793cm" svg:y="6.026cm">
          <draw:text-box>
            <text:p text:style-name="P1"><text:span text:style-name="T1">pre-processing <text:s/>(Gaussian <text:s/>blurring <text:s/>to <text:s/>remove <text:s/>noise), <text:s/>segmentation, <text:s/>and <text:s/>Region <text:s/>of <text:s/>Interest <text:s/>(ROI) </text:span></text:p>
          </draw:text-box>
        </draw:frame>
        <draw:frame draw:style-name="gr1" draw:text-style-name="P2" draw:layer="layout" svg:width="16.202cm" svg:height="0.442cm" svg:x="1.793cm" svg:y="6.549cm">
          <draw:text-box>
            <text:p text:style-name="P1"><text:span text:style-name="T1">extraction to isolate the currency from its background. The ORB algorithm then extracts unique local </text:span></text:p>
          </draw:text-box>
        </draw:frame>
        <draw:frame draw:style-name="gr1" draw:text-style-name="P2" draw:layer="layout" svg:width="16.178cm" svg:height="0.442cm" svg:x="1.793cm" svg:y="7.081cm">
          <draw:text-box>
            <text:p text:style-name="P1"><text:span text:style-name="T1">binary descriptors, which are compared against a pre-constructed database of currency features using </text:span></text:p>
          </draw:text-box>
        </draw:frame>
        <draw:frame draw:style-name="gr1" draw:text-style-name="P2" draw:layer="layout" svg:width="15.837cm" svg:height="0.442cm" svg:x="1.793cm" svg:y="7.603cm">
          <draw:text-box>
            <text:p text:style-name="P1"><text:span text:style-name="T1">the Hamming Distance matching technique. Once the highest match is determined, the smartphone </text:span></text:p>
          </draw:text-box>
        </draw:frame>
        <draw:frame draw:style-name="gr1" draw:text-style-name="P2" draw:layer="layout" svg:width="16.539cm" svg:height="0.442cm" svg:x="1.793cm" svg:y="8.134cm">
          <draw:text-box>
            <text:p text:style-name="P1"><text:span text:style-name="T1">audibly <text:s/>reads <text:s/>out <text:s/>the <text:s/>currency's <text:s/>value <text:s/>to <text:s/>the <text:s/>user <text:s/>through <text:s/>its <text:s/>speaker. <text:s/>Experimental <text:s/>evaluations </text:span></text:p>
          </draw:text-box>
        </draw:frame>
        <draw:frame draw:style-name="gr1" draw:text-style-name="P2" draw:layer="layout" svg:width="16.014cm" svg:height="0.442cm" svg:x="1.793cm" svg:y="8.657cm">
          <draw:text-box>
            <text:p text:style-name="P1"><text:span text:style-name="T1">demonstrate that the system is highly effective in real-world scenarios, achieving a 96% recognition </text:span></text:p>
          </draw:text-box>
        </draw:frame>
        <draw:frame draw:style-name="gr1" draw:text-style-name="P2" draw:layer="layout" svg:width="15.872cm" svg:height="0.442cm" svg:x="1.793cm" svg:y="9.188cm">
          <draw:text-box>
            <text:p text:style-name="P1"><text:span text:style-name="T1">accuracy and a rapid processing time of just 0.682 seconds. This solution significantly outperforms </text:span></text:p>
          </draw:text-box>
        </draw:frame>
        <draw:frame draw:style-name="gr1" draw:text-style-name="P2" draw:layer="layout" svg:width="13.408cm" svg:height="0.442cm" svg:x="1.793cm" svg:y="9.711cm">
          <draw:text-box>
            <text:p text:style-name="P1"><text:span text:style-name="T1">previous methods, such as the CRSFVI system, in both speed and overall reliability </text:span></text:p>
          </draw:text-box>
        </draw:frame>
        <draw:frame draw:style-name="gr1" draw:text-style-name="P2" draw:layer="layout" svg:width="16.603cm" svg:height="0.442cm" svg:x="1.793cm" svg:y="10.574cm">
          <draw:text-box>
            <text:p text:style-name="P1"><text:span text:style-name="T1">4. The paper titled </text:span><text:span text:style-name="T8">Detection of Fake Currency using Image Processing</text:span><text:span text:style-name="T1">, authored by </text:span><text:span text:style-name="T8">Ankush Singh, </text:span></text:p>
          </draw:text-box>
        </draw:frame>
        <draw:frame draw:style-name="gr1" draw:text-style-name="P2" draw:layer="layout" svg:width="16.672cm" svg:height="0.442cm" svg:x="1.793cm" svg:y="11.097cm">
          <draw:text-box>
            <text:p text:style-name="P1"><text:span text:style-name="T8">Prashant <text:s/>Mankani, <text:s/>Prof. <text:s/>Ketaki <text:s/>Bhoyar, <text:s/>Ankur <text:s/>Pandey, <text:s/>and <text:s/>Aman <text:s/>Tekriwal</text:span><text:span text:style-name="T1">, <text:s/>addresses <text:s/>the </text:span></text:p>
          </draw:text-box>
        </draw:frame>
        <draw:frame draw:style-name="gr1" draw:text-style-name="P2" draw:layer="layout" svg:width="16.422cm" svg:height="0.442cm" svg:x="1.793cm" svg:y="11.628cm">
          <draw:text-box>
            <text:p text:style-name="P1"><text:span text:style-name="T1">severe economic threat posed by counterfeit money by proposing a highly accessible and user-friendly </text:span></text:p>
          </draw:text-box>
        </draw:frame>
        <draw:frame draw:style-name="gr1" draw:text-style-name="P2" draw:layer="layout" svg:width="16.322cm" svg:height="0.442cm" svg:x="1.793cm" svg:y="12.15cm">
          <draw:text-box>
            <text:p text:style-name="P1"><text:span text:style-name="T1">fake currency detection tool. The authors observe that existing detection systems are largely restricted </text:span></text:p>
          </draw:text-box>
        </draw:frame>
        <draw:frame draw:style-name="gr1" draw:text-style-name="P2" draw:layer="layout" svg:width="16.656cm" svg:height="0.442cm" svg:x="1.793cm" svg:y="12.673cm">
          <draw:text-box>
            <text:p text:style-name="P1"><text:span text:style-name="T1">to <text:s/>PC <text:s/>environments <text:s/>and <text:s/>local <text:s/>databases, <text:s/>which <text:s/>limits <text:s/>their <text:s/>portability <text:s/>and <text:s/>user <text:s/>convenience. <text:s/>To </text:span></text:p>
          </draw:text-box>
        </draw:frame>
        <draw:frame draw:style-name="gr1" draw:text-style-name="P2" draw:layer="layout" svg:width="15.782cm" svg:height="0.442cm" svg:x="1.793cm" svg:y="13.204cm">
          <draw:text-box>
            <text:p text:style-name="P1"><text:span text:style-name="T1">resolve this, the proposed project introduces a portable smartphone application coupled with cloud </text:span></text:p>
          </draw:text-box>
        </draw:frame>
        <draw:frame draw:style-name="gr1" draw:text-style-name="P2" draw:layer="layout" svg:width="1.251cm" svg:height="0.442cm" svg:x="1.793cm" svg:y="13.727cm">
          <draw:text-box>
            <text:p text:style-name="P1"><text:span text:style-name="T1">storage </text:span></text:p>
          </draw:text-box>
        </draw:frame>
        <draw:frame draw:style-name="gr1" draw:text-style-name="P2" draw:layer="layout" svg:width="2.344cm" svg:height="0.442cm" svg:x="3.186cm" svg:y="13.727cm">
          <draw:text-box>
            <text:p text:style-name="P1"><text:span text:style-name="T1">infrastructure. </text:span></text:p>
          </draw:text-box>
        </draw:frame>
        <draw:frame draw:style-name="gr1" draw:text-style-name="P2" draw:layer="layout" svg:width="0.72cm" svg:height="0.442cm" svg:x="5.674cm" svg:y="13.727cm">
          <draw:text-box>
            <text:p text:style-name="P1"><text:span text:style-name="T1">The </text:span></text:p>
          </draw:text-box>
        </draw:frame>
        <draw:frame draw:style-name="gr1" draw:text-style-name="P2" draw:layer="layout" svg:width="1.869cm" svg:height="0.442cm" svg:x="6.536cm" svg:y="13.727cm">
          <draw:text-box>
            <text:p text:style-name="P1"><text:span text:style-name="T1">application </text:span></text:p>
          </draw:text-box>
        </draw:frame>
        <draw:frame draw:style-name="gr1" draw:text-style-name="P2" draw:layer="layout" svg:width="1.582cm" svg:height="0.442cm" svg:x="8.55cm" svg:y="13.727cm">
          <draw:text-box>
            <text:p text:style-name="P1"><text:span text:style-name="T1">evaluates </text:span></text:p>
          </draw:text-box>
        </draw:frame>
        <draw:frame draw:style-name="gr1" draw:text-style-name="P2" draw:layer="layout" svg:width="0.588cm" svg:height="0.442cm" svg:x="10.282cm" svg:y="13.727cm">
          <draw:text-box>
            <text:p text:style-name="P1"><text:span text:style-name="T1">the </text:span></text:p>
          </draw:text-box>
        </draw:frame>
        <draw:frame draw:style-name="gr1" draw:text-style-name="P2" draw:layer="layout" svg:width="1.428cm" svg:height="0.442cm" svg:x="11.011cm" svg:y="13.727cm">
          <draw:text-box>
            <text:p text:style-name="P1"><text:span text:style-name="T1">physical </text:span></text:p>
          </draw:text-box>
        </draw:frame>
        <draw:frame draw:style-name="gr1" draw:text-style-name="P2" draw:layer="layout" svg:width="1.891cm" svg:height="0.442cm" svg:x="12.578cm" svg:y="13.727cm">
          <draw:text-box>
            <text:p text:style-name="P1"><text:span text:style-name="T1">appearance </text:span></text:p>
          </draw:text-box>
        </draw:frame>
        <draw:frame draw:style-name="gr1" draw:text-style-name="P2" draw:layer="layout" svg:width="0.433cm" svg:height="0.442cm" svg:x="14.609cm" svg:y="13.727cm">
          <draw:text-box>
            <text:p text:style-name="P1"><text:span text:style-name="T1">of </text:span></text:p>
          </draw:text-box>
        </draw:frame>
        <draw:frame draw:style-name="gr1" draw:text-style-name="P2" draw:layer="layout" svg:width="1.118cm" svg:height="0.442cm" svg:x="15.189cm" svg:y="13.727cm">
          <draw:text-box>
            <text:p text:style-name="P1"><text:span text:style-name="T1">Indian </text:span></text:p>
          </draw:text-box>
        </draw:frame>
        <draw:frame draw:style-name="gr1" draw:text-style-name="P2" draw:layer="layout" svg:width="1.593cm" svg:height="0.442cm" svg:x="16.449cm" svg:y="13.727cm">
          <draw:text-box>
            <text:p text:style-name="P1"><text:span text:style-name="T1">currency, </text:span></text:p>
          </draw:text-box>
        </draw:frame>
        <draw:frame draw:style-name="gr1" draw:text-style-name="P2" draw:layer="layout" svg:width="15.836cm" svg:height="0.442cm" svg:x="1.793cm" svg:y="14.258cm">
          <draw:text-box>
            <text:p text:style-name="P1"><text:span text:style-name="T1">leveraging image processing algorithms to extract key security features such as the security thread, </text:span></text:p>
          </draw:text-box>
        </draw:frame>
        <draw:frame draw:style-name="gr1" draw:text-style-name="P2" draw:layer="layout" svg:width="16.546cm" svg:height="0.442cm" svg:x="1.793cm" svg:y="14.781cm">
          <draw:text-box>
            <text:p text:style-name="P1"><text:span text:style-name="T1">intaglio printing (RBI logo), and identification marks. For the classification process, the system utilizes </text:span></text:p>
          </draw:text-box>
        </draw:frame>
        <draw:frame draw:style-name="gr1" draw:text-style-name="P2" draw:layer="layout" svg:width="16.357cm" svg:height="0.442cm" svg:x="1.793cm" svg:y="15.313cm">
          <draw:text-box>
            <text:p text:style-name="P1"><text:span text:style-name="T1">a Support Vector Machine (SVM) algorithm to accurately distinguish between real and fake notes. By </text:span></text:p>
          </draw:text-box>
        </draw:frame>
        <draw:frame draw:style-name="gr1" draw:text-style-name="P2" draw:layer="layout" svg:width="16.24cm" svg:height="0.442cm" svg:x="1.793cm" svg:y="15.835cm">
          <draw:text-box>
            <text:p text:style-name="P1"><text:span text:style-name="T1">offloading the heavy image processing execution logic to a cloud server, the system reduces the app's </text:span></text:p>
          </draw:text-box>
        </draw:frame>
        <draw:frame draw:style-name="gr1" draw:text-style-name="P2" draw:layer="layout" svg:width="16.445cm" svg:height="0.442cm" svg:x="1.793cm" svg:y="16.366cm">
          <draw:text-box>
            <text:p text:style-name="P1"><text:span text:style-name="T1">size, <text:s/>optimizing <text:s/>smartphone <text:s/>memory <text:s/>usage <text:s/>while <text:s/>enabling <text:s/>real-time <text:s/>detection. <text:s/>Furthermore, <text:s/>the </text:span></text:p>
          </draw:text-box>
        </draw:frame>
        <draw:frame draw:style-name="gr1" draw:text-style-name="P2" draw:layer="layout" svg:width="16.018cm" svg:height="0.442cm" svg:x="1.793cm" svg:y="16.889cm">
          <draw:text-box>
            <text:p text:style-name="P1"><text:span text:style-name="T1">system architecture includes a feature to provide live updates of the detected currency's global stock </text:span></text:p>
          </draw:text-box>
        </draw:frame>
        <draw:frame draw:style-name="gr1" draw:text-style-name="P2" draw:layer="layout" svg:width="16.48cm" svg:height="0.442cm" svg:x="1.793cm" svg:y="17.42cm">
          <draw:text-box>
            <text:p text:style-name="P1"><text:span text:style-name="T1">market <text:s/>value. <text:s/>Ultimately, <text:s/>the <text:s/>study <text:s/>concludes <text:s/>that <text:s/>combining <text:s/>image <text:s/>processing <text:s/>with <text:s/>supervised </text:span></text:p>
          </draw:text-box>
        </draw:frame>
        <draw:frame draw:style-name="gr1" draw:text-style-name="P2" draw:layer="layout" svg:width="16.312cm" svg:height="0.442cm" svg:x="1.793cm" svg:y="17.942cm">
          <draw:text-box>
            <text:p text:style-name="P1"><text:span text:style-name="T1">machine learning can achieve a precision rate of above 99%, making it a viable solution to potentially </text:span></text:p>
          </draw:text-box>
        </draw:frame>
        <draw:frame draw:style-name="gr1" draw:text-style-name="P2" draw:layer="layout" svg:width="15.449cm" svg:height="0.442cm" svg:x="1.793cm" svg:y="18.474cm">
          <draw:text-box>
            <text:p text:style-name="P1"><text:span text:style-name="T1">replace traditional hardware-based verification systems in the initial stages of currency checking </text:span></text:p>
          </draw:text-box>
        </draw:frame>
        <draw:frame draw:style-name="gr1" draw:text-style-name="P2" draw:layer="layout" svg:width="16.725cm" svg:height="0.442cm" svg:x="1.793cm" svg:y="19.328cm">
          <draw:text-box>
            <text:p text:style-name="P1"><text:span text:style-name="T1">5. <text:s/>The <text:s/>paper <text:s/>titled </text:span><text:span text:style-name="T8"><text:s/>The <text:s/>Propose <text:s/>Currency <text:s/>Detection <text:s/>Technique <text:s/>Based <text:s/>on Sift <text:s/>Algorithm <text:s/>and </text:span></text:p>
          </draw:text-box>
        </draw:frame>
        <draw:frame draw:style-name="gr1" draw:text-style-name="P2" draw:layer="layout" svg:width="16.063cm" svg:height="0.442cm" svg:x="1.793cm" svg:y="19.859cm">
          <draw:text-box>
            <text:p text:style-name="P1"><text:span text:style-name="T8">Bayesian <text:s/>Classifier: <text:s/>A <text:s/>Review</text:span><text:span text:style-name="T1">, <text:s/>authored <text:s/>by </text:span><text:span text:style-name="T8"><text:s/>Akash <text:s/>Gupta <text:s/>and <text:s/>Tarun <text:s/>Sharma</text:span><text:span text:style-name="T1">, <text:s/>provides <text:s/>a </text:span></text:p>
          </draw:text-box>
        </draw:frame>
        <draw:frame draw:style-name="gr1" draw:text-style-name="P2" draw:layer="layout" svg:width="16.333cm" svg:height="0.442cm" svg:x="1.793cm" svg:y="20.382cm">
          <draw:text-box>
            <text:p text:style-name="P1"><text:span text:style-name="T1">comprehensive review of image processing techniques used to detect counterfeit Indian currency. The </text:span></text:p>
          </draw:text-box>
        </draw:frame>
        <draw:frame draw:style-name="gr1" draw:text-style-name="P2" draw:layer="layout" svg:width="16.617cm" svg:height="0.442cm" svg:x="1.793cm" svg:y="20.914cm">
          <draw:text-box>
            <text:p text:style-name="P1"><text:span text:style-name="T1">project highlights that relying solely on extrinsic properties, such as a note's size or color, is insufficient </text:span></text:p>
          </draw:text-box>
        </draw:frame>
        <draw:frame draw:style-name="gr1" draw:text-style-name="P2" draw:layer="layout" svg:width="16.423cm" svg:height="0.442cm" svg:x="1.793cm" svg:y="21.436cm">
          <draw:text-box>
            <text:p text:style-name="P1"><text:span text:style-name="T1">for determining its authenticity, especially since notes can get worn or damaged. The authors point out </text:span></text:p>
          </draw:text-box>
        </draw:frame>
        <draw:frame draw:style-name="gr1" draw:text-style-name="P2" draw:layer="layout" svg:width="16.213cm" svg:height="0.442cm" svg:x="1.793cm" svg:y="21.967cm">
          <draw:text-box>
            <text:p text:style-name="P1"><text:span text:style-name="T1">that previous research frequently utilized the SIFT algorithm, which successfully matched superficial </text:span></text:p>
          </draw:text-box>
        </draw:frame>
        <draw:frame draw:style-name="gr1" draw:text-style-name="P2" draw:layer="layout" svg:width="16.046cm" svg:height="0.442cm" svg:x="1.793cm" svg:y="22.49cm">
          <draw:text-box>
            <text:p text:style-name="P1"><text:span text:style-name="T1">features like color and paper type but failed to verify internal characteristics, such as the text printed </text:span></text:p>
          </draw:text-box>
        </draw:frame>
        <draw:frame draw:style-name="gr1" draw:text-style-name="P2" draw:layer="layout" svg:width="16.657cm" svg:height="0.442cm" svg:x="1.793cm" svg:y="23.021cm">
          <draw:text-box>
            <text:p text:style-name="P1"><text:span text:style-name="T1">on <text:s/>the <text:s/>security <text:s/>strip. <text:s/>To <text:s/>address <text:s/>this <text:s/>limitation, <text:s/>the <text:s/>proposed <text:s/>project <text:s/>focuses <text:s/>on <text:s/>identifying <text:s/>and </text:span></text:p>
          </draw:text-box>
        </draw:frame>
        <draw:frame draw:style-name="gr1" draw:text-style-name="P2" draw:layer="layout" svg:width="15.947cm" svg:height="0.442cm" svg:x="1.793cm" svg:y="23.544cm">
          <draw:text-box>
            <text:p text:style-name="P1"><text:span text:style-name="T1">matching the intrinsic, highly secure features of Indian banknotes to ensure they are genuine. These </text:span></text:p>
          </draw:text-box>
        </draw:frame>
        <draw:frame draw:style-name="gr1" draw:text-style-name="P2" draw:layer="layout" svg:width="16.267cm" svg:height="0.442cm" svg:x="1.793cm" svg:y="24.067cm">
          <draw:text-box>
            <text:p text:style-name="P1"><text:span text:style-name="T1">complex security features include the Mahatma Gandhi watermark, optically variable ink, fluorescent </text:span></text:p>
          </draw:text-box>
        </draw:frame>
        <draw:frame draw:style-name="gr1" draw:text-style-name="P2" draw:layer="layout" svg:width="15.959cm" svg:height="0.442cm" svg:x="1.793cm" svg:y="24.598cm">
          <draw:text-box>
            <text:p text:style-name="P1"><text:span text:style-name="T1">number panels, fully embedded security threads, intaglio (raised) printing, latent images, and micro-</text:span></text:p>
          </draw:text-box>
        </draw:frame>
        <draw:frame draw:style-name="gr1" draw:text-style-name="P2" draw:layer="layout" svg:width="15.805cm" svg:height="0.442cm" svg:x="1.793cm" svg:y="25.121cm">
          <draw:text-box>
            <text:p text:style-name="P1"><text:span text:style-name="T1">lettering. By extracting and analyzing both these visible and hidden marks, the proposed technique </text:span></text:p>
          </draw:text-box>
        </draw:frame>
        <draw:frame draw:style-name="gr1" draw:text-style-name="P2" draw:layer="layout" svg:width="13.581cm" svg:height="0.442cm" svg:x="1.793cm" svg:y="25.651cm">
          <draw:text-box>
            <text:p text:style-name="P1"><text:span text:style-name="T1">aims to significantly increase the efficiency and accuracy of counterfeit recognition. <text:s/></text:span></text:p>
          </draw:text-box>
        </draw:frame>
      </draw:page>
      <draw:page draw:name="page12" draw:style-name="dp1" draw:master-page-name="master-page3">
        <draw:frame draw:style-name="gr10" draw:text-style-name="P19" draw:layer="layout" svg:width="0.397cm" svg:height="0.442cm" svg:x="10.303cm" svg:y="26.35cm">
          <draw:text-box>
            <text:p text:style-name="P18"><text:span text:style-name="T1">4</text:span></text:p>
          </draw:text-box>
        </draw:frame>
        <draw:frame draw:style-name="gr5" draw:text-style-name="P6" draw:layer="layout" svg:width="2.628cm" svg:height="0.518cm" svg:x="1.793cm" svg:y="1.81cm">
          <draw:text-box>
            <text:p text:style-name="P1"><text:span text:style-name="T16">CHAPTER 3</text:span></text:p>
          </draw:text-box>
        </draw:frame>
        <draw:frame draw:style-name="gr1" draw:text-style-name="P2" draw:layer="layout" svg:width="0.397cm" svg:height="0.442cm" svg:x="4.415cm" svg:y="1.869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3.857cm" svg:height="0.518cm" svg:x="7.951cm" svg:y="2.341cm">
          <draw:text-box>
            <text:p text:style-name="P1"><text:span text:style-name="T16">METHODOLOGY</text:span></text:p>
          </draw:text-box>
        </draw:frame>
        <draw:frame draw:style-name="gr1" draw:text-style-name="P2" draw:layer="layout" svg:width="0.397cm" svg:height="0.442cm" svg:x="11.801cm" svg:y="2.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759cm" svg:height="0.442cm" svg:x="1.793cm" svg:y="3.28cm">
          <draw:text-box>
            <text:p text:style-name="P1"><text:span text:style-name="T8">3.1 Literature Survey </text:span></text:p>
          </draw:text-box>
        </draw:frame>
        <draw:frame draw:style-name="gr1" draw:text-style-name="P2" draw:layer="layout" svg:width="16.081cm" svg:height="0.442cm" svg:x="1.793cm" svg:y="4.002cm">
          <draw:text-box>
            <text:p text:style-name="P1"><text:span text:style-name="T1">A focused survey of currency-recognition and visually assisted computer vision systems was carried </text:span></text:p>
          </draw:text-box>
        </draw:frame>
        <draw:frame draw:style-name="gr1" draw:text-style-name="P2" draw:layer="layout" svg:width="15.672cm" svg:height="0.442cm" svg:x="1.793cm" svg:y="4.525cm">
          <draw:text-box>
            <text:p text:style-name="P1"><text:span text:style-name="T1">out before the implementation phase. The survey helped <text:s/>identify the strengths of simple template </text:span></text:p>
          </draw:text-box>
        </draw:frame>
        <draw:frame draw:style-name="gr1" draw:text-style-name="P2" draw:layer="layout" svg:width="16.236cm" svg:height="0.442cm" svg:x="1.793cm" svg:y="5.056cm">
          <draw:text-box>
            <text:p text:style-name="P1"><text:span text:style-name="T1">matching for a small fixed dataset and also showed the limitations of such approaches when the input </text:span></text:p>
          </draw:text-box>
        </draw:frame>
        <draw:frame draw:style-name="gr1" draw:text-style-name="P2" draw:layer="layout" svg:width="5.904cm" svg:height="0.442cm" svg:x="1.793cm" svg:y="5.578cm">
          <draw:text-box>
            <text:p text:style-name="P1"><text:span text:style-name="T1">image is tilted, blurred, or poorly lit. </text:span></text:p>
          </draw:text-box>
        </draw:frame>
        <draw:frame draw:style-name="gr1" draw:text-style-name="P2" draw:layer="layout" svg:width="5.151cm" svg:height="0.442cm" svg:x="1.793cm" svg:y="6.441cm">
          <draw:text-box>
            <text:p text:style-name="P1"><text:span text:style-name="T8">3.2 Motivation for the Project </text:span></text:p>
          </draw:text-box>
        </draw:frame>
        <draw:frame draw:style-name="gr1" draw:text-style-name="P2" draw:layer="layout" svg:width="16.411cm" svg:height="0.442cm" svg:x="1.793cm" svg:y="7.164cm">
          <draw:text-box>
            <text:p text:style-name="P1"><text:span text:style-name="T1">The main motivation for this project was the need for an affordable and easy-to-use note classifier that </text:span></text:p>
          </draw:text-box>
        </draw:frame>
        <draw:frame draw:style-name="gr1" draw:text-style-name="P2" draw:layer="layout" svg:width="16.281cm" svg:height="0.442cm" svg:x="1.793cm" svg:y="7.695cm">
          <draw:text-box>
            <text:p text:style-name="P1"><text:span text:style-name="T1">can assist visually impaired users during daily cash handling. Existing commercial solutions are often </text:span></text:p>
          </draw:text-box>
        </draw:frame>
        <draw:frame draw:style-name="gr1" draw:text-style-name="P2" draw:layer="layout" svg:width="15.791cm" svg:height="0.442cm" svg:x="1.793cm" svg:y="8.217cm">
          <draw:text-box>
            <text:p text:style-name="P1"><text:span text:style-name="T1">expensive, unavailable offline, or require specialized devices. This project aims to offer a practical </text:span></text:p>
          </draw:text-box>
        </draw:frame>
        <draw:frame draw:style-name="gr1" draw:text-style-name="P2" draw:layer="layout" svg:width="16.401cm" svg:height="0.442cm" svg:x="1.793cm" svg:y="8.748cm">
          <draw:text-box>
            <text:p text:style-name="P1"><text:span text:style-name="T1">classroom-level solution that runs on a normal laptop or browser and gives immediate audio feedback. </text:span></text:p>
          </draw:text-box>
        </draw:frame>
        <draw:frame draw:style-name="gr1" draw:text-style-name="P2" draw:layer="layout" svg:width="5.928cm" svg:height="0.442cm" svg:x="1.793cm" svg:y="9.603cm">
          <draw:text-box>
            <text:p text:style-name="P1"><text:span text:style-name="T8">3.3 System Components and Tools </text:span></text:p>
          </draw:text-box>
        </draw:frame>
        <draw:frame draw:style-name="gr1" draw:text-style-name="P2" draw:layer="layout" svg:width="15.664cm" svg:height="0.442cm" svg:x="1.793cm" svg:y="10.325cm">
          <draw:text-box>
            <text:p text:style-name="P1"><text:span text:style-name="T1">The system uses Python, OpenCV, NumPy, and pyttsx3 for the desktop module. On the web side, </text:span></text:p>
          </draw:text-box>
        </draw:frame>
        <draw:frame draw:style-name="gr1" draw:text-style-name="P2" draw:layer="layout" svg:width="16.457cm" svg:height="0.442cm" svg:x="1.793cm" svg:y="10.856cm">
          <draw:text-box>
            <text:p text:style-name="P1"><text:span text:style-name="T1">HTML, CSS, JavaScript, and the browser speech synthesis API provide the interface and voice output. </text:span></text:p>
          </draw:text-box>
        </draw:frame>
        <draw:frame draw:style-name="gr1" draw:text-style-name="P2" draw:layer="layout" svg:width="16.445cm" svg:height="0.442cm" svg:x="1.793cm" svg:y="11.379cm">
          <draw:text-box>
            <text:p text:style-name="P1"><text:span text:style-name="T1">The optional cloud path uses a Roboflow detection endpoint. The dataset folder contains template note </text:span></text:p>
          </draw:text-box>
        </draw:frame>
        <draw:frame draw:style-name="gr1" draw:text-style-name="P2" draw:layer="layout" svg:width="8.587cm" svg:height="0.442cm" svg:x="1.793cm" svg:y="11.91cm">
          <draw:text-box>
            <text:p text:style-name="P1"><text:span text:style-name="T1">images that are matched against live webcam frames. </text:span></text:p>
          </draw:text-box>
        </draw:frame>
        <draw:frame draw:style-name="gr1" draw:text-style-name="P2" draw:layer="layout" svg:width="0.397cm" svg:height="0.442cm" svg:x="1.793cm" svg:y="12.765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7.861cm" svg:height="0.407cm" svg:x="5.934cm" svg:y="13.416cm">
          <draw:text-box>
            <text:p text:style-name="P1"><text:span text:style-name="T14">TABLE 1 <text:s/>System Components and Their Purpose</text:span></text:p>
          </draw:text-box>
        </draw:frame>
        <draw:frame draw:style-name="gr1" draw:text-style-name="P2" draw:layer="layout" svg:width="0.397cm" svg:height="0.442cm" svg:x="13.818cm" svg:y="13.387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823cm" svg:height="0.407cm" svg:x="3.478cm" svg:y="14.246cm">
          <draw:text-box>
            <text:p text:style-name="P1"><text:span text:style-name="T14">Component</text:span></text:p>
          </draw:text-box>
        </draw:frame>
        <draw:frame draw:style-name="gr1" draw:text-style-name="P2" draw:layer="layout" svg:width="0.397cm" svg:height="0.442cm" svg:x="5.304cm" svg:y="14.21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276cm" svg:height="0.407cm" svg:x="11.519cm" svg:y="14.246cm">
          <draw:text-box>
            <text:p text:style-name="P1"><text:span text:style-name="T14">Purpose</text:span></text:p>
          </draw:text-box>
        </draw:frame>
        <draw:polygon draw:style-name="gr15" draw:text-style-name="P15" draw:layer="layout" svg:width="0.017cm" svg:height="0.149cm" svg:x="1.792cm" svg:y="14.09cm" svg:viewBox="0 0 18 150" draw:points="0,0 18,0 18,150 0,150">
          <text:p/>
        </draw:polygon>
        <draw:polygon draw:style-name="gr15" draw:text-style-name="P15" draw:layer="layout" svg:width="0.017cm" svg:height="0.016cm" svg:x="1.792cm" svg:y="14.09cm" svg:viewBox="0 0 18 17" draw:points="0,0 18,0 18,17 0,17">
          <text:p/>
        </draw:polygon>
        <draw:polygon draw:style-name="gr15" draw:text-style-name="P15" draw:layer="layout" svg:width="5.162cm" svg:height="0.016cm" svg:x="1.809cm" svg:y="14.09cm" svg:viewBox="0 0 5163 17" draw:points="0,0 5163,0 5163,17 0,17">
          <text:p/>
        </draw:polygon>
        <draw:polygon draw:style-name="gr15" draw:text-style-name="P15" draw:layer="layout" svg:width="0.017cm" svg:height="0.133cm" svg:x="6.971cm" svg:y="14.106cm" svg:viewBox="0 0 18 134" draw:points="0,0 18,0 18,134 0,134">
          <text:p/>
        </draw:polygon>
        <draw:polygon draw:style-name="gr15" draw:text-style-name="P15" draw:layer="layout" svg:width="0.017cm" svg:height="0.016cm" svg:x="6.971cm" svg:y="14.09cm" svg:viewBox="0 0 18 17" draw:points="0,0 18,0 18,17 0,17">
          <text:p/>
        </draw:polygon>
        <draw:polygon draw:style-name="gr15" draw:text-style-name="P15" draw:layer="layout" svg:width="10.341cm" svg:height="0.016cm" svg:x="6.988cm" svg:y="14.09cm" svg:viewBox="0 0 10342 17" draw:points="0,0 10342,0 10342,17 0,17">
          <text:p/>
        </draw:polygon>
        <draw:polygon draw:style-name="gr15" draw:text-style-name="P15" draw:layer="layout" svg:width="0.016cm" svg:height="0.149cm" svg:x="17.329cm" svg:y="14.09cm" svg:viewBox="0 0 17 150" draw:points="0,0 17,0 17,150 0,150">
          <text:p/>
        </draw:polygon>
        <draw:polygon draw:style-name="gr15" draw:text-style-name="P15" draw:layer="layout" svg:width="0.016cm" svg:height="0.016cm" svg:x="17.329cm" svg:y="14.09cm" svg:viewBox="0 0 17 17" draw:points="0,0 17,0 17,17 0,17">
          <text:p/>
        </draw:polygon>
        <draw:polygon draw:style-name="gr15" draw:text-style-name="P15" draw:layer="layout" svg:width="0.017cm" svg:height="0.547cm" svg:x="1.792cm" svg:y="14.239cm" svg:viewBox="0 0 18 548" draw:points="0,0 18,0 18,548 0,548">
          <text:p/>
        </draw:polygon>
        <draw:polygon draw:style-name="gr15" draw:text-style-name="P15" draw:layer="layout" svg:width="0.017cm" svg:height="0.547cm" svg:x="6.971cm" svg:y="14.239cm" svg:viewBox="0 0 18 548" draw:points="0,0 18,0 18,548 0,548">
          <text:p/>
        </draw:polygon>
        <draw:polygon draw:style-name="gr15" draw:text-style-name="P15" draw:layer="layout" svg:width="0.016cm" svg:height="0.547cm" svg:x="17.329cm" svg:y="14.239cm" svg:viewBox="0 0 17 548" draw:points="0,0 17,0 17,548 0,548">
          <text:p/>
        </draw:polygon>
        <draw:frame draw:style-name="gr1" draw:text-style-name="P2" draw:layer="layout" svg:width="0.397cm" svg:height="0.442cm" svg:x="12.798cm" svg:y="14.21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296cm" svg:height="0.407cm" svg:x="2cm" svg:y="14.951cm">
          <draw:text-box>
            <text:p text:style-name="P1"><text:span text:style-name="T15">OpenCV</text:span></text:p>
          </draw:text-box>
        </draw:frame>
        <draw:frame draw:style-name="gr1" draw:text-style-name="P2" draw:layer="layout" svg:width="0.397cm" svg:height="0.442cm" svg:x="3.295cm" svg:y="14.92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8.21cm" svg:height="0.407cm" svg:x="7.179cm" svg:y="14.951cm">
          <draw:text-box>
            <text:p text:style-name="P1"><text:span text:style-name="T15">Capture webcam frames and perform template matching</text:span></text:p>
          </draw:text-box>
        </draw:frame>
        <draw:polygon draw:style-name="gr15" draw:text-style-name="P15" draw:layer="layout" svg:width="0.017cm" svg:height="0.15cm" svg:x="1.792cm" svg:y="14.786cm" svg:viewBox="0 0 18 151" draw:points="0,0 18,0 18,151 0,151">
          <text:p/>
        </draw:polygon>
        <draw:polygon draw:style-name="gr15" draw:text-style-name="P15" draw:layer="layout" svg:width="5.162cm" svg:height="0.017cm" svg:x="1.809cm" svg:y="14.786cm" svg:viewBox="0 0 5163 18" draw:points="0,0 5163,0 5163,18 0,18">
          <text:p/>
        </draw:polygon>
        <draw:polygon draw:style-name="gr15" draw:text-style-name="P15" draw:layer="layout" svg:width="0.017cm" svg:height="0.15cm" svg:x="6.971cm" svg:y="14.786cm" svg:viewBox="0 0 18 151" draw:points="0,0 18,0 18,151 0,151">
          <text:p/>
        </draw:polygon>
        <draw:polygon draw:style-name="gr15" draw:text-style-name="P15" draw:layer="layout" svg:width="10.341cm" svg:height="0.017cm" svg:x="6.988cm" svg:y="14.786cm" svg:viewBox="0 0 10342 18" draw:points="0,0 10342,0 10342,18 0,18">
          <text:p/>
        </draw:polygon>
        <draw:polygon draw:style-name="gr15" draw:text-style-name="P15" draw:layer="layout" svg:width="0.016cm" svg:height="0.15cm" svg:x="17.329cm" svg:y="14.786cm" svg:viewBox="0 0 17 151" draw:points="0,0 17,0 17,151 0,151">
          <text:p/>
        </draw:polygon>
        <draw:polygon draw:style-name="gr15" draw:text-style-name="P15" draw:layer="layout" svg:width="0.017cm" svg:height="0.556cm" svg:x="1.792cm" svg:y="14.936cm" svg:viewBox="0 0 18 557" draw:points="0,0 18,0 18,557 0,557">
          <text:p/>
        </draw:polygon>
        <draw:polygon draw:style-name="gr15" draw:text-style-name="P15" draw:layer="layout" svg:width="0.017cm" svg:height="0.556cm" svg:x="6.971cm" svg:y="14.936cm" svg:viewBox="0 0 18 557" draw:points="0,0 18,0 18,557 0,557">
          <text:p/>
        </draw:polygon>
        <draw:polygon draw:style-name="gr15" draw:text-style-name="P15" draw:layer="layout" svg:width="0.016cm" svg:height="0.556cm" svg:x="17.329cm" svg:y="14.936cm" svg:viewBox="0 0 17 557" draw:points="0,0 17,0 17,557 0,557">
          <text:p/>
        </draw:polygon>
        <draw:frame draw:style-name="gr1" draw:text-style-name="P2" draw:layer="layout" svg:width="0.397cm" svg:height="0.442cm" svg:x="15.412cm" svg:y="14.92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074cm" svg:height="0.407cm" svg:x="2cm" svg:y="15.657cm">
          <draw:text-box>
            <text:p text:style-name="P1"><text:span text:style-name="T15">pyttsx3</text:span></text:p>
          </draw:text-box>
        </draw:frame>
        <draw:frame draw:style-name="gr1" draw:text-style-name="P2" draw:layer="layout" svg:width="0.397cm" svg:height="0.442cm" svg:x="3.079cm" svg:y="15.62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8.12cm" svg:height="0.407cm" svg:x="7.179cm" svg:y="15.657cm">
          <draw:text-box>
            <text:p text:style-name="P1"><text:span text:style-name="T15">Offline speech output for denomination announcements</text:span></text:p>
          </draw:text-box>
        </draw:frame>
        <draw:polygon draw:style-name="gr15" draw:text-style-name="P15" draw:layer="layout" svg:width="0.017cm" svg:height="0.15cm" svg:x="1.792cm" svg:y="15.492cm" svg:viewBox="0 0 18 151" draw:points="0,0 18,0 18,151 0,151">
          <text:p/>
        </draw:polygon>
        <draw:polygon draw:style-name="gr15" draw:text-style-name="P15" draw:layer="layout" svg:width="5.162cm" svg:height="0.016cm" svg:x="1.809cm" svg:y="15.492cm" svg:viewBox="0 0 5163 17" draw:points="0,0 5163,0 5163,17 0,17">
          <text:p/>
        </draw:polygon>
        <draw:polygon draw:style-name="gr15" draw:text-style-name="P15" draw:layer="layout" svg:width="0.017cm" svg:height="0.15cm" svg:x="6.971cm" svg:y="15.492cm" svg:viewBox="0 0 18 151" draw:points="0,0 18,0 18,151 0,151">
          <text:p/>
        </draw:polygon>
        <draw:polygon draw:style-name="gr15" draw:text-style-name="P15" draw:layer="layout" svg:width="10.341cm" svg:height="0.016cm" svg:x="6.988cm" svg:y="15.492cm" svg:viewBox="0 0 10342 17" draw:points="0,0 10342,0 10342,17 0,17">
          <text:p/>
        </draw:polygon>
        <draw:polygon draw:style-name="gr15" draw:text-style-name="P15" draw:layer="layout" svg:width="0.016cm" svg:height="0.15cm" svg:x="17.329cm" svg:y="15.492cm" svg:viewBox="0 0 17 151" draw:points="0,0 17,0 17,151 0,151">
          <text:p/>
        </draw:polygon>
        <draw:polygon draw:style-name="gr15" draw:text-style-name="P15" draw:layer="layout" svg:width="0.017cm" svg:height="0.556cm" svg:x="1.792cm" svg:y="15.642cm" svg:viewBox="0 0 18 557" draw:points="0,0 18,0 18,557 0,557">
          <text:p/>
        </draw:polygon>
        <draw:polygon draw:style-name="gr15" draw:text-style-name="P15" draw:layer="layout" svg:width="0.017cm" svg:height="0.556cm" svg:x="6.971cm" svg:y="15.642cm" svg:viewBox="0 0 18 557" draw:points="0,0 18,0 18,557 0,557">
          <text:p/>
        </draw:polygon>
        <draw:polygon draw:style-name="gr15" draw:text-style-name="P15" draw:layer="layout" svg:width="0.016cm" svg:height="0.556cm" svg:x="17.329cm" svg:y="15.642cm" svg:viewBox="0 0 17 557" draw:points="0,0 17,0 17,557 0,557">
          <text:p/>
        </draw:polygon>
        <draw:frame draw:style-name="gr1" draw:text-style-name="P2" draw:layer="layout" svg:width="0.397cm" svg:height="0.442cm" svg:x="15.321cm" svg:y="15.62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592cm" svg:height="0.407cm" svg:x="2cm" svg:y="16.354cm">
          <draw:text-box>
            <text:p text:style-name="P1"><text:span text:style-name="T15">HTML / CSS / JS</text:span></text:p>
          </draw:text-box>
        </draw:frame>
        <draw:frame draw:style-name="gr1" draw:text-style-name="P2" draw:layer="layout" svg:width="0.397cm" svg:height="0.442cm" svg:x="4.597cm" svg:y="16.325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6.704cm" svg:height="0.407cm" svg:x="7.179cm" svg:y="16.354cm">
          <draw:text-box>
            <text:p text:style-name="P1"><text:span text:style-name="T15">Browser interface for the scanning experience</text:span></text:p>
          </draw:text-box>
        </draw:frame>
        <draw:polygon draw:style-name="gr15" draw:text-style-name="P15" draw:layer="layout" svg:width="0.017cm" svg:height="0.149cm" svg:x="1.792cm" svg:y="16.198cm" svg:viewBox="0 0 18 150" draw:points="0,0 18,0 18,150 0,150">
          <text:p/>
        </draw:polygon>
        <draw:polygon draw:style-name="gr15" draw:text-style-name="P15" draw:layer="layout" svg:width="5.162cm" svg:height="0.016cm" svg:x="1.809cm" svg:y="16.198cm" svg:viewBox="0 0 5163 17" draw:points="0,0 5163,0 5163,17 0,17">
          <text:p/>
        </draw:polygon>
        <draw:polygon draw:style-name="gr15" draw:text-style-name="P15" draw:layer="layout" svg:width="0.017cm" svg:height="0.149cm" svg:x="6.971cm" svg:y="16.198cm" svg:viewBox="0 0 18 150" draw:points="0,0 18,0 18,150 0,150">
          <text:p/>
        </draw:polygon>
        <draw:polygon draw:style-name="gr15" draw:text-style-name="P15" draw:layer="layout" svg:width="10.341cm" svg:height="0.016cm" svg:x="6.988cm" svg:y="16.198cm" svg:viewBox="0 0 10342 17" draw:points="0,0 10342,0 10342,17 0,17">
          <text:p/>
        </draw:polygon>
        <draw:polygon draw:style-name="gr15" draw:text-style-name="P15" draw:layer="layout" svg:width="0.016cm" svg:height="0.149cm" svg:x="17.329cm" svg:y="16.198cm" svg:viewBox="0 0 17 150" draw:points="0,0 17,0 17,150 0,150">
          <text:p/>
        </draw:polygon>
        <draw:polygon draw:style-name="gr15" draw:text-style-name="P15" draw:layer="layout" svg:width="0.017cm" svg:height="0.548cm" svg:x="1.792cm" svg:y="16.347cm" svg:viewBox="0 0 18 549" draw:points="0,0 18,0 18,549 0,549">
          <text:p/>
        </draw:polygon>
        <draw:polygon draw:style-name="gr15" draw:text-style-name="P15" draw:layer="layout" svg:width="0.017cm" svg:height="0.548cm" svg:x="6.971cm" svg:y="16.347cm" svg:viewBox="0 0 18 549" draw:points="0,0 18,0 18,549 0,549">
          <text:p/>
        </draw:polygon>
        <draw:polygon draw:style-name="gr15" draw:text-style-name="P15" draw:layer="layout" svg:width="0.016cm" svg:height="0.548cm" svg:x="17.329cm" svg:y="16.347cm" svg:viewBox="0 0 17 549" draw:points="0,0 17,0 17,549 0,549">
          <text:p/>
        </draw:polygon>
        <draw:frame draw:style-name="gr1" draw:text-style-name="P2" draw:layer="layout" svg:width="0.397cm" svg:height="0.442cm" svg:x="13.901cm" svg:y="16.325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136cm" svg:height="0.407cm" svg:x="2cm" svg:y="17.059cm">
          <draw:text-box>
            <text:p text:style-name="P1"><text:span text:style-name="T15">Roboflow API</text:span></text:p>
          </draw:text-box>
        </draw:frame>
        <draw:frame draw:style-name="gr1" draw:text-style-name="P2" draw:layer="layout" svg:width="0.397cm" svg:height="0.442cm" svg:x="4.141cm" svg:y="17.0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7.503cm" svg:height="0.407cm" svg:x="7.179cm" svg:y="17.059cm">
          <draw:text-box>
            <text:p text:style-name="P1"><text:span text:style-name="T15">Optional cloud-based inference for the web module</text:span></text:p>
          </draw:text-box>
        </draw:frame>
        <draw:polygon draw:style-name="gr15" draw:text-style-name="P15" draw:layer="layout" svg:width="0.017cm" svg:height="0.149cm" svg:x="1.792cm" svg:y="16.895cm" svg:viewBox="0 0 18 150" draw:points="0,0 18,0 18,150 0,150">
          <text:p/>
        </draw:polygon>
        <draw:polygon draw:style-name="gr15" draw:text-style-name="P15" draw:layer="layout" svg:width="5.162cm" svg:height="0.016cm" svg:x="1.809cm" svg:y="16.895cm" svg:viewBox="0 0 5163 17" draw:points="0,0 5163,0 5163,17 0,17">
          <text:p/>
        </draw:polygon>
        <draw:polygon draw:style-name="gr15" draw:text-style-name="P15" draw:layer="layout" svg:width="0.017cm" svg:height="0.149cm" svg:x="6.971cm" svg:y="16.895cm" svg:viewBox="0 0 18 150" draw:points="0,0 18,0 18,150 0,150">
          <text:p/>
        </draw:polygon>
        <draw:polygon draw:style-name="gr15" draw:text-style-name="P15" draw:layer="layout" svg:width="10.341cm" svg:height="0.016cm" svg:x="6.988cm" svg:y="16.895cm" svg:viewBox="0 0 10342 17" draw:points="0,0 10342,0 10342,17 0,17">
          <text:p/>
        </draw:polygon>
        <draw:polygon draw:style-name="gr15" draw:text-style-name="P15" draw:layer="layout" svg:width="0.016cm" svg:height="0.149cm" svg:x="17.329cm" svg:y="16.895cm" svg:viewBox="0 0 17 150" draw:points="0,0 17,0 17,150 0,150">
          <text:p/>
        </draw:polygon>
        <draw:polygon draw:style-name="gr15" draw:text-style-name="P15" draw:layer="layout" svg:width="0.017cm" svg:height="0.556cm" svg:x="1.792cm" svg:y="17.044cm" svg:viewBox="0 0 18 557" draw:points="0,0 18,0 18,557 0,557">
          <text:p/>
        </draw:polygon>
        <draw:polygon draw:style-name="gr15" draw:text-style-name="P15" draw:layer="layout" svg:width="0.017cm" svg:height="0.556cm" svg:x="6.971cm" svg:y="17.044cm" svg:viewBox="0 0 18 557" draw:points="0,0 18,0 18,557 0,557">
          <text:p/>
        </draw:polygon>
        <draw:polygon draw:style-name="gr15" draw:text-style-name="P15" draw:layer="layout" svg:width="0.016cm" svg:height="0.556cm" svg:x="17.329cm" svg:y="17.044cm" svg:viewBox="0 0 17 557" draw:points="0,0 17,0 17,557 0,557">
          <text:p/>
        </draw:polygon>
        <draw:frame draw:style-name="gr1" draw:text-style-name="P2" draw:layer="layout" svg:width="0.397cm" svg:height="0.442cm" svg:x="14.707cm" svg:y="17.0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115cm" svg:height="0.407cm" svg:x="2cm" svg:y="17.756cm">
          <draw:text-box>
            <text:p text:style-name="P1"><text:span text:style-name="T15">NumPy</text:span></text:p>
          </draw:text-box>
        </draw:frame>
        <draw:frame draw:style-name="gr1" draw:text-style-name="P2" draw:layer="layout" svg:width="0.397cm" svg:height="0.442cm" svg:x="3.113cm" svg:y="17.727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5.603cm" svg:height="0.407cm" svg:x="7.179cm" svg:y="17.756cm">
          <draw:text-box>
            <text:p text:style-name="P1"><text:span text:style-name="T15">Array operations for image processing</text:span></text:p>
          </draw:text-box>
        </draw:frame>
        <draw:polygon draw:style-name="gr15" draw:text-style-name="P15" draw:layer="layout" svg:width="0.017cm" svg:height="0.149cm" svg:x="1.792cm" svg:y="17.6cm" svg:viewBox="0 0 18 150" draw:points="0,0 18,0 18,150 0,150">
          <text:p/>
        </draw:polygon>
        <draw:polygon draw:style-name="gr15" draw:text-style-name="P15" draw:layer="layout" svg:width="5.162cm" svg:height="0.016cm" svg:x="1.809cm" svg:y="17.6cm" svg:viewBox="0 0 5163 17" draw:points="0,0 5163,0 5163,17 0,17">
          <text:p/>
        </draw:polygon>
        <draw:polygon draw:style-name="gr15" draw:text-style-name="P15" draw:layer="layout" svg:width="0.017cm" svg:height="0.149cm" svg:x="6.971cm" svg:y="17.6cm" svg:viewBox="0 0 18 150" draw:points="0,0 18,0 18,150 0,150">
          <text:p/>
        </draw:polygon>
        <draw:polygon draw:style-name="gr15" draw:text-style-name="P15" draw:layer="layout" svg:width="10.341cm" svg:height="0.016cm" svg:x="6.988cm" svg:y="17.6cm" svg:viewBox="0 0 10342 17" draw:points="0,0 10342,0 10342,17 0,17">
          <text:p/>
        </draw:polygon>
        <draw:polygon draw:style-name="gr15" draw:text-style-name="P15" draw:layer="layout" svg:width="0.016cm" svg:height="0.149cm" svg:x="17.329cm" svg:y="17.6cm" svg:viewBox="0 0 17 150" draw:points="0,0 17,0 17,150 0,150">
          <text:p/>
        </draw:polygon>
        <draw:polygon draw:style-name="gr15" draw:text-style-name="P15" draw:layer="layout" svg:width="0.017cm" svg:height="0.548cm" svg:x="1.792cm" svg:y="17.749cm" svg:viewBox="0 0 18 549" draw:points="0,0 18,0 18,549 0,549">
          <text:p/>
        </draw:polygon>
        <draw:polygon draw:style-name="gr15" draw:text-style-name="P15" draw:layer="layout" svg:width="0.017cm" svg:height="0.016cm" svg:x="1.792cm" svg:y="18.297cm" svg:viewBox="0 0 18 17" draw:points="0,0 18,0 18,17 0,17">
          <text:p/>
        </draw:polygon>
        <draw:polygon draw:style-name="gr15" draw:text-style-name="P15" draw:layer="layout" svg:width="0.017cm" svg:height="0.016cm" svg:x="1.792cm" svg:y="18.297cm" svg:viewBox="0 0 18 17" draw:points="0,0 18,0 18,17 0,17">
          <text:p/>
        </draw:polygon>
        <draw:polygon draw:style-name="gr15" draw:text-style-name="P15" draw:layer="layout" svg:width="5.162cm" svg:height="0.016cm" svg:x="1.809cm" svg:y="18.297cm" svg:viewBox="0 0 5163 17" draw:points="0,0 5163,0 5163,17 0,17">
          <text:p/>
        </draw:polygon>
        <draw:polygon draw:style-name="gr15" draw:text-style-name="P15" draw:layer="layout" svg:width="0.017cm" svg:height="0.548cm" svg:x="6.971cm" svg:y="17.749cm" svg:viewBox="0 0 18 549" draw:points="0,0 18,0 18,549 0,549">
          <text:p/>
        </draw:polygon>
        <draw:polygon draw:style-name="gr15" draw:text-style-name="P15" draw:layer="layout" svg:width="0.017cm" svg:height="0.016cm" svg:x="6.971cm" svg:y="18.297cm" svg:viewBox="0 0 18 17" draw:points="0,0 18,0 18,17 0,17">
          <text:p/>
        </draw:polygon>
        <draw:polygon draw:style-name="gr15" draw:text-style-name="P15" draw:layer="layout" svg:width="10.341cm" svg:height="0.016cm" svg:x="6.988cm" svg:y="18.297cm" svg:viewBox="0 0 10342 17" draw:points="0,0 10342,0 10342,17 0,17">
          <text:p/>
        </draw:polygon>
        <draw:polygon draw:style-name="gr15" draw:text-style-name="P15" draw:layer="layout" svg:width="0.016cm" svg:height="0.548cm" svg:x="17.329cm" svg:y="17.749cm" svg:viewBox="0 0 17 549" draw:points="0,0 17,0 17,549 0,549">
          <text:p/>
        </draw:polygon>
        <draw:polygon draw:style-name="gr15" draw:text-style-name="P15" draw:layer="layout" svg:width="0.016cm" svg:height="0.016cm" svg:x="17.329cm" svg:y="18.297cm" svg:viewBox="0 0 17 17" draw:points="0,0 17,0 17,17 0,17">
          <text:p/>
        </draw:polygon>
        <draw:polygon draw:style-name="gr15" draw:text-style-name="P15" draw:layer="layout" svg:width="0.016cm" svg:height="0.016cm" svg:x="17.329cm" svg:y="18.297cm" svg:viewBox="0 0 17 17" draw:points="0,0 17,0 17,17 0,17">
          <text:p/>
        </draw:polygon>
        <draw:frame draw:style-name="gr1" draw:text-style-name="P2" draw:layer="layout" svg:width="0.397cm" svg:height="0.442cm" svg:x="12.798cm" svg:y="17.7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1.793cm" svg:y="18.3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83cm" svg:height="0.442cm" svg:x="1.793cm" svg:y="19.063cm">
          <draw:text-box>
            <text:p text:style-name="P1"><text:span text:style-name="T8">3.4 Code </text:span></text:p>
          </draw:text-box>
        </draw:frame>
        <draw:frame draw:style-name="gr1" draw:text-style-name="P2" draw:layer="layout" svg:width="16.312cm" svg:height="0.442cm" svg:x="1.793cm" svg:y="19.785cm">
          <draw:text-box>
            <text:p text:style-name="P1"><text:span text:style-name="T1">The core detection logic for the desktop module loads stored note templates, compares each incoming </text:span></text:p>
          </draw:text-box>
        </draw:frame>
        <draw:frame draw:style-name="gr1" draw:text-style-name="P2" draw:layer="layout" svg:width="15.827cm" svg:height="0.442cm" svg:x="1.793cm" svg:y="20.307cm">
          <draw:text-box>
            <text:p text:style-name="P1"><text:span text:style-name="T1">webcam frame against them using OpenCV template matching, and triggers speech output through </text:span></text:p>
          </draw:text-box>
        </draw:frame>
        <draw:frame draw:style-name="gr1" draw:text-style-name="P2" draw:layer="layout" svg:width="13.374cm" svg:height="0.442cm" svg:x="1.793cm" svg:y="20.838cm">
          <draw:text-box>
            <text:p text:style-name="P1"><text:span text:style-name="T1">pyttsx3 once the similarity score crosses the confidence threshold, as shown below. </text:span></text:p>
          </draw:text-box>
        </draw:frame>
        <draw:frame draw:style-name="gr18" draw:text-style-name="P20" draw:layer="layout" svg:width="2.085cm" svg:height="0.395cm" svg:x="1.793cm" svg:y="21.675cm">
          <draw:text-box>
            <text:p text:style-name="P1"><text:span text:style-name="T17">import cv2</text:span></text:p>
          </draw:text-box>
        </draw:frame>
        <draw:frame draw:style-name="gr1" draw:text-style-name="P2" draw:layer="layout" svg:width="0.397cm" svg:height="0.442cm" svg:x="3.884cm" svg:y="21.611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2.918cm" svg:height="0.395cm" svg:x="1.793cm" svg:y="22.115cm">
          <draw:text-box>
            <text:p text:style-name="P1"><text:span text:style-name="T17">import pyttsx3</text:span></text:p>
          </draw:text-box>
        </draw:frame>
        <draw:frame draw:style-name="gr1" draw:text-style-name="P2" draw:layer="layout" svg:width="0.397cm" svg:height="0.442cm" svg:x="4.722cm" svg:y="22.05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0.347cm" svg:height="0.395cm" svg:x="1.793cm" svg:y="22.629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0.397cm" svg:height="0.442cm" svg:x="2cm" svg:y="22.565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4.793cm" svg:height="0.395cm" svg:x="1.793cm" svg:y="23.052cm">
          <draw:text-box>
            <text:p text:style-name="P1"><text:span text:style-name="T17">engine = pyttsx3.init()</text:span></text:p>
          </draw:text-box>
        </draw:frame>
        <draw:frame draw:style-name="gr1" draw:text-style-name="P2" draw:layer="layout" svg:width="0.397cm" svg:height="0.442cm" svg:x="6.606cm" svg:y="22.988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4.377cm" svg:height="0.395cm" svg:x="1.793cm" svg:y="23.484cm">
          <draw:text-box>
            <text:p text:style-name="P1"><text:span text:style-name="T17">MATCH_THRESHOLD = 0.7</text:span></text:p>
          </draw:text-box>
        </draw:frame>
        <draw:frame draw:style-name="gr1" draw:text-style-name="P2" draw:layer="layout" svg:width="0.397cm" svg:height="0.442cm" svg:x="6.183cm" svg:y="23.419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0.347cm" svg:height="0.395cm" svg:x="1.793cm" svg:y="23.999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0.397cm" svg:height="0.442cm" svg:x="2cm" svg:y="23.934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8.959cm" svg:height="0.395cm" svg:x="1.793cm" svg:y="24.422cm">
          <draw:text-box>
            <text:p text:style-name="P1"><text:span text:style-name="T17">def predict_denomination(frame, templates):</text:span></text:p>
          </draw:text-box>
        </draw:frame>
        <draw:frame draw:style-name="gr1" draw:text-style-name="P2" draw:layer="layout" svg:width="0.397cm" svg:height="0.442cm" svg:x="10.789cm" svg:y="24.357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10.418cm" svg:height="0.395cm" svg:x="1.793cm" svg:y="24.853cm">
          <draw:text-box>
            <text:p text:style-name="P1"><text:span text:style-name="T17"><text:s text:c="4"/>gray = cv2.cvtColor(frame, cv2.COLOR_BGR2GRAY)</text:span></text:p>
          </draw:text-box>
        </draw:frame>
        <draw:frame draw:style-name="gr1" draw:text-style-name="P2" draw:layer="layout" svg:width="0.397cm" svg:height="0.442cm" svg:x="12.249cm" svg:y="24.789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7.501cm" svg:height="0.395cm" svg:x="1.793cm" svg:y="25.293cm">
          <draw:text-box>
            <text:p text:style-name="P1"><text:span text:style-name="T17"><text:s text:c="4"/>best_score, best_label = 0, None</text:span></text:p>
          </draw:text-box>
        </draw:frame>
        <draw:frame draw:style-name="gr1" draw:text-style-name="P2" draw:layer="layout" svg:width="0.397cm" svg:height="0.442cm" svg:x="9.32cm" svg:y="25.228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9.376cm" svg:height="0.395cm" svg:x="1.793cm" svg:y="25.724cm">
          <draw:text-box>
            <text:p text:style-name="P1"><text:span text:style-name="T17"><text:s text:c="4"/>for label, template in templates.items():</text:span></text:p>
          </draw:text-box>
        </draw:frame>
        <draw:frame draw:style-name="gr1" draw:text-style-name="P2" draw:layer="layout" svg:width="0.397cm" svg:height="0.442cm" svg:x="11.204cm" svg:y="25.66cm">
          <draw:text-box>
            <text:p text:style-name="P1"><text:span text:style-name="T1"><text:s/></text:span></text:p>
          </draw:text-box>
        </draw:frame>
      </draw:page>
      <draw:page draw:name="page13" draw:style-name="dp1" draw:master-page-name="master-page62">
        <draw:frame draw:style-name="gr1" draw:text-style-name="P2" draw:layer="layout" svg:width="0.397cm" svg:height="0.442cm" svg:x="10.303cm" svg:y="26.35cm">
          <draw:text-box>
            <text:p text:style-name="P1"><text:span text:style-name="T1">5</text:span></text:p>
          </draw:text-box>
        </draw:frame>
        <draw:frame draw:style-name="gr18" draw:text-style-name="P20" draw:layer="layout" svg:width="15.001cm" svg:height="0.395cm" svg:x="1.793cm" svg:y="1.793cm">
          <draw:text-box>
            <text:p text:style-name="P1"><text:span text:style-name="T17"><text:s text:c="8"/>result = cv2.matchTemplate(gray, template, cv2.TM_CCOEFF_NORMED)</text:span></text:p>
          </draw:text-box>
        </draw:frame>
        <draw:frame draw:style-name="gr1" draw:text-style-name="P2" draw:layer="layout" svg:width="0.397cm" svg:height="0.442cm" svg:x="16.856cm" svg:y="1.728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5.835cm" svg:height="0.395cm" svg:x="1.793cm" svg:y="2.224cm">
          <draw:text-box>
            <text:p text:style-name="P1"><text:span text:style-name="T17"><text:s text:c="8"/>score = result.max()</text:span></text:p>
          </draw:text-box>
        </draw:frame>
        <draw:frame draw:style-name="gr1" draw:text-style-name="P2" draw:layer="layout" svg:width="0.397cm" svg:height="0.442cm" svg:x="7.652cm" svg:y="2.16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6.251cm" svg:height="0.395cm" svg:x="1.793cm" svg:y="2.664cm">
          <draw:text-box>
            <text:p text:style-name="P1"><text:span text:style-name="T17"><text:s text:c="8"/>if score &gt; best_score:</text:span></text:p>
          </draw:text-box>
        </draw:frame>
        <draw:frame draw:style-name="gr1" draw:text-style-name="P2" draw:layer="layout" svg:width="0.397cm" svg:height="0.442cm" svg:x="8.067cm" svg:y="2.599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10.209cm" svg:height="0.395cm" svg:x="1.793cm" svg:y="3.095cm">
          <draw:text-box>
            <text:p text:style-name="P1"><text:span text:style-name="T17"><text:s text:c="12"/>best_score, best_label = score, label</text:span></text:p>
          </draw:text-box>
        </draw:frame>
        <draw:frame draw:style-name="gr1" draw:text-style-name="P2" draw:layer="layout" svg:width="0.397cm" svg:height="0.442cm" svg:x="12.042cm" svg:y="3.031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7.71cm" svg:height="0.395cm" svg:x="1.793cm" svg:y="3.527cm">
          <draw:text-box>
            <text:p text:style-name="P1"><text:span text:style-name="T17"><text:s text:c="4"/>if best_score &gt;= MATCH_THRESHOLD:</text:span></text:p>
          </draw:text-box>
        </draw:frame>
        <draw:frame draw:style-name="gr1" draw:text-style-name="P2" draw:layer="layout" svg:width="0.397cm" svg:height="0.442cm" svg:x="9.536cm" svg:y="3.462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7.71cm" svg:height="0.395cm" svg:x="1.793cm" svg:y="3.967cm">
          <draw:text-box>
            <text:p text:style-name="P1"><text:span text:style-name="T17"><text:s text:c="8"/>return best_label, best_score</text:span></text:p>
          </draw:text-box>
        </draw:frame>
        <draw:frame draw:style-name="gr1" draw:text-style-name="P2" draw:layer="layout" svg:width="0.397cm" svg:height="0.442cm" svg:x="9.536cm" svg:y="3.903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5.626cm" svg:height="0.395cm" svg:x="1.793cm" svg:y="4.399cm">
          <draw:text-box>
            <text:p text:style-name="P1"><text:span text:style-name="T17"><text:s text:c="4"/>return None, best_score</text:span></text:p>
          </draw:text-box>
        </draw:frame>
        <draw:frame draw:style-name="gr1" draw:text-style-name="P2" draw:layer="layout" svg:width="0.397cm" svg:height="0.442cm" svg:x="7.445cm" svg:y="4.334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0.347cm" svg:height="0.395cm" svg:x="1.793cm" svg:y="4.913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0.397cm" svg:height="0.442cm" svg:x="2cm" svg:y="4.848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11.043cm" svg:height="0.395cm" svg:x="1.793cm" svg:y="5.336cm">
          <draw:text-box>
            <text:p text:style-name="P1"><text:span text:style-name="T17">label, score = predict_denomination(frame, templates)</text:span></text:p>
          </draw:text-box>
        </draw:frame>
        <draw:frame draw:style-name="gr1" draw:text-style-name="P2" draw:layer="layout" svg:width="0.397cm" svg:height="0.442cm" svg:x="12.881cm" svg:y="5.271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1.877cm" svg:height="0.395cm" svg:x="1.793cm" svg:y="5.767cm">
          <draw:text-box>
            <text:p text:style-name="P1"><text:span text:style-name="T17">if label:</text:span></text:p>
          </draw:text-box>
        </draw:frame>
        <draw:frame draw:style-name="gr1" draw:text-style-name="P2" draw:layer="layout" svg:width="0.397cm" svg:height="0.442cm" svg:x="3.677cm" svg:y="5.703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10.001cm" svg:height="0.395cm" svg:x="1.793cm" svg:y="6.207cm">
          <draw:text-box>
            <text:p text:style-name="P1"><text:span text:style-name="T17"><text:s text:c="4"/>engine.say(f"Detected note: {label} rupees")</text:span></text:p>
          </draw:text-box>
        </draw:frame>
        <draw:frame draw:style-name="gr1" draw:text-style-name="P2" draw:layer="layout" svg:width="0.397cm" svg:height="0.442cm" svg:x="11.835cm" svg:y="6.142cm">
          <draw:text-box>
            <text:p text:style-name="P1"><text:span text:style-name="T1"><text:s/></text:span></text:p>
          </draw:text-box>
        </draw:frame>
        <draw:frame draw:style-name="gr18" draw:text-style-name="P20" draw:layer="layout" svg:width="4.793cm" svg:height="0.395cm" svg:x="1.793cm" svg:y="6.638cm">
          <draw:text-box>
            <text:p text:style-name="P1"><text:span text:style-name="T17"><text:s text:c="4"/>engine.runAndWait()</text:span></text:p>
          </draw:text-box>
        </draw:frame>
        <draw:frame draw:style-name="gr1" draw:text-style-name="P2" draw:layer="layout" svg:width="0.397cm" svg:height="0.442cm" svg:x="6.606cm" svg:y="6.5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1.793cm" svg:y="7.0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312cm" svg:height="0.442cm" svg:x="1.793cm" svg:y="7.886cm">
          <draw:text-box>
            <text:p text:style-name="P1"><text:span text:style-name="T8">3.5 Development Process </text:span></text:p>
          </draw:text-box>
        </draw:frame>
        <draw:frame draw:style-name="gr1" draw:text-style-name="P2" draw:layer="layout" svg:width="16.477cm" svg:height="0.442cm" svg:x="1.793cm" svg:y="8.607cm">
          <draw:text-box>
            <text:p text:style-name="P1"><text:span text:style-name="T1">Development started with the desktop recognizer, because it was the quickest way to test the core idea. </text:span></text:p>
          </draw:text-box>
        </draw:frame>
        <draw:frame draw:style-name="gr1" draw:text-style-name="P2" draw:layer="layout" svg:width="16.721cm" svg:height="0.442cm" svg:x="1.793cm" svg:y="9.13cm">
          <draw:text-box>
            <text:p text:style-name="P1"><text:span text:style-name="T1">The <text:s/>template <text:s/>images <text:s/>were <text:s/>organized <text:s/>in <text:s/>the <text:s/>dataset <text:s/>folder <text:s/>and <text:s/>the <text:s/>matching <text:s/>threshold <text:s/>was <text:s/>tuned </text:span></text:p>
          </draw:text-box>
        </draw:frame>
        <draw:frame draw:style-name="gr1" draw:text-style-name="P2" draw:layer="layout" svg:width="16.201cm" svg:height="0.442cm" svg:x="1.793cm" svg:y="9.661cm">
          <draw:text-box>
            <text:p text:style-name="P1"><text:span text:style-name="T1">experimentally. After the desktop flow worked, the web interface was added so that the project could </text:span></text:p>
          </draw:text-box>
        </draw:frame>
        <draw:frame draw:style-name="gr1" draw:text-style-name="P2" draw:layer="layout" svg:width="9.88cm" svg:height="0.442cm" svg:x="1.793cm" svg:y="10.184cm">
          <draw:text-box>
            <text:p text:style-name="P1"><text:span text:style-name="T1">be demonstrated in a browser using a camera-enabled device. </text:span></text:p>
          </draw:text-box>
        </draw:frame>
        <draw:frame draw:style-name="gr1" draw:text-style-name="P2" draw:layer="layout" svg:width="1.959cm" svg:height="0.442cm" svg:x="1.793cm" svg:y="11.047cm">
          <draw:text-box>
            <text:p text:style-name="P1"><text:span text:style-name="T8">3.6 Testing </text:span></text:p>
          </draw:text-box>
        </draw:frame>
        <draw:frame draw:style-name="gr1" draw:text-style-name="P2" draw:layer="layout" svg:width="16.28cm" svg:height="0.442cm" svg:x="1.793cm" svg:y="11.769cm">
          <draw:text-box>
            <text:p text:style-name="P1"><text:span text:style-name="T1">Testing was carried out using different currency denominations, multiple note positions, and different </text:span></text:p>
          </draw:text-box>
        </draw:frame>
        <draw:frame draw:style-name="gr1" draw:text-style-name="P2" draw:layer="layout" svg:width="15.96cm" svg:height="0.442cm" svg:x="1.793cm" svg:y="12.291cm">
          <draw:text-box>
            <text:p text:style-name="P1"><text:span text:style-name="T1">lighting conditions. The system was checked for correct denomination display, proper voice output, </text:span></text:p>
          </draw:text-box>
        </draw:frame>
        <draw:frame draw:style-name="gr1" draw:text-style-name="P2" draw:layer="layout" svg:width="16.378cm" svg:height="0.442cm" svg:x="1.793cm" svg:y="12.823cm">
          <draw:text-box>
            <text:p text:style-name="P1"><text:span text:style-name="T1">and safe repeated scanning behavior. The desktop version worked best when the note was front-facing </text:span></text:p>
          </draw:text-box>
        </draw:frame>
        <draw:frame draw:style-name="gr1" draw:text-style-name="P2" draw:layer="layout" svg:width="16.354cm" svg:height="0.442cm" svg:x="1.793cm" svg:y="13.345cm">
          <draw:text-box>
            <text:p text:style-name="P1"><text:span text:style-name="T1">and clear, while the web version performed well when the camera frame contained a sharp note image </text:span></text:p>
          </draw:text-box>
        </draw:frame>
        <draw:frame draw:style-name="gr1" draw:text-style-name="P2" draw:layer="layout" svg:width="6.356cm" svg:height="0.442cm" svg:x="1.793cm" svg:y="13.876cm">
          <draw:text-box>
            <text:p text:style-name="P1"><text:span text:style-name="T1">and the network connection was stable. </text:span></text:p>
          </draw:text-box>
        </draw:frame>
        <draw:frame draw:style-name="gr1" draw:text-style-name="P2" draw:layer="layout" svg:width="0.397cm" svg:height="0.442cm" svg:x="1.793cm" svg:y="14.731cm">
          <draw:text-box>
            <text:p text:style-name="P1"><text:span text:style-name="T1"><text:s/></text:span></text:p>
          </draw:text-box>
        </draw:frame>
      </draw:page>
      <draw:page draw:name="page14" draw:style-name="dp1" draw:master-page-name="master-page3">
        <draw:frame draw:style-name="gr1" draw:text-style-name="P2" draw:layer="layout" svg:width="0.397cm" svg:height="0.442cm" svg:x="10.303cm" svg:y="26.35cm">
          <draw:text-box>
            <text:p text:style-name="P1"><text:span text:style-name="T1">6</text:span></text:p>
          </draw:text-box>
        </draw:frame>
        <draw:frame draw:style-name="gr5" draw:text-style-name="P6" draw:layer="layout" svg:width="2.628cm" svg:height="0.518cm" svg:x="1.793cm" svg:y="1.81cm">
          <draw:text-box>
            <text:p text:style-name="P1"><text:span text:style-name="T16">CHAPTER 4</text:span></text:p>
          </draw:text-box>
        </draw:frame>
        <draw:frame draw:style-name="gr1" draw:text-style-name="P2" draw:layer="layout" svg:width="0.397cm" svg:height="0.442cm" svg:x="4.415cm" svg:y="1.869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4.931cm" svg:height="0.518cm" svg:x="7.42cm" svg:y="2.739cm">
          <draw:text-box>
            <text:p text:style-name="P1"><text:span text:style-name="T16">PROJECT OVERVIEW</text:span></text:p>
          </draw:text-box>
        </draw:frame>
        <draw:frame draw:style-name="gr1" draw:text-style-name="P2" draw:layer="layout" svg:width="0.397cm" svg:height="0.442cm" svg:x="12.341cm" svg:y="2.7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215cm" svg:height="0.442cm" svg:x="1.793cm" svg:y="3.678cm">
          <draw:text-box>
            <text:p text:style-name="P1"><text:span text:style-name="T8">4.1 Planning and Design </text:span></text:p>
          </draw:text-box>
        </draw:frame>
        <draw:frame draw:style-name="gr1" draw:text-style-name="P2" draw:layer="layout" svg:width="15.871cm" svg:height="0.442cm" svg:x="1.793cm" svg:y="4.4cm">
          <draw:text-box>
            <text:p text:style-name="P1"><text:span text:style-name="T1">The project was planned as a small but complete accessibility tool. The first design decision was to </text:span></text:p>
          </draw:text-box>
        </draw:frame>
        <draw:frame draw:style-name="gr1" draw:text-style-name="P2" draw:layer="layout" svg:width="16.745cm" svg:height="0.442cm" svg:x="1.793cm" svg:y="4.923cm">
          <draw:text-box>
            <text:p text:style-name="P1"><text:span text:style-name="T1">keep <text:s/>the <text:s/>recognition <text:s/>process <text:s/>lightweight <text:s/>so <text:s/>that <text:s/>it <text:s/>could <text:s/>run <text:s/>on <text:s/>a <text:s/>regular <text:s/>laptop <text:s/>without <text:s/>special </text:span></text:p>
          </draw:text-box>
        </draw:frame>
        <draw:frame draw:style-name="gr1" draw:text-style-name="P2" draw:layer="layout" svg:width="16.445cm" svg:height="0.442cm" svg:x="1.793cm" svg:y="5.454cm">
          <draw:text-box>
            <text:p text:style-name="P1"><text:span text:style-name="T1">hardware. The second decision was to include voice output so that the result would remain useful even </text:span></text:p>
          </draw:text-box>
        </draw:frame>
        <draw:frame draw:style-name="gr1" draw:text-style-name="P2" draw:layer="layout" svg:width="15.506cm" svg:height="0.442cm" svg:x="1.793cm" svg:y="5.977cm">
          <draw:text-box>
            <text:p text:style-name="P1"><text:span text:style-name="T1">when the user could not read the screen. The third decision was to provide both desktop and web </text:span></text:p>
          </draw:text-box>
        </draw:frame>
        <draw:frame draw:style-name="gr1" draw:text-style-name="P2" draw:layer="layout" svg:width="9.372cm" svg:height="0.442cm" svg:x="1.793cm" svg:y="6.507cm">
          <draw:text-box>
            <text:p text:style-name="P1"><text:span text:style-name="T1">options, since different users may prefer different devices. </text:span></text:p>
          </draw:text-box>
        </draw:frame>
        <draw:frame draw:style-name="gr1" draw:text-style-name="P2" draw:layer="layout" svg:width="2.898cm" svg:height="0.442cm" svg:x="1.793cm" svg:y="7.363cm">
          <draw:text-box>
            <text:p text:style-name="P1"><text:span text:style-name="T8">4.2 Logical Flow </text:span></text:p>
          </draw:text-box>
        </draw:frame>
        <draw:frame draw:style-name="gr1" draw:text-style-name="P2" draw:layer="layout" svg:width="16.002cm" svg:height="0.442cm" svg:x="1.793cm" svg:y="8.093cm">
          <draw:text-box>
            <text:p text:style-name="P1"><text:span text:style-name="T1">The logical flow starts from camera capture, moves to preprocessing, then to matching or inference, </text:span></text:p>
          </draw:text-box>
        </draw:frame>
        <draw:frame draw:style-name="gr1" draw:text-style-name="P2" draw:layer="layout" svg:width="16.623cm" svg:height="0.442cm" svg:x="1.793cm" svg:y="8.616cm">
          <draw:text-box>
            <text:p text:style-name="P1"><text:span text:style-name="T1">and ends with the visual and spoken result. In the desktop module, the frame is compared against stored </text:span></text:p>
          </draw:text-box>
        </draw:frame>
        <draw:frame draw:style-name="gr1" draw:text-style-name="P2" draw:layer="layout" svg:width="15.485cm" svg:height="0.442cm" svg:x="1.793cm" svg:y="9.146cm">
          <draw:text-box>
            <text:p text:style-name="P1"><text:span text:style-name="T1">note templates. In the web module, the frame is posted to a Roboflow model, and the response is </text:span></text:p>
          </draw:text-box>
        </draw:frame>
        <draw:frame draw:style-name="gr1" draw:text-style-name="P2" draw:layer="layout" svg:width="15.97cm" svg:height="0.442cm" svg:x="1.793cm" svg:y="9.67cm">
          <draw:text-box>
            <text:p text:style-name="P1"><text:span text:style-name="T1">interpreted as the most likely denomination. The result is then displayed in the interface and spoken </text:span></text:p>
          </draw:text-box>
        </draw:frame>
        <draw:frame draw:style-name="gr1" draw:text-style-name="P2" draw:layer="layout" svg:width="16.237cm" svg:height="0.442cm" svg:x="1.793cm" svg:y="10.192cm">
          <draw:text-box>
            <text:p text:style-name="P1"><text:span text:style-name="T1">immediately so that the user gets both visual and audio confirmation, as illustrated in Figure 1 below. </text:span></text:p>
          </draw:text-box>
        </draw:frame>
        <draw:frame draw:style-name="gr1" draw:text-style-name="P2" draw:layer="layout" svg:width="0.397cm" svg:height="0.442cm" svg:x="16.374cm" svg:y="17.90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6.251cm" svg:height="0.407cm" svg:x="6.747cm" svg:y="18.404cm">
          <draw:text-box>
            <text:p text:style-name="P1"><text:span text:style-name="T14">Figure 1: Currency Classifier Workflow</text:span></text:p>
          </draw:text-box>
        </draw:frame>
        <draw:frame draw:style-name="gr1" draw:text-style-name="P2" draw:layer="layout" svg:width="0.397cm" svg:height="0.442cm" svg:x="13.014cm" svg:y="18.3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782cm" svg:height="0.442cm" svg:x="1.793cm" svg:y="19.295cm">
          <draw:text-box>
            <text:p text:style-name="P1"><text:span text:style-name="T8">4.3 Execution Process </text:span></text:p>
          </draw:text-box>
        </draw:frame>
        <draw:frame draw:style-name="gr1" draw:text-style-name="P2" draw:layer="layout" svg:width="16.644cm" svg:height="0.442cm" svg:x="1.793cm" svg:y="20.017cm">
          <draw:text-box>
            <text:p text:style-name="P1"><text:span text:style-name="T1">The <text:s/>desktop <text:s/>application <text:s/>was <text:s/>executed <text:s/>by <text:s/>loading <text:s/>templates <text:s/>from <text:s/>the <text:s/>dataset <text:s/>folder, <text:s/>opening <text:s/>the </text:span></text:p>
          </draw:text-box>
        </draw:frame>
        <draw:frame draw:style-name="gr1" draw:text-style-name="P2" draw:layer="layout" svg:width="16.477cm" svg:height="0.442cm" svg:x="1.793cm" svg:y="20.539cm">
          <draw:text-box>
            <text:p text:style-name="P1"><text:span text:style-name="T1">webcam, <text:s/>and <text:s/>continuously <text:s/>checking <text:s/>each <text:s/>frame <text:s/>for <text:s/>the <text:s/>highest <text:s/>template <text:s/>match. <text:s/>When <text:s/>a <text:s/>match </text:span></text:p>
          </draw:text-box>
        </draw:frame>
        <draw:frame draw:style-name="gr1" draw:text-style-name="P2" draw:layer="layout" svg:width="15.727cm" svg:height="0.442cm" svg:x="1.793cm" svg:y="21.071cm">
          <draw:text-box>
            <text:p text:style-name="P1"><text:span text:style-name="T1">exceeded the threshold, the note denomination was displayed with a bounding box and announced </text:span></text:p>
          </draw:text-box>
        </draw:frame>
        <draw:frame draw:style-name="gr1" draw:text-style-name="P2" draw:layer="layout" svg:width="16.201cm" svg:height="0.442cm" svg:x="1.793cm" svg:y="21.594cm">
          <draw:text-box>
            <text:p text:style-name="P1"><text:span text:style-name="T1">using the speech engine. The browser version followed a similar user flow but captured a frame from </text:span></text:p>
          </draw:text-box>
        </draw:frame>
        <draw:frame draw:style-name="gr1" draw:text-style-name="P2" draw:layer="layout" svg:width="9.44cm" svg:height="0.442cm" svg:x="1.793cm" svg:y="22.125cm">
          <draw:text-box>
            <text:p text:style-name="P1"><text:span text:style-name="T1">the live video stream and sent it to the Roboflow endpoint. </text:span></text:p>
          </draw:text-box>
        </draw:frame>
        <draw:frame draw:style-name="gr1" draw:text-style-name="P2" draw:layer="layout" svg:width="5.108cm" svg:height="0.442cm" svg:x="1.793cm" svg:y="22.979cm">
          <draw:text-box>
            <text:p text:style-name="P1"><text:span text:style-name="T8">4.4 From Design to Prototype </text:span></text:p>
          </draw:text-box>
        </draw:frame>
        <draw:frame draw:style-name="gr1" draw:text-style-name="P2" draw:layer="layout" svg:width="16.258cm" svg:height="0.442cm" svg:x="1.793cm" svg:y="23.701cm">
          <draw:text-box>
            <text:p text:style-name="P1"><text:span text:style-name="T1">Through this step-by-step process, the planned idea was turned into a functional prototype. The result </text:span></text:p>
          </draw:text-box>
        </draw:frame>
        <draw:frame draw:style-name="gr1" draw:text-style-name="P2" draw:layer="layout" svg:width="16.025cm" svg:height="0.442cm" svg:x="1.793cm" svg:y="24.233cm">
          <draw:text-box>
            <text:p text:style-name="P1"><text:span text:style-name="T1">is a working accessibility-oriented <text:s/>classifier that <text:s/>can recognize <text:s/>common denominations, speak the </text:span></text:p>
          </draw:text-box>
        </draw:frame>
        <draw:frame draw:style-name="gr1" draw:text-style-name="P2" draw:layer="layout" svg:width="16.897cm" svg:height="0.442cm" svg:x="1.793cm" svg:y="24.756cm">
          <draw:text-box>
            <text:p text:style-name="P1"><text:span text:style-name="T1">detected <text:s/>value, <text:s/>and <text:s/>serve <text:s/>as <text:s/>a <text:s/>strong <text:s/>base <text:s/>for <text:s/>future <text:s/>machine <text:s/>learning <text:s/>upgrades, <text:s/>with <text:s/>the <text:s/>overall </text:span></text:p>
          </draw:text-box>
        </draw:frame>
        <draw:frame draw:style-name="gr11" draw:text-style-name="P10" draw:layer="layout" svg:width="12.99cm" svg:height="7.216cm" svg:x="3.381cm" svg:y="11.033cm">
          <draw:image xlink:href="Pictures/1000000000000708000003E8AB31C0D6.png" xlink:type="simple" xlink:show="embed" xlink:actuate="onLoad" draw:mime-type="image/png">
            <text:p/>
          </draw:image>
        </draw:frame>
        <draw:frame draw:style-name="gr1" draw:text-style-name="P2" draw:layer="layout" svg:width="7.274cm" svg:height="0.442cm" svg:x="1.793cm" svg:y="25.286cm">
          <draw:text-box>
            <text:p text:style-name="P1"><text:span text:style-name="T1">module integration shown in Figure 2 below. </text:span></text:p>
          </draw:text-box>
        </draw:frame>
      </draw:page>
      <draw:page draw:name="page15" draw:style-name="dp1" draw:master-page-name="master-page65">
        <draw:frame draw:style-name="gr1" draw:text-style-name="P2" draw:layer="layout" svg:width="0.397cm" svg:height="0.442cm" svg:x="10.303cm" svg:y="26.35cm">
          <draw:text-box>
            <text:p text:style-name="P1"><text:span text:style-name="T1">7 </text:span></text:p>
          </draw:text-box>
        </draw:frame>
        <draw:frame draw:style-name="gr1" draw:text-style-name="P2" draw:layer="layout" svg:width="0.397cm" svg:height="0.442cm" svg:x="16.15cm" svg:y="9.105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8.516cm" svg:height="0.407cm" svg:x="5.611cm" svg:y="9.608cm">
          <draw:text-box>
            <text:p text:style-name="P1"><text:span text:style-name="T14">Figure 2: System Architecture and Module Integration</text:span></text:p>
          </draw:text-box>
        </draw:frame>
        <draw:frame draw:style-name="gr1" draw:text-style-name="P2" draw:layer="layout" svg:width="0.397cm" svg:height="0.442cm" svg:x="14.142cm" svg:y="9.579cm">
          <draw:text-box>
            <text:p text:style-name="P1"><text:span text:style-name="T1"><text:s/></text:span></text:p>
          </draw:text-box>
        </draw:frame>
        <draw:frame draw:style-name="gr11" draw:text-style-name="P10" draw:layer="layout" svg:width="12.542cm" svg:height="7.664cm" svg:x="3.605cm" svg:y="1.792cm">
          <draw:image xlink:href="Pictures/10000000000007080000044C81431C35.png" xlink:type="simple" xlink:show="embed" xlink:actuate="onLoad" draw:mime-type="image/png">
            <text:p/>
          </draw:image>
        </draw:frame>
        <draw:frame draw:style-name="gr1" draw:text-style-name="P2" draw:layer="layout" svg:width="0.397cm" svg:height="0.442cm" svg:x="1.793cm" svg:y="10.367cm">
          <draw:text-box>
            <text:p text:style-name="P1"><text:span text:style-name="T1"><text:s/></text:span></text:p>
          </draw:text-box>
        </draw:frame>
      </draw:page>
      <draw:page draw:name="page16" draw:style-name="dp1" draw:master-page-name="master-page3">
        <draw:frame draw:style-name="gr1" draw:text-style-name="P2" draw:layer="layout" svg:width="0.397cm" svg:height="0.442cm" svg:x="10.303cm" svg:y="26.408cm">
          <draw:text-box>
            <text:p text:style-name="P1"><text:span text:style-name="T1">8 </text:span></text:p>
          </draw:text-box>
        </draw:frame>
        <draw:frame draw:style-name="gr5" draw:text-style-name="P6" draw:layer="layout" svg:width="2.628cm" svg:height="0.518cm" svg:x="1.793cm" svg:y="1.81cm">
          <draw:text-box>
            <text:p text:style-name="P1"><text:span text:style-name="T16">CHAPTER 5</text:span></text:p>
          </draw:text-box>
        </draw:frame>
        <draw:frame draw:style-name="gr1" draw:text-style-name="P2" draw:layer="layout" svg:width="0.397cm" svg:height="0.442cm" svg:x="4.415cm" svg:y="1.869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5.592cm" svg:height="0.518cm" svg:x="7.088cm" svg:y="2.739cm">
          <draw:text-box>
            <text:p text:style-name="P1"><text:span text:style-name="T16">RESULTS &amp; DISCUSSION</text:span></text:p>
          </draw:text-box>
        </draw:frame>
        <draw:frame draw:style-name="gr1" draw:text-style-name="P2" draw:layer="layout" svg:width="0.397cm" svg:height="0.442cm" svg:x="12.665cm" svg:y="2.7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72cm" svg:height="0.442cm" svg:x="1.793cm" svg:y="3.678cm">
          <draw:text-box>
            <text:p text:style-name="P1"><text:span text:style-name="T1">The </text:span></text:p>
          </draw:text-box>
        </draw:frame>
        <draw:frame draw:style-name="gr1" draw:text-style-name="P2" draw:layer="layout" svg:width="1.206cm" svg:height="0.442cm" svg:x="2.655cm" svg:y="3.678cm">
          <draw:text-box>
            <text:p text:style-name="P1"><text:span text:style-name="T1">project </text:span></text:p>
          </draw:text-box>
        </draw:frame>
        <draw:frame draw:style-name="gr1" draw:text-style-name="P2" draw:layer="layout" svg:width="1.582cm" svg:height="0.442cm" svg:x="4.014cm" svg:y="3.678cm">
          <draw:text-box>
            <text:p text:style-name="P1"><text:span text:style-name="T1">produced </text:span></text:p>
          </draw:text-box>
        </draw:frame>
        <draw:frame draw:style-name="gr1" draw:text-style-name="P2" draw:layer="layout" svg:width="0.397cm" svg:height="0.442cm" svg:x="5.747cm" svg:y="3.678cm">
          <draw:text-box>
            <text:p text:style-name="P1"><text:span text:style-name="T1">a </text:span></text:p>
          </draw:text-box>
        </draw:frame>
        <draw:frame draw:style-name="gr1" draw:text-style-name="P2" draw:layer="layout" svg:width="1.715cm" svg:height="0.442cm" svg:x="6.177cm" svg:y="3.678cm">
          <draw:text-box>
            <text:p text:style-name="P1"><text:span text:style-name="T1">functional </text:span></text:p>
          </draw:text-box>
        </draw:frame>
        <draw:frame draw:style-name="gr1" draw:text-style-name="P2" draw:layer="layout" svg:width="3.725cm" svg:height="0.442cm" svg:x="8.043cm" svg:y="3.678cm">
          <draw:text-box>
            <text:p text:style-name="P1"><text:span text:style-name="T1">currency-classification </text:span></text:p>
          </draw:text-box>
        </draw:frame>
        <draw:frame draw:style-name="gr1" draw:text-style-name="P2" draw:layer="layout" svg:width="1.627cm" svg:height="0.442cm" svg:x="11.923cm" svg:y="3.678cm">
          <draw:text-box>
            <text:p text:style-name="P1"><text:span text:style-name="T1">prototype </text:span></text:p>
          </draw:text-box>
        </draw:frame>
        <draw:frame draw:style-name="gr1" draw:text-style-name="P2" draw:layer="layout" svg:width="0.698cm" svg:height="0.442cm" svg:x="13.706cm" svg:y="3.678cm">
          <draw:text-box>
            <text:p text:style-name="P1"><text:span text:style-name="T1">that </text:span></text:p>
          </draw:text-box>
        </draw:frame>
        <draw:frame draw:style-name="gr1" draw:text-style-name="P2" draw:layer="layout" svg:width="0.654cm" svg:height="0.442cm" svg:x="14.551cm" svg:y="3.678cm">
          <draw:text-box>
            <text:p text:style-name="P1"><text:span text:style-name="T1">can </text:span></text:p>
          </draw:text-box>
        </draw:frame>
        <draw:frame draw:style-name="gr1" draw:text-style-name="P2" draw:layer="layout" svg:width="1.051cm" svg:height="0.442cm" svg:x="15.355cm" svg:y="3.678cm">
          <draw:text-box>
            <text:p text:style-name="P1"><text:span text:style-name="T1">detect </text:span></text:p>
          </draw:text-box>
        </draw:frame>
        <draw:frame draw:style-name="gr1" draw:text-style-name="P2" draw:layer="layout" svg:width="1.494cm" svg:height="0.442cm" svg:x="16.556cm" svg:y="3.678cm">
          <draw:text-box>
            <text:p text:style-name="P1"><text:span text:style-name="T1">common </text:span></text:p>
          </draw:text-box>
        </draw:frame>
        <draw:frame draw:style-name="gr1" draw:text-style-name="P2" draw:layer="layout" svg:width="16.556cm" svg:height="0.442cm" svg:x="1.793cm" svg:y="4.201cm">
          <draw:text-box>
            <text:p text:style-name="P1"><text:span text:style-name="T1">denominations when the note is clearly visible and the camera feed is stable. The desktop module gives </text:span></text:p>
          </draw:text-box>
        </draw:frame>
        <draw:frame draw:style-name="gr1" draw:text-style-name="P2" draw:layer="layout" svg:width="16.168cm" svg:height="0.442cm" svg:x="1.793cm" svg:y="4.732cm">
          <draw:text-box>
            <text:p text:style-name="P1"><text:span text:style-name="T1">immediate on-screen feedback and speaks the denomination through the local voice engine. The web </text:span></text:p>
          </draw:text-box>
        </draw:frame>
        <draw:frame draw:style-name="gr1" draw:text-style-name="P2" draw:layer="layout" svg:width="16.189cm" svg:height="0.442cm" svg:x="1.793cm" svg:y="5.255cm">
          <draw:text-box>
            <text:p text:style-name="P1"><text:span text:style-name="T1">module offers a more modern interface and can be used from camera-enabled browsers with optional </text:span></text:p>
          </draw:text-box>
        </draw:frame>
        <draw:frame draw:style-name="gr1" draw:text-style-name="P2" draw:layer="layout" svg:width="2.665cm" svg:height="0.442cm" svg:x="1.793cm" svg:y="5.786cm">
          <draw:text-box>
            <text:p text:style-name="P1"><text:span text:style-name="T1">cloud inference. </text:span></text:p>
          </draw:text-box>
        </draw:frame>
        <draw:frame draw:style-name="gr1" draw:text-style-name="P2" draw:layer="layout" svg:width="0.397cm" svg:height="0.442cm" svg:x="1.793cm" svg:y="6.6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6.778cm" svg:height="0.407cm" svg:x="6.482cm" svg:y="7.293cm">
          <draw:text-box>
            <text:p text:style-name="P1"><text:span text:style-name="T14">TABLE 2 <text:s/>Test Scenarios and Observations</text:span></text:p>
          </draw:text-box>
        </draw:frame>
        <draw:frame draw:style-name="gr1" draw:text-style-name="P2" draw:layer="layout" svg:width="0.397cm" svg:height="0.442cm" svg:x="13.279cm" svg:y="7.26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115cm" svg:height="0.407cm" svg:x="3.851cm" svg:y="8.131cm">
          <draw:text-box>
            <text:p text:style-name="P1"><text:span text:style-name="T14">Test Scenario</text:span></text:p>
          </draw:text-box>
        </draw:frame>
        <draw:frame draw:style-name="gr1" draw:text-style-name="P2" draw:layer="layout" svg:width="0.397cm" svg:height="0.442cm" svg:x="5.967cm" svg:y="8.10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923cm" svg:height="0.407cm" svg:x="11.71cm" svg:y="8.131cm">
          <draw:text-box>
            <text:p text:style-name="P1"><text:span text:style-name="T14">Observation</text:span></text:p>
          </draw:text-box>
        </draw:frame>
        <draw:polygon draw:style-name="gr15" draw:text-style-name="P15" draw:layer="layout" svg:width="0.017cm" svg:height="0.149cm" svg:x="1.792cm" svg:y="7.966cm" svg:viewBox="0 0 18 150" draw:points="0,0 18,0 18,150 0,150">
          <text:p/>
        </draw:polygon>
        <draw:polygon draw:style-name="gr15" draw:text-style-name="P15" draw:layer="layout" svg:width="0.017cm" svg:height="0.017cm" svg:x="1.792cm" svg:y="7.966cm" svg:viewBox="0 0 18 18" draw:points="0,0 18,0 18,18 0,18">
          <text:p/>
        </draw:polygon>
        <draw:polygon draw:style-name="gr15" draw:text-style-name="P15" draw:layer="layout" svg:width="6.199cm" svg:height="0.017cm" svg:x="1.809cm" svg:y="7.966cm" svg:viewBox="0 0 6200 18" draw:points="0,0 6200,0 6200,18 0,18">
          <text:p/>
        </draw:polygon>
        <draw:polygon draw:style-name="gr15" draw:text-style-name="P15" draw:layer="layout" svg:width="0.017cm" svg:height="0.132cm" svg:x="8.008cm" svg:y="7.983cm" svg:viewBox="0 0 18 133" draw:points="0,0 18,0 18,133 0,133">
          <text:p/>
        </draw:polygon>
        <draw:polygon draw:style-name="gr15" draw:text-style-name="P15" draw:layer="layout" svg:width="0.017cm" svg:height="0.017cm" svg:x="8.008cm" svg:y="7.966cm" svg:viewBox="0 0 18 18" draw:points="0,0 18,0 18,18 0,18">
          <text:p/>
        </draw:polygon>
        <draw:polygon draw:style-name="gr15" draw:text-style-name="P15" draw:layer="layout" svg:width="9.304cm" svg:height="0.017cm" svg:x="8.025cm" svg:y="7.966cm" svg:viewBox="0 0 9305 18" draw:points="0,0 9305,0 9305,18 0,18">
          <text:p/>
        </draw:polygon>
        <draw:polygon draw:style-name="gr15" draw:text-style-name="P15" draw:layer="layout" svg:width="0.016cm" svg:height="0.149cm" svg:x="17.329cm" svg:y="7.966cm" svg:viewBox="0 0 17 150" draw:points="0,0 17,0 17,150 0,150">
          <text:p/>
        </draw:polygon>
        <draw:polygon draw:style-name="gr15" draw:text-style-name="P15" draw:layer="layout" svg:width="0.016cm" svg:height="0.017cm" svg:x="17.329cm" svg:y="7.966cm" svg:viewBox="0 0 17 18" draw:points="0,0 17,0 17,18 0,18">
          <text:p/>
        </draw:polygon>
        <draw:polygon draw:style-name="gr15" draw:text-style-name="P15" draw:layer="layout" svg:width="0.017cm" svg:height="0.556cm" svg:x="1.792cm" svg:y="8.115cm" svg:viewBox="0 0 18 557" draw:points="0,0 18,0 18,557 0,557">
          <text:p/>
        </draw:polygon>
        <draw:polygon draw:style-name="gr15" draw:text-style-name="P15" draw:layer="layout" svg:width="0.017cm" svg:height="0.556cm" svg:x="8.008cm" svg:y="8.115cm" svg:viewBox="0 0 18 557" draw:points="0,0 18,0 18,557 0,557">
          <text:p/>
        </draw:polygon>
        <draw:polygon draw:style-name="gr15" draw:text-style-name="P15" draw:layer="layout" svg:width="0.016cm" svg:height="0.556cm" svg:x="17.329cm" svg:y="8.115cm" svg:viewBox="0 0 17 557" draw:points="0,0 17,0 17,557 0,557">
          <text:p/>
        </draw:polygon>
        <draw:frame draw:style-name="gr1" draw:text-style-name="P2" draw:layer="layout" svg:width="0.397cm" svg:height="0.442cm" svg:x="13.636cm" svg:y="8.10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429cm" svg:height="0.407cm" svg:x="2cm" svg:y="8.828cm">
          <draw:text-box>
            <text:p text:style-name="P1"><text:span text:style-name="T15">Clear, front-facing note</text:span></text:p>
          </draw:text-box>
        </draw:frame>
        <draw:frame draw:style-name="gr1" draw:text-style-name="P2" draw:layer="layout" svg:width="0.397cm" svg:height="0.442cm" svg:x="5.436cm" svg:y="8.79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7.412cm" svg:height="0.407cm" svg:x="8.216cm" svg:y="8.828cm">
          <draw:text-box>
            <text:p text:style-name="P1"><text:span text:style-name="T15">Denomination detected correctly and spoken aloud</text:span></text:p>
          </draw:text-box>
        </draw:frame>
        <draw:polygon draw:style-name="gr15" draw:text-style-name="P15" draw:layer="layout" svg:width="0.017cm" svg:height="0.15cm" svg:x="1.792cm" svg:y="8.671cm" svg:viewBox="0 0 18 151" draw:points="0,0 18,0 18,151 0,151">
          <text:p/>
        </draw:polygon>
        <draw:polygon draw:style-name="gr15" draw:text-style-name="P15" draw:layer="layout" svg:width="6.199cm" svg:height="0.017cm" svg:x="1.809cm" svg:y="8.671cm" svg:viewBox="0 0 6200 18" draw:points="0,0 6200,0 6200,18 0,18">
          <text:p/>
        </draw:polygon>
        <draw:polygon draw:style-name="gr15" draw:text-style-name="P15" draw:layer="layout" svg:width="0.017cm" svg:height="0.15cm" svg:x="8.008cm" svg:y="8.671cm" svg:viewBox="0 0 18 151" draw:points="0,0 18,0 18,151 0,151">
          <text:p/>
        </draw:polygon>
        <draw:polygon draw:style-name="gr15" draw:text-style-name="P15" draw:layer="layout" svg:width="9.304cm" svg:height="0.017cm" svg:x="8.025cm" svg:y="8.671cm" svg:viewBox="0 0 9305 18" draw:points="0,0 9305,0 9305,18 0,18">
          <text:p/>
        </draw:polygon>
        <draw:polygon draw:style-name="gr15" draw:text-style-name="P15" draw:layer="layout" svg:width="0.016cm" svg:height="0.15cm" svg:x="17.329cm" svg:y="8.671cm" svg:viewBox="0 0 17 151" draw:points="0,0 17,0 17,151 0,151">
          <text:p/>
        </draw:polygon>
        <draw:polygon draw:style-name="gr15" draw:text-style-name="P15" draw:layer="layout" svg:width="0.017cm" svg:height="0.547cm" svg:x="1.792cm" svg:y="8.821cm" svg:viewBox="0 0 18 548" draw:points="0,0 18,0 18,548 0,548">
          <text:p/>
        </draw:polygon>
        <draw:polygon draw:style-name="gr15" draw:text-style-name="P15" draw:layer="layout" svg:width="0.017cm" svg:height="0.547cm" svg:x="8.008cm" svg:y="8.821cm" svg:viewBox="0 0 18 548" draw:points="0,0 18,0 18,548 0,548">
          <text:p/>
        </draw:polygon>
        <draw:polygon draw:style-name="gr15" draw:text-style-name="P15" draw:layer="layout" svg:width="0.016cm" svg:height="0.547cm" svg:x="17.329cm" svg:y="8.821cm" svg:viewBox="0 0 17 548" draw:points="0,0 17,0 17,548 0,548">
          <text:p/>
        </draw:polygon>
        <draw:frame draw:style-name="gr1" draw:text-style-name="P2" draw:layer="layout" svg:width="0.397cm" svg:height="0.442cm" svg:x="15.652cm" svg:y="8.79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712cm" svg:height="0.407cm" svg:x="2cm" svg:y="9.533cm">
          <draw:text-box>
            <text:p text:style-name="P1"><text:span text:style-name="T15">Slightly tilted note</text:span></text:p>
          </draw:text-box>
        </draw:frame>
        <draw:frame draw:style-name="gr1" draw:text-style-name="P2" draw:layer="layout" svg:width="0.397cm" svg:height="0.442cm" svg:x="4.722cm" svg:y="9.50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6.552cm" svg:height="0.407cm" svg:x="8.216cm" svg:y="9.533cm">
          <draw:text-box>
            <text:p text:style-name="P1"><text:span text:style-name="T15">Usually detected, but confidence may reduce</text:span></text:p>
          </draw:text-box>
        </draw:frame>
        <draw:polygon draw:style-name="gr15" draw:text-style-name="P15" draw:layer="layout" svg:width="0.017cm" svg:height="0.149cm" svg:x="1.792cm" svg:y="9.368cm" svg:viewBox="0 0 18 150" draw:points="0,0 18,0 18,150 0,150">
          <text:p/>
        </draw:polygon>
        <draw:polygon draw:style-name="gr15" draw:text-style-name="P15" draw:layer="layout" svg:width="6.199cm" svg:height="0.017cm" svg:x="1.809cm" svg:y="9.368cm" svg:viewBox="0 0 6200 18" draw:points="0,0 6200,0 6200,18 0,18">
          <text:p/>
        </draw:polygon>
        <draw:polygon draw:style-name="gr15" draw:text-style-name="P15" draw:layer="layout" svg:width="0.017cm" svg:height="0.149cm" svg:x="8.008cm" svg:y="9.368cm" svg:viewBox="0 0 18 150" draw:points="0,0 18,0 18,150 0,150">
          <text:p/>
        </draw:polygon>
        <draw:polygon draw:style-name="gr15" draw:text-style-name="P15" draw:layer="layout" svg:width="9.304cm" svg:height="0.017cm" svg:x="8.025cm" svg:y="9.368cm" svg:viewBox="0 0 9305 18" draw:points="0,0 9305,0 9305,18 0,18">
          <text:p/>
        </draw:polygon>
        <draw:polygon draw:style-name="gr15" draw:text-style-name="P15" draw:layer="layout" svg:width="0.016cm" svg:height="0.149cm" svg:x="17.329cm" svg:y="9.368cm" svg:viewBox="0 0 17 150" draw:points="0,0 17,0 17,150 0,150">
          <text:p/>
        </draw:polygon>
        <draw:polygon draw:style-name="gr15" draw:text-style-name="P15" draw:layer="layout" svg:width="0.017cm" svg:height="0.557cm" svg:x="1.792cm" svg:y="9.517cm" svg:viewBox="0 0 18 558" draw:points="0,0 18,0 18,558 0,558">
          <text:p/>
        </draw:polygon>
        <draw:polygon draw:style-name="gr15" draw:text-style-name="P15" draw:layer="layout" svg:width="0.017cm" svg:height="0.557cm" svg:x="8.008cm" svg:y="9.517cm" svg:viewBox="0 0 18 558" draw:points="0,0 18,0 18,558 0,558">
          <text:p/>
        </draw:polygon>
        <draw:polygon draw:style-name="gr15" draw:text-style-name="P15" draw:layer="layout" svg:width="0.016cm" svg:height="0.557cm" svg:x="17.329cm" svg:y="9.517cm" svg:viewBox="0 0 17 558" draw:points="0,0 17,0 17,558 0,558">
          <text:p/>
        </draw:polygon>
        <draw:frame draw:style-name="gr1" draw:text-style-name="P2" draw:layer="layout" svg:width="0.397cm" svg:height="0.442cm" svg:x="14.79cm" svg:y="9.50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439cm" svg:height="0.407cm" svg:x="2cm" svg:y="10.23cm">
          <draw:text-box>
            <text:p text:style-name="P1"><text:span text:style-name="T15">Low-light image</text:span></text:p>
          </draw:text-box>
        </draw:frame>
        <draw:frame draw:style-name="gr1" draw:text-style-name="P2" draw:layer="layout" svg:width="0.397cm" svg:height="0.442cm" svg:x="4.44cm" svg:y="10.20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724cm" svg:height="0.407cm" svg:x="8.216cm" svg:y="10.23cm">
          <draw:text-box>
            <text:p text:style-name="P1"><text:span text:style-name="T15">Recognition becomes less stable</text:span></text:p>
          </draw:text-box>
        </draw:frame>
        <draw:polygon draw:style-name="gr15" draw:text-style-name="P15" draw:layer="layout" svg:width="0.017cm" svg:height="0.149cm" svg:x="1.792cm" svg:y="10.074cm" svg:viewBox="0 0 18 150" draw:points="0,0 18,0 18,150 0,150">
          <text:p/>
        </draw:polygon>
        <draw:polygon draw:style-name="gr15" draw:text-style-name="P15" draw:layer="layout" svg:width="6.199cm" svg:height="0.016cm" svg:x="1.809cm" svg:y="10.074cm" svg:viewBox="0 0 6200 17" draw:points="0,0 6200,0 6200,17 0,17">
          <text:p/>
        </draw:polygon>
        <draw:polygon draw:style-name="gr15" draw:text-style-name="P15" draw:layer="layout" svg:width="0.017cm" svg:height="0.149cm" svg:x="8.008cm" svg:y="10.074cm" svg:viewBox="0 0 18 150" draw:points="0,0 18,0 18,150 0,150">
          <text:p/>
        </draw:polygon>
        <draw:polygon draw:style-name="gr15" draw:text-style-name="P15" draw:layer="layout" svg:width="9.304cm" svg:height="0.016cm" svg:x="8.025cm" svg:y="10.074cm" svg:viewBox="0 0 9305 17" draw:points="0,0 9305,0 9305,17 0,17">
          <text:p/>
        </draw:polygon>
        <draw:polygon draw:style-name="gr15" draw:text-style-name="P15" draw:layer="layout" svg:width="0.016cm" svg:height="0.149cm" svg:x="17.329cm" svg:y="10.074cm" svg:viewBox="0 0 17 150" draw:points="0,0 17,0 17,150 0,150">
          <text:p/>
        </draw:polygon>
        <draw:polygon draw:style-name="gr15" draw:text-style-name="P15" draw:layer="layout" svg:width="0.017cm" svg:height="0.548cm" svg:x="1.792cm" svg:y="10.223cm" svg:viewBox="0 0 18 549" draw:points="0,0 18,0 18,549 0,549">
          <text:p/>
        </draw:polygon>
        <draw:polygon draw:style-name="gr15" draw:text-style-name="P15" draw:layer="layout" svg:width="0.017cm" svg:height="0.548cm" svg:x="8.008cm" svg:y="10.223cm" svg:viewBox="0 0 18 549" draw:points="0,0 18,0 18,549 0,549">
          <text:p/>
        </draw:polygon>
        <draw:polygon draw:style-name="gr15" draw:text-style-name="P15" draw:layer="layout" svg:width="0.016cm" svg:height="0.548cm" svg:x="17.329cm" svg:y="10.223cm" svg:viewBox="0 0 17 549" draw:points="0,0 17,0 17,549 0,549">
          <text:p/>
        </draw:polygon>
        <draw:frame draw:style-name="gr1" draw:text-style-name="P2" draw:layer="layout" svg:width="0.397cm" svg:height="0.442cm" svg:x="12.955cm" svg:y="10.20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773cm" svg:height="0.407cm" svg:x="2cm" svg:y="10.935cm">
          <draw:text-box>
            <text:p text:style-name="P1"><text:span text:style-name="T15">Blurred or partially covered note</text:span></text:p>
          </draw:text-box>
        </draw:frame>
        <draw:frame draw:style-name="gr1" draw:text-style-name="P2" draw:layer="layout" svg:width="0.397cm" svg:height="0.442cm" svg:x="6.789cm" svg:y="10.90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6.441cm" svg:height="0.407cm" svg:x="8.216cm" svg:y="10.935cm">
          <draw:text-box>
            <text:p text:style-name="P1"><text:span text:style-name="T15">Detection may fail or return a weaker match</text:span></text:p>
          </draw:text-box>
        </draw:frame>
        <draw:polygon draw:style-name="gr15" draw:text-style-name="P15" draw:layer="layout" svg:width="0.017cm" svg:height="0.149cm" svg:x="1.792cm" svg:y="10.771cm" svg:viewBox="0 0 18 150" draw:points="0,0 18,0 18,150 0,150">
          <text:p/>
        </draw:polygon>
        <draw:polygon draw:style-name="gr15" draw:text-style-name="P15" draw:layer="layout" svg:width="6.199cm" svg:height="0.016cm" svg:x="1.809cm" svg:y="10.771cm" svg:viewBox="0 0 6200 17" draw:points="0,0 6200,0 6200,17 0,17">
          <text:p/>
        </draw:polygon>
        <draw:polygon draw:style-name="gr15" draw:text-style-name="P15" draw:layer="layout" svg:width="0.017cm" svg:height="0.149cm" svg:x="8.008cm" svg:y="10.771cm" svg:viewBox="0 0 18 150" draw:points="0,0 18,0 18,150 0,150">
          <text:p/>
        </draw:polygon>
        <draw:polygon draw:style-name="gr15" draw:text-style-name="P15" draw:layer="layout" svg:width="9.304cm" svg:height="0.016cm" svg:x="8.025cm" svg:y="10.771cm" svg:viewBox="0 0 9305 17" draw:points="0,0 9305,0 9305,17 0,17">
          <text:p/>
        </draw:polygon>
        <draw:polygon draw:style-name="gr15" draw:text-style-name="P15" draw:layer="layout" svg:width="0.016cm" svg:height="0.149cm" svg:x="17.329cm" svg:y="10.771cm" svg:viewBox="0 0 17 150" draw:points="0,0 17,0 17,150 0,150">
          <text:p/>
        </draw:polygon>
        <draw:polygon draw:style-name="gr15" draw:text-style-name="P15" draw:layer="layout" svg:width="0.017cm" svg:height="0.556cm" svg:x="1.792cm" svg:y="10.92cm" svg:viewBox="0 0 18 557" draw:points="0,0 18,0 18,557 0,557">
          <text:p/>
        </draw:polygon>
        <draw:polygon draw:style-name="gr15" draw:text-style-name="P15" draw:layer="layout" svg:width="0.017cm" svg:height="0.556cm" svg:x="8.008cm" svg:y="10.92cm" svg:viewBox="0 0 18 557" draw:points="0,0 18,0 18,557 0,557">
          <text:p/>
        </draw:polygon>
        <draw:polygon draw:style-name="gr15" draw:text-style-name="P15" draw:layer="layout" svg:width="0.016cm" svg:height="0.556cm" svg:x="17.329cm" svg:y="10.92cm" svg:viewBox="0 0 17 557" draw:points="0,0 17,0 17,557 0,557">
          <text:p/>
        </draw:polygon>
        <draw:frame draw:style-name="gr1" draw:text-style-name="P2" draw:layer="layout" svg:width="0.397cm" svg:height="0.442cm" svg:x="14.673cm" svg:y="10.90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5.006cm" svg:height="0.407cm" svg:x="2cm" svg:y="11.641cm">
          <draw:text-box>
            <text:p text:style-name="P1"><text:span text:style-name="T15">Web mode with good camera feed</text:span></text:p>
          </draw:text-box>
        </draw:frame>
        <draw:frame draw:style-name="gr1" draw:text-style-name="P2" draw:layer="layout" svg:width="0.397cm" svg:height="0.442cm" svg:x="7.022cm" svg:y="11.61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8.04cm" svg:height="0.407cm" svg:x="8.216cm" svg:y="11.641cm">
          <draw:text-box>
            <text:p text:style-name="P1"><text:span text:style-name="T15">Interface is smooth and result is displayed immediately</text:span></text:p>
          </draw:text-box>
        </draw:frame>
        <draw:polygon draw:style-name="gr15" draw:text-style-name="P15" draw:layer="layout" svg:width="0.017cm" svg:height="0.149cm" svg:x="1.792cm" svg:y="11.476cm" svg:viewBox="0 0 18 150" draw:points="0,0 18,0 18,150 0,150">
          <text:p/>
        </draw:polygon>
        <draw:polygon draw:style-name="gr15" draw:text-style-name="P15" draw:layer="layout" svg:width="6.199cm" svg:height="0.016cm" svg:x="1.809cm" svg:y="11.476cm" svg:viewBox="0 0 6200 17" draw:points="0,0 6200,0 6200,17 0,17">
          <text:p/>
        </draw:polygon>
        <draw:polygon draw:style-name="gr15" draw:text-style-name="P15" draw:layer="layout" svg:width="0.017cm" svg:height="0.149cm" svg:x="8.008cm" svg:y="11.476cm" svg:viewBox="0 0 18 150" draw:points="0,0 18,0 18,150 0,150">
          <text:p/>
        </draw:polygon>
        <draw:polygon draw:style-name="gr15" draw:text-style-name="P15" draw:layer="layout" svg:width="9.304cm" svg:height="0.016cm" svg:x="8.025cm" svg:y="11.476cm" svg:viewBox="0 0 9305 17" draw:points="0,0 9305,0 9305,17 0,17">
          <text:p/>
        </draw:polygon>
        <draw:polygon draw:style-name="gr15" draw:text-style-name="P15" draw:layer="layout" svg:width="0.016cm" svg:height="0.149cm" svg:x="17.329cm" svg:y="11.476cm" svg:viewBox="0 0 17 150" draw:points="0,0 17,0 17,150 0,150">
          <text:p/>
        </draw:polygon>
        <draw:polygon draw:style-name="gr15" draw:text-style-name="P15" draw:layer="layout" svg:width="0.017cm" svg:height="0.556cm" svg:x="1.792cm" svg:y="11.625cm" svg:viewBox="0 0 18 557" draw:points="0,0 18,0 18,557 0,557">
          <text:p/>
        </draw:polygon>
        <draw:polygon draw:style-name="gr15" draw:text-style-name="P15" draw:layer="layout" svg:width="0.017cm" svg:height="0.017cm" svg:x="1.792cm" svg:y="12.181cm" svg:viewBox="0 0 18 18" draw:points="0,0 18,0 18,18 0,18">
          <text:p/>
        </draw:polygon>
        <draw:polygon draw:style-name="gr15" draw:text-style-name="P15" draw:layer="layout" svg:width="0.017cm" svg:height="0.017cm" svg:x="1.792cm" svg:y="12.181cm" svg:viewBox="0 0 18 18" draw:points="0,0 18,0 18,18 0,18">
          <text:p/>
        </draw:polygon>
        <draw:polygon draw:style-name="gr15" draw:text-style-name="P15" draw:layer="layout" svg:width="6.199cm" svg:height="0.017cm" svg:x="1.809cm" svg:y="12.181cm" svg:viewBox="0 0 6200 18" draw:points="0,0 6200,0 6200,18 0,18">
          <text:p/>
        </draw:polygon>
        <draw:polygon draw:style-name="gr15" draw:text-style-name="P15" draw:layer="layout" svg:width="0.017cm" svg:height="0.556cm" svg:x="8.008cm" svg:y="11.625cm" svg:viewBox="0 0 18 557" draw:points="0,0 18,0 18,557 0,557">
          <text:p/>
        </draw:polygon>
        <draw:polygon draw:style-name="gr15" draw:text-style-name="P15" draw:layer="layout" svg:width="0.017cm" svg:height="0.017cm" svg:x="8.008cm" svg:y="12.181cm" svg:viewBox="0 0 18 18" draw:points="0,0 18,0 18,18 0,18">
          <text:p/>
        </draw:polygon>
        <draw:polygon draw:style-name="gr15" draw:text-style-name="P15" draw:layer="layout" svg:width="9.304cm" svg:height="0.017cm" svg:x="8.025cm" svg:y="12.181cm" svg:viewBox="0 0 9305 18" draw:points="0,0 9305,0 9305,18 0,18">
          <text:p/>
        </draw:polygon>
        <draw:polygon draw:style-name="gr15" draw:text-style-name="P15" draw:layer="layout" svg:width="0.016cm" svg:height="0.556cm" svg:x="17.329cm" svg:y="11.625cm" svg:viewBox="0 0 17 557" draw:points="0,0 17,0 17,557 0,557">
          <text:p/>
        </draw:polygon>
        <draw:polygon draw:style-name="gr15" draw:text-style-name="P15" draw:layer="layout" svg:width="0.016cm" svg:height="0.017cm" svg:x="17.329cm" svg:y="12.181cm" svg:viewBox="0 0 17 18" draw:points="0,0 17,0 17,18 0,18">
          <text:p/>
        </draw:polygon>
        <draw:polygon draw:style-name="gr15" draw:text-style-name="P15" draw:layer="layout" svg:width="0.016cm" svg:height="0.017cm" svg:x="17.329cm" svg:y="12.181cm" svg:viewBox="0 0 17 18" draw:points="0,0 17,0 17,18 0,18">
          <text:p/>
        </draw:polygon>
        <draw:frame draw:style-name="gr1" draw:text-style-name="P2" draw:layer="layout" svg:width="0.397cm" svg:height="0.442cm" svg:x="16.275cm" svg:y="11.6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1.793cm" svg:y="12.2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157cm" svg:height="0.442cm" svg:x="1.793cm" svg:y="13.005cm">
          <draw:text-box>
            <text:p text:style-name="P1"><text:span text:style-name="T1">The main strength of the project is accessibility. It reduces dependence on manual note identification </text:span></text:p>
          </draw:text-box>
        </draw:frame>
        <draw:frame draw:style-name="gr1" draw:text-style-name="P2" draw:layer="layout" svg:width="16.568cm" svg:height="0.442cm" svg:x="1.793cm" svg:y="13.528cm">
          <draw:text-box>
            <text:p text:style-name="P1"><text:span text:style-name="T1">and provides both visual and spoken results. The main limitation is that the desktop recognizer depends </text:span></text:p>
          </draw:text-box>
        </draw:frame>
        <draw:frame draw:style-name="gr1" draw:text-style-name="P2" draw:layer="layout" svg:width="16.523cm" svg:height="0.442cm" svg:x="1.793cm" svg:y="14.059cm">
          <draw:text-box>
            <text:p text:style-name="P1"><text:span text:style-name="T1">heavily on note templates and image quality, which means its accuracy drops when the input is rotated, </text:span></text:p>
          </draw:text-box>
        </draw:frame>
        <draw:frame draw:style-name="gr1" draw:text-style-name="P2" draw:layer="layout" svg:width="16.136cm" svg:height="0.442cm" svg:x="1.793cm" svg:y="14.581cm">
          <draw:text-box>
            <text:p text:style-name="P1"><text:span text:style-name="T1">poorly lit, or very different from the stored examples. The optional web module improves flexibility, </text:span></text:p>
          </draw:text-box>
        </draw:frame>
        <draw:frame draw:style-name="gr1" draw:text-style-name="P2" draw:layer="layout" svg:width="12.422cm" svg:height="0.442cm" svg:x="1.793cm" svg:y="15.112cm">
          <draw:text-box>
            <text:p text:style-name="P1"><text:span text:style-name="T1">but it depends on network access and the availability of the inference service. </text:span></text:p>
          </draw:text-box>
        </draw:frame>
        <draw:frame draw:style-name="gr1" draw:text-style-name="P2" draw:layer="layout" svg:width="16.323cm" svg:height="0.442cm" svg:x="1.793cm" svg:y="15.968cm">
          <draw:text-box>
            <text:p text:style-name="P1"><text:span text:style-name="T1">Overall, the project demonstrates that a practical accessibility tool can be built with modest resources. </text:span></text:p>
          </draw:text-box>
        </draw:frame>
        <draw:frame draw:style-name="gr1" draw:text-style-name="P2" draw:layer="layout" svg:width="16.069cm" svg:height="0.442cm" svg:x="1.793cm" svg:y="16.499cm">
          <draw:text-box>
            <text:p text:style-name="P1"><text:span text:style-name="T1">Even though it is not yet a large-scale deep learning system, it serves as a reliable prototype for cash </text:span></text:p>
          </draw:text-box>
        </draw:frame>
        <draw:frame draw:style-name="gr1" draw:text-style-name="P2" draw:layer="layout" svg:width="10.345cm" svg:height="0.442cm" svg:x="1.793cm" svg:y="17.021cm">
          <draw:text-box>
            <text:p text:style-name="P1"><text:span text:style-name="T1">assistance and can be expanded into a more robust product later. </text:span></text:p>
          </draw:text-box>
        </draw:frame>
        <draw:frame draw:style-name="gr1" draw:text-style-name="P2" draw:layer="layout" svg:width="0.397cm" svg:height="0.442cm" svg:x="1.793cm" svg:y="17.884cm">
          <draw:text-box>
            <text:p text:style-name="P1"><text:span text:style-name="T1"><text:s/></text:span></text:p>
          </draw:text-box>
        </draw:frame>
      </draw:page>
      <draw:page draw:name="page17" draw:style-name="dp1" draw:master-page-name="master-page3">
        <draw:frame draw:style-name="gr1" draw:text-style-name="P2" draw:layer="layout" svg:width="0.397cm" svg:height="0.442cm" svg:x="10.303cm" svg:y="26.35cm">
          <draw:text-box>
            <text:p text:style-name="P1"><text:span text:style-name="T1">9 </text:span></text:p>
          </draw:text-box>
        </draw:frame>
        <draw:frame draw:style-name="gr5" draw:text-style-name="P6" draw:layer="layout" svg:width="2.628cm" svg:height="0.518cm" svg:x="1.793cm" svg:y="1.81cm">
          <draw:text-box>
            <text:p text:style-name="P1"><text:span text:style-name="T16">CHAPTER 6</text:span></text:p>
          </draw:text-box>
        </draw:frame>
        <draw:frame draw:style-name="gr1" draw:text-style-name="P2" draw:layer="layout" svg:width="0.397cm" svg:height="0.442cm" svg:x="4.415cm" svg:y="1.869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10.726cm" svg:height="0.518cm" svg:x="4.531cm" svg:y="2.739cm">
          <draw:text-box>
            <text:p text:style-name="P1"><text:span text:style-name="T16">CONCLUSION AND SCOPE FOR FUTURE WORK</text:span></text:p>
          </draw:text-box>
        </draw:frame>
        <draw:frame draw:style-name="gr1" draw:text-style-name="P2" draw:layer="layout" svg:width="0.397cm" svg:height="0.442cm" svg:x="15.229cm" svg:y="2.7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091cm" svg:height="0.442cm" svg:x="1.793cm" svg:y="3.678cm">
          <draw:text-box>
            <text:p text:style-name="P1"><text:span text:style-name="T1">The AI-Based Currency Classifier for Visually Impaired Users successfully achieves its core goal of </text:span></text:p>
          </draw:text-box>
        </draw:frame>
        <draw:frame draw:style-name="gr1" draw:text-style-name="P2" draw:layer="layout" svg:width="15.771cm" svg:height="0.442cm" svg:x="1.793cm" svg:y="4.201cm">
          <draw:text-box>
            <text:p text:style-name="P1"><text:span text:style-name="T1">identifying Indian currency notes and giving spoken feedback to the user. By combining computer </text:span></text:p>
          </draw:text-box>
        </draw:frame>
        <draw:frame draw:style-name="gr1" draw:text-style-name="P2" draw:layer="layout" svg:width="15.692cm" svg:height="0.442cm" svg:x="1.793cm" svg:y="4.732cm">
          <draw:text-box>
            <text:p text:style-name="P1"><text:span text:style-name="T1">vision, simple template matching, and a voice interface, the project offers a low-cost and practical </text:span></text:p>
          </draw:text-box>
        </draw:frame>
        <draw:frame draw:style-name="gr1" draw:text-style-name="P2" draw:layer="layout" svg:width="13.208cm" svg:height="0.442cm" svg:x="1.793cm" svg:y="5.255cm">
          <draw:text-box>
            <text:p text:style-name="P1"><text:span text:style-name="T1">accessibility solution that can be demonstrated on a normal laptop or in a browser. </text:span></text:p>
          </draw:text-box>
        </draw:frame>
        <draw:frame draw:style-name="gr1" draw:text-style-name="P2" draw:layer="layout" svg:width="16.245cm" svg:height="0.442cm" svg:x="1.793cm" svg:y="6.118cm">
          <draw:text-box>
            <text:p text:style-name="P1"><text:span text:style-name="T1">Future improvements can make the system much stronger. A trained deep learning model can replace </text:span></text:p>
          </draw:text-box>
        </draw:frame>
        <draw:frame draw:style-name="gr1" draw:text-style-name="P2" draw:layer="layout" svg:width="15.859cm" svg:height="0.442cm" svg:x="1.793cm" svg:y="6.64cm">
          <draw:text-box>
            <text:p text:style-name="P1"><text:span text:style-name="T1">template matching for better accuracy under different angles and lighting conditions. A mobile app </text:span></text:p>
          </draw:text-box>
        </draw:frame>
        <draw:frame draw:style-name="gr1" draw:text-style-name="P2" draw:layer="layout" svg:width="16.068cm" svg:height="0.442cm" svg:x="1.793cm" svg:y="7.172cm">
          <draw:text-box>
            <text:p text:style-name="P1"><text:span text:style-name="T1">version can improve convenience, offline support can remove the dependency on the internet for the </text:span></text:p>
          </draw:text-box>
        </draw:frame>
        <draw:frame draw:style-name="gr1" draw:text-style-name="P2" draw:layer="layout" svg:width="16.357cm" svg:height="0.442cm" svg:x="1.793cm" svg:y="7.695cm">
          <draw:text-box>
            <text:p text:style-name="P1"><text:span text:style-name="T1">web flow, and multilingual speech output can make the tool useful to more users. The system can also </text:span></text:p>
          </draw:text-box>
        </draw:frame>
        <draw:frame draw:style-name="gr1" draw:text-style-name="P2" draw:layer="layout" svg:width="16.19cm" svg:height="0.442cm" svg:x="1.793cm" svg:y="8.226cm">
          <draw:text-box>
            <text:p text:style-name="P1"><text:span text:style-name="T1">be extended with counterfeit-note detection and support for additional currencies and denominations. </text:span></text:p>
          </draw:text-box>
        </draw:frame>
        <draw:frame draw:style-name="gr1" draw:text-style-name="P2" draw:layer="layout" svg:width="2.367cm" svg:height="0.442cm" svg:x="1.793cm" svg:y="9.08cm">
          <draw:text-box>
            <text:p text:style-name="P1"><text:span text:style-name="T8">Future Work </text:span></text:p>
          </draw:text-box>
        </draw:frame>
        <draw:frame draw:style-name="gr1" draw:text-style-name="P2" draw:layer="layout" svg:width="0.397cm" svg:height="0.442cm" svg:x="1.793cm" svg:y="9.5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334cm" svg:height="0.442cm" svg:x="1.793cm" svg:y="9.993cm">
          <draw:text-box>
            <text:p text:style-name="P1"><text:span text:style-name="T1">While <text:s/>the <text:s/>current <text:s/>prototype <text:s/>meets <text:s/>its <text:s/>core <text:s/>objective, <text:s/>several <text:s/>directions <text:s/>remain <text:s/>open <text:s/>for <text:s/>future </text:span></text:p>
          </draw:text-box>
        </draw:frame>
        <draw:frame draw:style-name="gr1" draw:text-style-name="P2" draw:layer="layout" svg:width="2.267cm" svg:height="0.442cm" svg:x="1.793cm" svg:y="10.458cm">
          <draw:text-box>
            <text:p text:style-name="P1"><text:span text:style-name="T1">development: </text:span></text:p>
          </draw:text-box>
        </draw:frame>
        <draw:frame draw:style-name="gr1" draw:text-style-name="P2" draw:layer="layout" svg:width="0.397cm" svg:height="0.442cm" svg:x="2.988cm" svg:y="10.9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2.39cm" svg:y="11.37cm">
          <draw:text-box>
            <text:p text:style-name="P1"><text:span text:style-name="T1">1.</text:span></text:p>
          </draw:text-box>
        </draw:frame>
        <draw:frame draw:style-name="gr1" draw:text-style-name="P2" draw:layer="layout" svg:width="0.397cm" svg:height="0.446cm" svg:x="2.689cm" svg:y="11.365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5.143cm" svg:height="0.442cm" svg:x="2.988cm" svg:y="11.37cm">
          <draw:text-box>
            <text:p text:style-name="P1"><text:span text:style-name="T8">Deep learning</text:span><text:span text:style-name="T13">–</text:span><text:span text:style-name="T8">based recognition: </text:span><text:span text:style-name="T1">Replacing template matching with a trained convolutional </text:span></text:p>
          </draw:text-box>
        </draw:frame>
        <draw:frame draw:style-name="gr1" draw:text-style-name="P2" draw:layer="layout" svg:width="1.096cm" svg:height="0.442cm" svg:x="2.988cm" svg:y="11.827cm">
          <draw:text-box>
            <text:p text:style-name="P1"><text:span text:style-name="T1">neural </text:span></text:p>
          </draw:text-box>
        </draw:frame>
        <draw:frame draw:style-name="gr1" draw:text-style-name="P2" draw:layer="layout" svg:width="1.405cm" svg:height="0.442cm" svg:x="4.207cm" svg:y="11.827cm">
          <draw:text-box>
            <text:p text:style-name="P1"><text:span text:style-name="T1">network </text:span></text:p>
          </draw:text-box>
        </draw:frame>
        <draw:frame draw:style-name="gr1" draw:text-style-name="P2" draw:layer="layout" svg:width="1.207cm" svg:height="0.442cm" svg:x="5.749cm" svg:y="11.827cm">
          <draw:text-box>
            <text:p text:style-name="P1"><text:span text:style-name="T1">(CNN) </text:span></text:p>
          </draw:text-box>
        </draw:frame>
        <draw:frame draw:style-name="gr1" draw:text-style-name="P2" draw:layer="layout" svg:width="1.096cm" svg:height="0.442cm" svg:x="7.092cm" svg:y="11.827cm">
          <draw:text-box>
            <text:p text:style-name="P1"><text:span text:style-name="T1">would </text:span></text:p>
          </draw:text-box>
        </draw:frame>
        <draw:frame draw:style-name="gr1" draw:text-style-name="P2" draw:layer="layout" svg:width="2.091cm" svg:height="0.442cm" svg:x="8.318cm" svg:y="11.827cm">
          <draw:text-box>
            <text:p text:style-name="P1"><text:span text:style-name="T1">significantly </text:span></text:p>
          </draw:text-box>
        </draw:frame>
        <draw:frame draw:style-name="gr1" draw:text-style-name="P2" draw:layer="layout" svg:width="1.428cm" svg:height="0.442cm" svg:x="10.532cm" svg:y="11.827cm">
          <draw:text-box>
            <text:p text:style-name="P1"><text:span text:style-name="T1">improve </text:span></text:p>
          </draw:text-box>
        </draw:frame>
        <draw:frame draw:style-name="gr1" draw:text-style-name="P2" draw:layer="layout" svg:width="1.782cm" svg:height="0.442cm" svg:x="12.09cm" svg:y="11.827cm">
          <draw:text-box>
            <text:p text:style-name="P1"><text:span text:style-name="T1">robustness </text:span></text:p>
          </draw:text-box>
        </draw:frame>
        <draw:frame draw:style-name="gr1" draw:text-style-name="P2" draw:layer="layout" svg:width="1.229cm" svg:height="0.442cm" svg:x="14.005cm" svg:y="11.827cm">
          <draw:text-box>
            <text:p text:style-name="P1"><text:span text:style-name="T1">against </text:span></text:p>
          </draw:text-box>
        </draw:frame>
        <draw:frame draw:style-name="gr1" draw:text-style-name="P2" draw:layer="layout" svg:width="1.439cm" svg:height="0.442cm" svg:x="15.356cm" svg:y="11.827cm">
          <draw:text-box>
            <text:p text:style-name="P1"><text:span text:style-name="T1">rotation, </text:span></text:p>
          </draw:text-box>
        </draw:frame>
        <draw:frame draw:style-name="gr1" draw:text-style-name="P2" draw:layer="layout" svg:width="1.118cm" svg:height="0.442cm" svg:x="16.923cm" svg:y="11.827cm">
          <draw:text-box>
            <text:p text:style-name="P1"><text:span text:style-name="T1">partial </text:span></text:p>
          </draw:text-box>
        </draw:frame>
        <draw:frame draw:style-name="gr1" draw:text-style-name="P2" draw:layer="layout" svg:width="15.297cm" svg:height="0.442cm" svg:x="2.988cm" svg:y="12.283cm">
          <draw:text-box>
            <text:p text:style-name="P1"><text:span text:style-name="T1">occlusion, <text:s/>creases, <text:s/>and <text:s/>varying <text:s/>lighting <text:s/>conditions, <text:s/>since <text:s/>template <text:s/>matching <text:s/>is <text:s/>inherently </text:span></text:p>
          </draw:text-box>
        </draw:frame>
        <draw:frame draw:style-name="gr1" draw:text-style-name="P2" draw:layer="layout" svg:width="6.256cm" svg:height="0.442cm" svg:x="2.988cm" svg:y="12.748cm">
          <draw:text-box>
            <text:p text:style-name="P1"><text:span text:style-name="T1">limited to near-ideal note presentation. </text:span></text:p>
          </draw:text-box>
        </draw:frame>
        <draw:frame draw:style-name="gr1" draw:text-style-name="P2" draw:layer="layout" svg:width="0.397cm" svg:height="0.442cm" svg:x="2.988cm" svg:y="13.2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2.39cm" svg:y="13.661cm">
          <draw:text-box>
            <text:p text:style-name="P1"><text:span text:style-name="T1">2.</text:span></text:p>
          </draw:text-box>
        </draw:frame>
        <draw:frame draw:style-name="gr1" draw:text-style-name="P2" draw:layer="layout" svg:width="0.397cm" svg:height="0.446cm" svg:x="2.689cm" svg:y="13.655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4.68cm" svg:height="0.442cm" svg:x="2.988cm" svg:y="13.661cm">
          <draw:text-box>
            <text:p text:style-name="P1"><text:span text:style-name="T8">Mobile application deployment: </text:span><text:span text:style-name="T1">Porting the system to Android/iOS as a dedicated mobile </text:span></text:p>
          </draw:text-box>
        </draw:frame>
        <draw:frame draw:style-name="gr1" draw:text-style-name="P2" draw:layer="layout" svg:width="14.478cm" svg:height="0.442cm" svg:x="2.988cm" svg:y="14.117cm">
          <draw:text-box>
            <text:p text:style-name="P1"><text:span text:style-name="T1">app would make the tool far more practical for everyday use, since most visually impaired </text:span></text:p>
          </draw:text-box>
        </draw:frame>
        <draw:frame draw:style-name="gr1" draw:text-style-name="P2" draw:layer="layout" svg:width="9.24cm" svg:height="0.442cm" svg:x="2.988cm" svg:y="14.573cm">
          <draw:text-box>
            <text:p text:style-name="P1"><text:span text:style-name="T1">users are more likely to carry a smartphone than a laptop. </text:span></text:p>
          </draw:text-box>
        </draw:frame>
        <draw:frame draw:style-name="gr1" draw:text-style-name="P2" draw:layer="layout" svg:width="0.397cm" svg:height="0.442cm" svg:x="2.988cm" svg:y="15.0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2.39cm" svg:y="15.495cm">
          <draw:text-box>
            <text:p text:style-name="P1"><text:span text:style-name="T1">3.</text:span></text:p>
          </draw:text-box>
        </draw:frame>
        <draw:frame draw:style-name="gr1" draw:text-style-name="P2" draw:layer="layout" svg:width="0.397cm" svg:height="0.446cm" svg:x="2.689cm" svg:y="15.489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2.732cm" svg:height="0.442cm" svg:x="2.988cm" svg:y="15.495cm">
          <draw:text-box>
            <text:p text:style-name="P1"><text:span text:style-name="T8">Offline-capable </text:span></text:p>
          </draw:text-box>
        </draw:frame>
        <draw:frame draw:style-name="gr1" draw:text-style-name="P2" draw:layer="layout" svg:width="0.787cm" svg:height="0.442cm" svg:x="5.915cm" svg:y="15.495cm">
          <draw:text-box>
            <text:p text:style-name="P1"><text:span text:style-name="T8">web </text:span></text:p>
          </draw:text-box>
        </draw:frame>
        <draw:frame draw:style-name="gr1" draw:text-style-name="P2" draw:layer="layout" svg:width="1.494cm" svg:height="0.442cm" svg:x="6.893cm" svg:y="15.495cm">
          <draw:text-box>
            <text:p text:style-name="P1"><text:span text:style-name="T8">module: </text:span></text:p>
          </draw:text-box>
        </draw:frame>
        <draw:frame draw:style-name="gr1" draw:text-style-name="P2" draw:layer="layout" svg:width="1.847cm" svg:height="0.442cm" svg:x="8.589cm" svg:y="15.495cm">
          <draw:text-box>
            <text:p text:style-name="P1"><text:span text:style-name="T1">Integrating </text:span></text:p>
          </draw:text-box>
        </draw:frame>
        <draw:frame draw:style-name="gr1" draw:text-style-name="P2" draw:layer="layout" svg:width="0.397cm" svg:height="0.442cm" svg:x="10.629cm" svg:y="15.495cm">
          <draw:text-box>
            <text:p text:style-name="P1"><text:span text:style-name="T1">a </text:span></text:p>
          </draw:text-box>
        </draw:frame>
        <draw:frame draw:style-name="gr1" draw:text-style-name="P2" draw:layer="layout" svg:width="1.914cm" svg:height="0.442cm" svg:x="11.102cm" svg:y="15.495cm">
          <draw:text-box>
            <text:p text:style-name="P1"><text:span text:style-name="T1">lightweight </text:span></text:p>
          </draw:text-box>
        </draw:frame>
        <draw:frame draw:style-name="gr1" draw:text-style-name="P2" draw:layer="layout" svg:width="1.67cm" svg:height="0.442cm" svg:x="13.208cm" svg:y="15.495cm">
          <draw:text-box>
            <text:p text:style-name="P1"><text:span text:style-name="T1">on-device </text:span></text:p>
          </draw:text-box>
        </draw:frame>
        <draw:frame draw:style-name="gr1" draw:text-style-name="P2" draw:layer="layout" svg:width="1.096cm" svg:height="0.442cm" svg:x="15.078cm" svg:y="15.495cm">
          <draw:text-box>
            <text:p text:style-name="P1"><text:span text:style-name="T1">model </text:span></text:p>
          </draw:text-box>
        </draw:frame>
        <draw:frame draw:style-name="gr1" draw:text-style-name="P2" draw:layer="layout" svg:width="0.908cm" svg:height="0.442cm" svg:x="16.371cm" svg:y="15.495cm">
          <draw:text-box>
            <text:p text:style-name="P1"><text:span text:style-name="T1">(e.g., </text:span></text:p>
          </draw:text-box>
        </draw:frame>
        <draw:frame draw:style-name="gr1" draw:text-style-name="P2" draw:layer="layout" svg:width="0.588cm" svg:height="0.442cm" svg:x="17.474cm" svg:y="15.495cm">
          <draw:text-box>
            <text:p text:style-name="P1"><text:span text:style-name="T1">via </text:span></text:p>
          </draw:text-box>
        </draw:frame>
        <draw:frame draw:style-name="gr1" draw:text-style-name="P2" draw:layer="layout" svg:width="14.506cm" svg:height="0.442cm" svg:x="2.988cm" svg:y="15.951cm">
          <draw:text-box>
            <text:p text:style-name="P1"><text:span text:style-name="T1">TensorFlow Lite or ONNX) would remove the current web version's dependency on a live </text:span></text:p>
          </draw:text-box>
        </draw:frame>
        <draw:frame draw:style-name="gr1" draw:text-style-name="P2" draw:layer="layout" svg:width="14.291cm" svg:height="0.442cm" svg:x="2.988cm" svg:y="16.408cm">
          <draw:text-box>
            <text:p text:style-name="P1"><text:span text:style-name="T1">Roboflow endpoint and internet connectivity, making it usable in low-connectivity areas. </text:span></text:p>
          </draw:text-box>
        </draw:frame>
        <draw:frame draw:style-name="gr1" draw:text-style-name="P2" draw:layer="layout" svg:width="0.397cm" svg:height="0.442cm" svg:x="2.988cm" svg:y="16.8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2.39cm" svg:y="17.328cm">
          <draw:text-box>
            <text:p text:style-name="P1"><text:span text:style-name="T1">4.</text:span></text:p>
          </draw:text-box>
        </draw:frame>
        <draw:frame draw:style-name="gr1" draw:text-style-name="P2" draw:layer="layout" svg:width="0.397cm" svg:height="0.446cm" svg:x="2.689cm" svg:y="17.323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4.855cm" svg:height="0.442cm" svg:x="2.988cm" svg:y="17.328cm">
          <draw:text-box>
            <text:p text:style-name="P1"><text:span text:style-name="T8">Multilingual voice output: </text:span><text:span text:style-name="T1">Extending speech feedback to regional Indian languages (Hindi, </text:span></text:p>
          </draw:text-box>
        </draw:frame>
        <draw:frame draw:style-name="gr1" draw:text-style-name="P2" draw:layer="layout" svg:width="14.555cm" svg:height="0.442cm" svg:x="2.988cm" svg:y="17.785cm">
          <draw:text-box>
            <text:p text:style-name="P1"><text:span text:style-name="T1">Kannada, Tamil, etc.) would make the tool accessible to a much wider user base across the </text:span></text:p>
          </draw:text-box>
        </draw:frame>
        <draw:frame draw:style-name="gr1" draw:text-style-name="P2" draw:layer="layout" svg:width="1.417cm" svg:height="0.442cm" svg:x="2.988cm" svg:y="18.242cm">
          <draw:text-box>
            <text:p text:style-name="P1"><text:span text:style-name="T1">country. </text:span></text:p>
          </draw:text-box>
        </draw:frame>
        <draw:frame draw:style-name="gr1" draw:text-style-name="P2" draw:layer="layout" svg:width="0.397cm" svg:height="0.442cm" svg:x="2.988cm" svg:y="18.6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2.39cm" svg:y="19.154cm">
          <draw:text-box>
            <text:p text:style-name="P1"><text:span text:style-name="T1">5.</text:span></text:p>
          </draw:text-box>
        </draw:frame>
        <draw:frame draw:style-name="gr1" draw:text-style-name="P2" draw:layer="layout" svg:width="0.397cm" svg:height="0.446cm" svg:x="2.689cm" svg:y="19.149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5.019cm" svg:height="0.442cm" svg:x="2.988cm" svg:y="19.154cm">
          <draw:text-box>
            <text:p text:style-name="P1"><text:span text:style-name="T8">Counterfeit <text:s/>note <text:s/>detection: </text:span><text:span text:style-name="T1"><text:s/>Adding <text:s/>a <text:s/>secondary <text:s/>verification <text:s/>layer <text:s/>that <text:s/>checks <text:s/>security </text:span></text:p>
          </draw:text-box>
        </draw:frame>
        <draw:frame draw:style-name="gr1" draw:text-style-name="P2" draw:layer="layout" svg:width="14.666cm" svg:height="0.442cm" svg:x="2.988cm" svg:y="19.619cm">
          <draw:text-box>
            <text:p text:style-name="P1"><text:span text:style-name="T1">features (watermarks, security threads, color-shifting ink patterns) would extend the system </text:span></text:p>
          </draw:text-box>
        </draw:frame>
        <draw:frame draw:style-name="gr1" draw:text-style-name="P2" draw:layer="layout" svg:width="14.743cm" svg:height="0.442cm" svg:x="2.988cm" svg:y="20.075cm">
          <draw:text-box>
            <text:p text:style-name="P1"><text:span text:style-name="T1">from pure denomination recognition to basic authenticity checking, which has real value for </text:span></text:p>
          </draw:text-box>
        </draw:frame>
        <draw:frame draw:style-name="gr1" draw:text-style-name="P2" draw:layer="layout" svg:width="7.76cm" svg:height="0.442cm" svg:x="2.988cm" svg:y="20.531cm">
          <draw:text-box>
            <text:p text:style-name="P1"><text:span text:style-name="T1">small vendors and visually impaired users alike. </text:span></text:p>
          </draw:text-box>
        </draw:frame>
        <draw:frame draw:style-name="gr1" draw:text-style-name="P2" draw:layer="layout" svg:width="0.397cm" svg:height="0.442cm" svg:x="2.39cm" svg:y="20.9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2.39cm" svg:y="21.445cm">
          <draw:text-box>
            <text:p text:style-name="P1"><text:span text:style-name="T1">6.</text:span></text:p>
          </draw:text-box>
        </draw:frame>
        <draw:frame draw:style-name="gr1" draw:text-style-name="P2" draw:layer="layout" svg:width="0.397cm" svg:height="0.446cm" svg:x="2.689cm" svg:y="21.439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4.636cm" svg:height="0.442cm" svg:x="2.988cm" svg:y="21.445cm">
          <draw:text-box>
            <text:p text:style-name="P1"><text:span text:style-name="T8">Support for additional currencies and damaged notes: </text:span><text:span text:style-name="T1">The current template approach is </text:span></text:p>
          </draw:text-box>
        </draw:frame>
        <draw:frame draw:style-name="gr1" draw:text-style-name="P2" draw:layer="layout" svg:width="15.385cm" svg:height="0.442cm" svg:x="2.988cm" svg:y="21.909cm">
          <draw:text-box>
            <text:p text:style-name="P1"><text:span text:style-name="T1">India-specific <text:s/>and <text:s/>assumes <text:s/>notes <text:s/>are <text:s/>in <text:s/>reasonably <text:s/>good <text:s/>condition. <text:s/>Future <text:s/>versions <text:s/>could </text:span></text:p>
          </draw:text-box>
        </draw:frame>
        <draw:frame draw:style-name="gr1" draw:text-style-name="P2" draw:layer="layout" svg:width="14.864cm" svg:height="0.442cm" svg:x="2.988cm" svg:y="22.366cm">
          <draw:text-box>
            <text:p text:style-name="P1"><text:span text:style-name="T1">expand the dataset to support foreign currencies for travelers and improve detection of worn, </text:span></text:p>
          </draw:text-box>
        </draw:frame>
        <draw:frame draw:style-name="gr1" draw:text-style-name="P2" draw:layer="layout" svg:width="3.428cm" svg:height="0.442cm" svg:x="2.988cm" svg:y="22.822cm">
          <draw:text-box>
            <text:p text:style-name="P1"><text:span text:style-name="T1">torn, or folded notes. </text:span></text:p>
          </draw:text-box>
        </draw:frame>
        <draw:frame draw:style-name="gr1" draw:text-style-name="P2" draw:layer="layout" svg:width="0.397cm" svg:height="0.442cm" svg:x="2.39cm" svg:y="23.2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2.39cm" svg:y="23.734cm">
          <draw:text-box>
            <text:p text:style-name="P1"><text:span text:style-name="T1">7.</text:span></text:p>
          </draw:text-box>
        </draw:frame>
        <draw:frame draw:style-name="gr1" draw:text-style-name="P2" draw:layer="layout" svg:width="0.397cm" svg:height="0.446cm" svg:x="2.689cm" svg:y="23.729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4.943cm" svg:height="0.442cm" svg:x="2.988cm" svg:y="23.734cm">
          <draw:text-box>
            <text:p text:style-name="P1"><text:span text:style-name="T8">Real-time continuous scanning mode: </text:span><text:span text:style-name="T1">Rather than requiring a clean single capture, a future </text:span></text:p>
          </draw:text-box>
        </draw:frame>
        <draw:frame draw:style-name="gr1" draw:text-style-name="P2" draw:layer="layout" svg:width="15.166cm" svg:height="0.442cm" svg:x="2.988cm" svg:y="24.2cm">
          <draw:text-box>
            <text:p text:style-name="P1"><text:span text:style-name="T1">version <text:s/>could <text:s/>support <text:s/>continuous <text:s/>video-based <text:s/>scanning <text:s/>with <text:s/>temporal <text:s/>smoothing, <text:s/>so <text:s/>the </text:span></text:p>
          </draw:text-box>
        </draw:frame>
        <draw:frame draw:style-name="gr1" draw:text-style-name="P2" draw:layer="layout" svg:width="14.86cm" svg:height="0.442cm" svg:x="2.988cm" svg:y="24.656cm">
          <draw:text-box>
            <text:p text:style-name="P1"><text:span text:style-name="T1">system keeps refining its prediction as the user adjusts the note's position, rather than relying </text:span></text:p>
          </draw:text-box>
        </draw:frame>
        <draw:frame draw:style-name="gr1" draw:text-style-name="P2" draw:layer="layout" svg:width="3.239cm" svg:height="0.442cm" svg:x="2.988cm" svg:y="25.112cm">
          <draw:text-box>
            <text:p text:style-name="P1"><text:span text:style-name="T1">on one static frame. </text:span></text:p>
          </draw:text-box>
        </draw:frame>
        <draw:frame draw:style-name="gr1" draw:text-style-name="P2" draw:layer="layout" svg:width="0.397cm" svg:height="0.442cm" svg:x="1.793cm" svg:y="25.569cm">
          <draw:text-box>
            <text:p text:style-name="P1"><text:span text:style-name="T1"><text:s/></text:span></text:p>
          </draw:text-box>
        </draw:frame>
      </draw:page>
      <draw:page draw:name="page18" draw:style-name="dp1" draw:master-page-name="master-page3">
        <draw:frame draw:style-name="gr19" draw:text-style-name="P7" draw:layer="layout" svg:width="0.569cm" svg:height="0.442cm" svg:x="10.131cm" svg:y="26.35cm">
          <draw:text-box>
            <text:p text:style-name="P1"><text:span text:style-name="T1">10 </text:span></text:p>
          </draw:text-box>
        </draw:frame>
        <draw:frame draw:style-name="gr5" draw:text-style-name="P6" draw:layer="layout" svg:width="2.628cm" svg:height="0.518cm" svg:x="1.793cm" svg:y="1.81cm">
          <draw:text-box>
            <text:p text:style-name="P1"><text:span text:style-name="T16">CHAPTER 7</text:span></text:p>
          </draw:text-box>
        </draw:frame>
        <draw:frame draw:style-name="gr1" draw:text-style-name="P2" draw:layer="layout" svg:width="0.397cm" svg:height="0.442cm" svg:x="4.415cm" svg:y="1.869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3.133cm" svg:height="0.518cm" svg:x="8.316cm" svg:y="2.739cm">
          <draw:text-box>
            <text:p text:style-name="P1"><text:span text:style-name="T16">REFERENCES</text:span></text:p>
          </draw:text-box>
        </draw:frame>
        <draw:frame draw:style-name="gr1" draw:text-style-name="P2" draw:layer="layout" svg:width="0.397cm" svg:height="0.442cm" svg:x="11.445cm" svg:y="2.7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1.959cm" svg:y="3.678cm">
          <draw:text-box>
            <text:p text:style-name="P1"><text:span text:style-name="T1">1.</text:span></text:p>
          </draw:text-box>
        </draw:frame>
        <draw:frame draw:style-name="gr1" draw:text-style-name="P2" draw:layer="layout" svg:width="0.397cm" svg:height="0.446cm" svg:x="2.257cm" svg:y="3.672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4.94cm" svg:height="0.442cm" svg:x="2.556cm" svg:y="3.678cm">
          <draw:text-box>
            <text:p text:style-name="P1"><text:span text:style-name="T1">K. K. Debnath, S. U. Ahmed, M. Shahjahan, and K. Murase, "A Paper Currency Recognition </text:span></text:p>
          </draw:text-box>
        </draw:frame>
        <draw:frame draw:style-name="gr1" draw:text-style-name="P2" draw:layer="layout" svg:width="15.415cm" svg:height="0.442cm" svg:x="2.556cm" svg:y="4.201cm">
          <draw:text-box>
            <text:p text:style-name="P1"><text:span text:style-name="T1">System Using Negatively Correlated Neural Network Ensemble," Journal of Multimedia, vol. 5, </text:span></text:p>
          </draw:text-box>
        </draw:frame>
        <draw:frame draw:style-name="gr1" draw:text-style-name="P2" draw:layer="layout" svg:width="3.185cm" svg:height="0.442cm" svg:x="2.556cm" svg:y="4.732cm">
          <draw:text-box>
            <text:p text:style-name="P1"><text:span text:style-name="T1">no. 6, p. 560, 2010 <text:s/></text:span></text:p>
          </draw:text-box>
        </draw:frame>
        <draw:frame draw:style-name="gr1" draw:text-style-name="P2" draw:layer="layout" svg:width="1.759cm" svg:height="0.442cm" svg:x="2.556cm" svg:y="5.52cm">
          <draw:text-box>
            <text:p text:style-name="P1"><text:span text:style-name="T1">Available: </text:span></text:p>
          </draw:text-box>
        </draw:frame>
        <draw:frame draw:style-name="gr1" draw:text-style-name="P2" draw:layer="layout" svg:width="15.231cm" svg:height="0.442cm" svg:x="2.556cm" svg:y="6.051cm">
          <draw:text-box>
            <text:p text:style-name="P1"><text:span text:style-name="T1">https://www.researchgate.net/publication/220590830_A_Paper_Currency_Recognition_System</text:span></text:p>
          </draw:text-box>
        </draw:frame>
        <draw:frame draw:style-name="gr1" draw:text-style-name="P2" draw:layer="layout" svg:width="9.715cm" svg:height="0.442cm" svg:x="2.556cm" svg:y="6.574cm">
          <draw:text-box>
            <text:p text:style-name="P1"><text:span text:style-name="T1">_Using_Negatively_Correlated_Neural_Network_Ensemble </text:span></text:p>
          </draw:text-box>
        </draw:frame>
        <draw:frame draw:style-name="gr1" draw:text-style-name="P2" draw:layer="layout" svg:width="0.397cm" svg:height="0.442cm" svg:x="1.959cm" svg:y="7.371cm">
          <draw:text-box>
            <text:p text:style-name="P1"><text:span text:style-name="T1">2.</text:span></text:p>
          </draw:text-box>
        </draw:frame>
        <draw:frame draw:style-name="gr1" draw:text-style-name="P2" draw:layer="layout" svg:width="0.397cm" svg:height="0.446cm" svg:x="2.257cm" svg:y="7.366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4.894cm" svg:height="0.442cm" svg:x="2.556cm" svg:y="7.371cm">
          <draw:text-box>
            <text:p text:style-name="P1"><text:span text:style-name="T1"><text:s/>P. Ganjave, R. Markad, G. Rasal, and Y. Kalekar, "Currency Detector for Visually Impaired </text:span></text:p>
          </draw:text-box>
        </draw:frame>
        <draw:frame draw:style-name="gr1" draw:text-style-name="P2" draw:layer="layout" svg:width="15.57cm" svg:height="0.442cm" svg:x="2.556cm" svg:y="7.894cm">
          <draw:text-box>
            <text:p text:style-name="P1"><text:span text:style-name="T1">(Study of The System Which Identifies Indian Currency for Blind People)," International Journal </text:span></text:p>
          </draw:text-box>
        </draw:frame>
        <draw:frame draw:style-name="gr1" draw:text-style-name="P2" draw:layer="layout" svg:width="11.54cm" svg:height="0.442cm" svg:x="2.556cm" svg:y="8.425cm">
          <draw:text-box>
            <text:p text:style-name="P1"><text:span text:style-name="T1">of Engineering Research &amp; Technology (IJERT), vol. 10, no. 11, 2021. <text:s/></text:span></text:p>
          </draw:text-box>
        </draw:frame>
        <draw:frame draw:style-name="gr1" draw:text-style-name="P2" draw:layer="layout" svg:width="1.759cm" svg:height="0.442cm" svg:x="2.556cm" svg:y="9.213cm">
          <draw:text-box>
            <text:p text:style-name="P1"><text:span text:style-name="T1">Available: </text:span></text:p>
          </draw:text-box>
        </draw:frame>
        <draw:frame draw:style-name="gr1" draw:text-style-name="P2" draw:layer="layout" svg:width="15.231cm" svg:height="0.442cm" svg:x="2.556cm" svg:y="9.744cm">
          <draw:text-box>
            <text:p text:style-name="P1"><text:span text:style-name="T1">https://www.researchgate.net/publication/220590830_A_Paper_Currency_Recognition_System</text:span></text:p>
          </draw:text-box>
        </draw:frame>
        <draw:frame draw:style-name="gr1" draw:text-style-name="P2" draw:layer="layout" svg:width="9.715cm" svg:height="0.442cm" svg:x="2.556cm" svg:y="10.267cm">
          <draw:text-box>
            <text:p text:style-name="P1"><text:span text:style-name="T1">_Using_Negatively_Correlated_Neural_Network_Ensemble </text:span></text:p>
          </draw:text-box>
        </draw:frame>
        <draw:frame draw:style-name="gr1" draw:text-style-name="P2" draw:layer="layout" svg:width="0.397cm" svg:height="0.442cm" svg:x="1.959cm" svg:y="11.055cm">
          <draw:text-box>
            <text:p text:style-name="P1"><text:span text:style-name="T1">3.</text:span></text:p>
          </draw:text-box>
        </draw:frame>
        <draw:frame draw:style-name="gr1" draw:text-style-name="P2" draw:layer="layout" svg:width="0.397cm" svg:height="0.446cm" svg:x="2.257cm" svg:y="11.05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5.572cm" svg:height="0.442cm" svg:x="2.556cm" svg:y="11.055cm">
          <draw:text-box>
            <text:p text:style-name="P1"><text:span text:style-name="T1"><text:s/>Yousry, M. Taha, and M. M. Selim, "Currency Recognition System for Blind people using ORB </text:span></text:p>
          </draw:text-box>
        </draw:frame>
        <draw:frame draw:style-name="gr1" draw:text-style-name="P2" draw:layer="layout" svg:width="7.175cm" svg:height="0.442cm" svg:x="2.556cm" svg:y="11.586cm">
          <draw:text-box>
            <text:p text:style-name="P1"><text:span text:style-name="T1">Algorithm, vol. [3], no. [3], pp. [2-4], 2018. <text:s/></text:span></text:p>
          </draw:text-box>
        </draw:frame>
        <draw:frame draw:style-name="gr1" draw:text-style-name="P2" draw:layer="layout" svg:width="10.388cm" svg:height="0.442cm" svg:x="2.556cm" svg:y="12.375cm">
          <draw:text-box>
            <text:p text:style-name="P1"><text:span text:style-name="T1">Available:[https://www.researchgate.net/profile/Mohamed-Taha-</text:span></text:p>
          </draw:text-box>
        </draw:frame>
        <draw:frame draw:style-name="gr1" draw:text-style-name="P2" draw:layer="layout" svg:width="15.277cm" svg:height="0.442cm" svg:x="2.556cm" svg:y="12.906cm">
          <draw:text-box>
            <text:p text:style-name="P1"><text:span text:style-name="T1">29/publication/329487411_Currency_Recognition_System_for_Blind_people_using_ORB_Alg</text:span></text:p>
          </draw:text-box>
        </draw:frame>
        <draw:frame draw:style-name="gr1" draw:text-style-name="P2" draw:layer="layout" svg:width="14.612cm" svg:height="0.442cm" svg:x="2.556cm" svg:y="13.428cm">
          <draw:text-box>
            <text:p text:style-name="P1"><text:span text:style-name="T1">orithm/links/5c0ac2bb92851c39ebdb50ab/Currency-Recognition-System-for-Blind-people-</text:span></text:p>
          </draw:text-box>
        </draw:frame>
        <draw:frame draw:style-name="gr1" draw:text-style-name="P2" draw:layer="layout" svg:width="4.467cm" svg:height="0.442cm" svg:x="2.556cm" svg:y="13.959cm">
          <draw:text-box>
            <text:p text:style-name="P1"><text:span text:style-name="T1">using-ORB-Algorithm.pdf] </text:span></text:p>
          </draw:text-box>
        </draw:frame>
        <draw:frame draw:style-name="gr1" draw:text-style-name="P2" draw:layer="layout" svg:width="0.397cm" svg:height="0.442cm" svg:x="1.959cm" svg:y="14.747cm">
          <draw:text-box>
            <text:p text:style-name="P1"><text:span text:style-name="T1">4.</text:span></text:p>
          </draw:text-box>
        </draw:frame>
        <draw:frame draw:style-name="gr1" draw:text-style-name="P2" draw:layer="layout" svg:width="0.397cm" svg:height="0.446cm" svg:x="2.257cm" svg:y="14.742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5.814cm" svg:height="0.442cm" svg:x="2.556cm" svg:y="14.747cm">
          <draw:text-box>
            <text:p text:style-name="P1"><text:span text:style-name="T1">A. Singh, P. Mankani, K. Bhoyar, A. Pandey, and A. Tekriwal, "Detection of Fake Currency using </text:span></text:p>
          </draw:text-box>
        </draw:frame>
        <draw:frame draw:style-name="gr1" draw:text-style-name="P2" draw:layer="layout" svg:width="7.813cm" svg:height="0.442cm" svg:x="2.556cm" svg:y="15.279cm">
          <draw:text-box>
            <text:p text:style-name="P1"><text:span text:style-name="T1">Image Processing," IJERT, vol. 8, no. 12, 2019. <text:s/></text:span></text:p>
          </draw:text-box>
        </draw:frame>
        <draw:frame draw:style-name="gr1" draw:text-style-name="P2" draw:layer="layout" svg:width="13.505cm" svg:height="0.442cm" svg:x="2.556cm" svg:y="16.067cm">
          <draw:text-box>
            <text:p text:style-name="P1"><text:span text:style-name="T1">Available: https://www.ijert.org/detection-of-fake-currency-using-image-processing </text:span></text:p>
          </draw:text-box>
        </draw:frame>
        <draw:frame draw:style-name="gr1" draw:text-style-name="P2" draw:layer="layout" svg:width="0.397cm" svg:height="0.442cm" svg:x="1.959cm" svg:y="16.864cm">
          <draw:text-box>
            <text:p text:style-name="P1"><text:span text:style-name="T1">5.</text:span></text:p>
          </draw:text-box>
        </draw:frame>
        <draw:frame draw:style-name="gr1" draw:text-style-name="P2" draw:layer="layout" svg:width="0.397cm" svg:height="0.446cm" svg:x="2.257cm" svg:y="16.858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5.36cm" svg:height="0.442cm" svg:x="2.556cm" svg:y="16.864cm">
          <draw:text-box>
            <text:p text:style-name="P1"><text:span text:style-name="T1">A. Gupta and T. Sharma, "The Propose Currency Detection Technique Based on Sift Algorithm </text:span></text:p>
          </draw:text-box>
        </draw:frame>
        <draw:frame draw:style-name="gr1" draw:text-style-name="P2" draw:layer="layout" svg:width="14.972cm" svg:height="0.442cm" svg:x="2.556cm" svg:y="17.386cm">
          <draw:text-box>
            <text:p text:style-name="P1"><text:span text:style-name="T1">and Bayesian Classifier: A Review," [IJSTE - International Journal of Science Technology &amp; </text:span></text:p>
          </draw:text-box>
        </draw:frame>
        <draw:frame draw:style-name="gr1" draw:text-style-name="P2" draw:layer="layout" svg:width="7.76cm" svg:height="0.442cm" svg:x="2.556cm" svg:y="17.917cm">
          <draw:text-box>
            <text:p text:style-name="P1"><text:span text:style-name="T1">Engineering], vol. [4], no. [2], pp. [2-3], [2017]. </text:span></text:p>
          </draw:text-box>
        </draw:frame>
        <draw:frame draw:style-name="gr1" draw:text-style-name="P2" draw:layer="layout" svg:width="12.215cm" svg:height="0.442cm" svg:x="2.556cm" svg:y="18.706cm">
          <draw:text-box>
            <text:p text:style-name="P1"><text:span text:style-name="T1"><text:s/>Available:[https://d1wqtxts1xzle7.cloudfront.net/55360369/IJSTEV4I2049-</text:span></text:p>
          </draw:text-box>
        </draw:frame>
        <draw:frame draw:style-name="gr1" draw:text-style-name="P2" draw:layer="layout" svg:width="6.89cm" svg:height="0.442cm" svg:x="2.556cm" svg:y="19.237cm">
          <draw:text-box>
            <text:p text:style-name="P1"><text:span text:style-name="T1">libre.pdf?1514017658=&amp;response-content-</text:span></text:p>
          </draw:text-box>
        </draw:frame>
        <draw:frame draw:style-name="gr1" draw:text-style-name="P2" draw:layer="layout" svg:width="15.337cm" svg:height="0.442cm" svg:x="2.556cm" svg:y="19.76cm">
          <draw:text-box>
            <text:p text:style-name="P1"><text:span text:style-name="T1">disposition=inline%3B+filename%3DThe_Propose_Currency_Detection_Technique.pdf&amp;Expir</text:span></text:p>
          </draw:text-box>
        </draw:frame>
        <draw:frame draw:style-name="gr1" draw:text-style-name="P2" draw:layer="layout" svg:width="15.234cm" svg:height="0.442cm" svg:x="2.556cm" svg:y="20.291cm">
          <draw:text-box>
            <text:p text:style-name="P1"><text:span text:style-name="T1">es=1781894541&amp;Signature=FmEXdn7AYddA9lTy4mLPG~fEK4PVGKpKn4bfYutU3Hi0IER</text:span></text:p>
          </draw:text-box>
        </draw:frame>
        <draw:frame draw:style-name="gr1" draw:text-style-name="P2" draw:layer="layout" svg:width="15.293cm" svg:height="0.442cm" svg:x="2.556cm" svg:y="20.813cm">
          <draw:text-box>
            <text:p text:style-name="P1"><text:span text:style-name="T1">7FT1zkspxnJ6d5SafnOFl1rr~kippT8YIRj4lVh4L3IgOg7FLMvJYha08VDaXzX5xIQ4eFizdbO</text:span></text:p>
          </draw:text-box>
        </draw:frame>
        <draw:frame draw:style-name="gr1" draw:text-style-name="P2" draw:layer="layout" svg:width="10.441cm" svg:height="0.442cm" svg:x="2.556cm" svg:y="21.345cm">
          <draw:text-box>
            <text:p text:style-name="P1"><text:span text:style-name="T1">z~fXCJpg0Moz40kPQUOED-0ofCeH03UGz~HmbUQXVg~S7-</text:span></text:p>
          </draw:text-box>
        </draw:frame>
        <draw:frame draw:style-name="gr1" draw:text-style-name="P2" draw:layer="layout" svg:width="14.739cm" svg:height="0.442cm" svg:x="2.556cm" svg:y="21.868cm">
          <draw:text-box>
            <text:p text:style-name="P1"><text:span text:style-name="T1">uAUjl~ozdSULkEevQZikoETEyA0HTUerUtzQ47QpLiOuhTDgD9a8g4ylbJszzPbKAaOlJ-</text:span></text:p>
          </draw:text-box>
        </draw:frame>
        <draw:frame draw:style-name="gr1" draw:text-style-name="P2" draw:layer="layout" svg:width="15.248cm" svg:height="0.442cm" svg:x="2.556cm" svg:y="22.399cm">
          <draw:text-box>
            <text:p text:style-name="P1"><text:span text:style-name="T1">j6nEkLnaTNZNOu~u3CtYrVy81Ec1feKLrqgyNvloVY7XO8YKxve3KkPBFmI6kwWdVHbQ</text:span></text:p>
          </draw:text-box>
        </draw:frame>
        <draw:frame draw:style-name="gr1" draw:text-style-name="P2" draw:layer="layout" svg:width="15.336cm" svg:height="0.442cm" svg:x="2.556cm" svg:y="22.921cm">
          <draw:text-box>
            <text:p text:style-name="P1"><text:span text:style-name="T1">HiXly-kZbgxT8l8YPdfTrPZvrSqos5TTFLJg__&amp;Key-Pair-Id=APKAJLOHF5GGSLRBV4ZA] </text:span></text:p>
          </draw:text-box>
        </draw:frame>
        <draw:frame draw:style-name="gr1" draw:text-style-name="P2" draw:layer="layout" svg:width="0.397cm" svg:height="0.442cm" svg:x="1.959cm" svg:y="23.7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1.959cm" svg:y="24.5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97cm" svg:height="0.442cm" svg:x="1.959cm" svg:y="25.295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9.1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6-22T23:17:20.267451800</dc:date>
    <meta:editing-duration>PT3M59S</meta:editing-duration>
    <meta:editing-cycles>1</meta:editing-cycles>
    <meta:generator>LibreOffice/26.2.4.2$Windows_X86_64 LibreOffice_project/0229ac93fcf0d7cbc6376066c6f35021cef002dc</meta:generator>
    <meta:document-statistic meta:object-count="1171"/>
  </office:meta>
</office:document-meta>
</file>